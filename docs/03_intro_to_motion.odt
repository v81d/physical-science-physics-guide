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normal" officeooo:rsid="0019fefd" officeooo:paragraph-rsid="0019fefd" style:font-style-asian="normal" style:font-style-complex="normal"/>
    </style:style>
    <style:style style:name="P2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officeooo:paragraph-rsid="0019fef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256879" officeooo:paragraph-rsid="00256879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9fefd" officeooo:paragraph-rsid="0019fef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19fefd" officeooo:paragraph-rsid="0019fefd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officeooo:rsid="0019fefd" officeooo:paragraph-rsid="0019fefd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9fefd" officeooo:paragraph-rsid="001b82ab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1b82ab" officeooo:paragraph-rsid="001b82ab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normal" officeooo:rsid="001b82ab" officeooo:paragraph-rsid="0026e519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b82ab" officeooo:paragraph-rsid="001b82a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officeooo:rsid="001b82ab" officeooo:paragraph-rsid="001b82a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82ab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ction to Motion</text:p>
      <text:p text:style-name="P1">September 15, 202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879_679008467" office:name="Distance &amp; Displacement" text:style-name="Index_20_Link" text:visited-style-name="Index_20_Link">Distance &amp; Displacement<text:tab/>1</text:a></text:p>
          <text:p text:style-name="P2"><text:a xlink:type="simple" xlink:href="#__RefHeading___Toc881_679008467" office:name="Speed &amp; Velocity" text:style-name="Index_20_Link" text:visited-style-name="Index_20_Link">Speed &amp; Velocity<text:tab/>1</text:a></text:p>
          <text:p text:style-name="P3"><text:a xlink:type="simple" xlink:href="#__RefHeading___Toc883_679008467" office:name="Average Velocity" text:style-name="Index_20_Link" text:visited-style-name="Index_20_Link">Average Velocity<text:tab/>1</text:a></text:p>
          <text:p text:style-name="P3"><text:a xlink:type="simple" xlink:href="#__RefHeading___Toc885_679008467" office:name="Instantaneous Velocity" text:style-name="Index_20_Link" text:visited-style-name="Index_20_Link">Instantaneous Velocity<text:tab/>1</text:a></text:p>
          <text:p text:style-name="P2"><text:a xlink:type="simple" xlink:href="#__RefHeading___Toc887_679008467" office:name="Acceleration" text:style-name="Index_20_Link" text:visited-style-name="Index_20_Link">Acceleration<text:tab/>2</text:a></text:p>
          <text:p text:style-name="P3"><text:a xlink:type="simple" xlink:href="#__RefHeading___Toc889_679008467" office:name="Direction of Acceleration" text:style-name="Index_20_Link" text:visited-style-name="Index_20_Link">Direction of Acceleration<text:tab/>2</text:a></text:p>
        </text:index-body>
      </text:table-of-content>
      <text:p text:style-name="P4"/>
      <text:h text:style-name="P5" text:outline-level="1"><text:bookmark-start text:name="__RefHeading___Toc879_679008467"/>Distance &amp; Displacement<text:bookmark-end text:name="__RefHeading___Toc879_679008467"/></text:h>
      <text:p text:style-name="P6">Distance<text:span text:style-name="T1"> is a scalar quantity that refers to the </text:span>amount of ground an object has covered<text:span text:style-name="T1"> during its motion. </text:span>Displacement<text:span text:style-name="T1">, however, is a vector quantity that refers to </text:span>how far out of place<text:span text:style-name="T1"> an object is. It is the overall change in position of the object relative to its </text:span>origin<text:span text:style-name="T1">.</text:span></text:p>
      <text:h text:style-name="Heading_20_1" text:outline-level="1"><text:bookmark-start text:name="__RefHeading___Toc881_679008467"/>Speed &amp; Velocity<text:bookmark-end text:name="__RefHeading___Toc881_679008467"/></text:h>
      <text:p text:style-name="P7">Speed<text:span text:style-name="T1"> is how fast an object is moving. It is a scalar quantity that is described by only magnitude. </text:span>Velocity<text:span text:style-name="T1"> also represents how fast an object is moving, but with direction included. It is a vector quantity described by both magnitude and direction.</text:span></text:p>
      <text:h text:style-name="Heading_20_2" text:outline-level="2"><text:bookmark-start text:name="__RefHeading___Toc883_679008467"/>Average Velocity<text:bookmark-end text:name="__RefHeading___Toc883_679008467"/></text:h>
      <text:p text:style-name="P7">Average velocity<text:span text:style-name="T1"> is the velocity at which you are moving over a general amount of time.</text:span></text:p>
      <text:p text:style-name="P8">It is given by the formula:</text:p>
      <text:p text:style-name="P9"><draw:frame draw:style-name="fr1" draw:name="Object1" text:anchor-type="as-char" svg:y="-0.2693in" svg:width="0.9346in" svg:height="0.4201in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10">where <draw:frame draw:style-name="fr1" draw:name="Object2" text:anchor-type="as-char" svg:y="-0.1492in" svg:width="0.0898in" svg:height="0.1854in" draw:z-index="1"><draw:object xlink:href="./Object 2" xlink:type="simple" xlink:show="embed" xlink:actuate="onLoad"/><draw:image xlink:href="./ObjectReplacements/Object 2" xlink:type="simple" xlink:show="embed" xlink:actuate="onLoad"/></draw:frame><text:s/>is the average velocity, <draw:frame draw:style-name="fr1" draw:name="Object3" text:anchor-type="as-char" svg:y="-0.1492in" svg:width="0.0965in" svg:height="0.1854in" draw:z-index="2"><draw:object xlink:href="./Object 3" xlink:type="simple" xlink:show="embed" xlink:actuate="onLoad"/><draw:image xlink:href="./ObjectReplacements/Object 3" xlink:type="simple" xlink:show="embed" xlink:actuate="onLoad"/></draw:frame><text:s/><text:span text:style-name="T2">is the distance traveled, </text:span><text:span text:style-name="T2"><draw:frame draw:style-name="fr1" draw:name="Object4" text:anchor-type="as-char" svg:y="-0.1492in" svg:width="0.0602in" svg:height="0.185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s/>is the time interval, </text:span><text:span text:style-name="T2"><draw:frame draw:style-name="fr1" draw:name="Object5" text:anchor-type="as-char" svg:y="-0.1492in" svg:width="0.139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<text:s/>is the final velocity, and </text:span><text:span text:style-name="T2"><draw:frame draw:style-name="fr1" draw:name="Object6" text:anchor-type="as-char" svg:y="-0.1492in" svg:width="0.1201in" svg:height="0.210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s/>is the initial velocity.</text:span></text:p>
      <text:h text:style-name="Heading_20_2" text:outline-level="2"><text:bookmark-start text:name="__RefHeading___Toc885_679008467"/>Instantaneous Velocity<text:bookmark-end text:name="__RefHeading___Toc885_679008467"/></text:h>
      <text:p text:style-name="P11">Instantaneous velocity<text:span text:style-name="T1"> is the velocity at which you are traveling at one specific point in time. Examples of instantaneous velocity include initial velocity (</text:span><text:span text:style-name="T1"><draw:frame draw:style-name="fr1" draw:name="Object7" text:anchor-type="as-char" svg:y="-0.1492in" svg:width="0.1201in" svg:height="0.210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) and final velocity (</text:span><text:span text:style-name="T1"><draw:frame draw:style-name="fr1" draw:name="Object8" text:anchor-type="as-char" svg:y="-0.1492in" svg:width="0.139in" svg:height="0.210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).</text:span></text:p>
      <text:h text:style-name="Heading_20_1" text:outline-level="1"><text:bookmark-start text:name="__RefHeading___Toc887_679008467"/>Acceleration<text:bookmark-end text:name="__RefHeading___Toc887_679008467"/></text:h>
      <text:p text:style-name="P11">Acceleration<text:span text:style-name="T1">, represented by the SI unit </text:span><text:span text:style-name="T1"><draw:frame draw:style-name="fr1" draw:name="Object9" text:anchor-type="as-char" svg:y="-0.1728in" svg:width="0.3346in" svg:height="0.2091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, is a vector quantity used to describe a change in velocity over an interval of time. Two formulas that can be used to calculate acceleration are:</text:span></text:p>
      <text:p text:style-name="P12"><draw:frame draw:style-name="fr1" draw:name="Object10" text:anchor-type="as-char" svg:y="-0.2693in" svg:width="0.6638in" svg:height="0.4201in" draw:z-index="9"><draw:object xlink:href="./Object 10" xlink:type="simple" xlink:show="embed" xlink:actuate="onLoad"/><draw:image xlink:href="./ObjectReplacements/Object 10" xlink:type="simple" xlink:show="embed" xlink:actuate="onLoad"/></draw:frame><text:s/>and</text:p>
      <text:p text:style-name="P12"><draw:frame draw:style-name="fr1" draw:name="Object11" text:anchor-type="as-char" svg:y="-0.1492in" svg:width="0.6618in" svg:height="0.2102in" draw:z-index="10"><draw:object xlink:href="./Object 11" xlink:type="simple" xlink:show="embed" xlink:actuate="onLoad"/><draw:image xlink:href="./ObjectReplacements/Object 11" xlink:type="simple" xlink:show="embed" xlink:actuate="onLoad"/></draw:frame>,</text:p>
      <text:p text:style-name="P13">where <draw:frame draw:style-name="fr1" draw:name="Object12" text:anchor-type="as-char" svg:y="-0.1492in" svg:width="0.0898in" svg:height="0.1854in" draw:z-index="11"><draw:object xlink:href="./Object 12" xlink:type="simple" xlink:show="embed" xlink:actuate="onLoad"/><draw:image xlink:href="./ObjectReplacements/Object 12" xlink:type="simple" xlink:show="embed" xlink:actuate="onLoad"/></draw:frame><text:s/>is the acceleration, <draw:frame draw:style-name="fr1" draw:name="Object13" text:anchor-type="as-char" svg:y="-0.1492in" svg:width="0.139in" svg:height="0.2102in" draw:z-index="12"><draw:object xlink:href="./Object 13" xlink:type="simple" xlink:show="embed" xlink:actuate="onLoad"/><draw:image xlink:href="./ObjectReplacements/Object 13" xlink:type="simple" xlink:show="embed" xlink:actuate="onLoad"/></draw:frame><text:s/>is the final velocity, <draw:frame draw:style-name="fr1" draw:name="Object14" text:anchor-type="as-char" svg:y="-0.1492in" svg:width="0.1201in" svg:height="0.2102in" draw:z-index="13"><draw:object xlink:href="./Object 14" xlink:type="simple" xlink:show="embed" xlink:actuate="onLoad"/><draw:image xlink:href="./ObjectReplacements/Object 14" xlink:type="simple" xlink:show="embed" xlink:actuate="onLoad"/></draw:frame><text:s/>is the initial velocity, and <draw:frame draw:style-name="fr1" draw:name="Object15" text:anchor-type="as-char" svg:y="-0.1492in" svg:width="0.0602in" svg:height="0.1854in" draw:z-index="14"><draw:object xlink:href="./Object 15" xlink:type="simple" xlink:show="embed" xlink:actuate="onLoad"/><draw:image xlink:href="./ObjectReplacements/Object 15" xlink:type="simple" xlink:show="embed" xlink:actuate="onLoad"/></draw:frame><text:s/>is the time.</text:p>
      <text:h text:style-name="Heading_20_2" text:outline-level="2"><text:bookmark-start text:name="__RefHeading___Toc889_679008467"/>Direction of Acceleration<text:bookmark-end text:name="__RefHeading___Toc889_679008467"/></text:h>
      <text:p text:style-name="P14">If an object is <text:span text:style-name="T3">speeding up</text:span>, its acceleration is pointed in the <text:span text:style-name="T3">same direction</text:span><text:span text:style-name="T1"> as is velocity. If the object is </text:span><text:span text:style-name="T3">slowing down</text:span><text:span text:style-name="T1">, however, its acceleration is pointed in the </text:span><text:span text:style-name="T3">opposite direction</text:span><text:span text:style-name="T1"> as its velocity.</text:span></text:p>
      <text:p text:style-name="P13">Slowing down is represented by <text:span text:style-name="T3">negative acceleration</text:span>, but it is sometimes called <text:span text:style-name="T3">deceleration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07:55:23.558822094</meta:creation-date>
    <dc:date>2026-06-09T20:25:21.262229763</dc:date>
    <meta:editing-duration>PT20M53S</meta:editing-duration>
    <meta:editing-cycles>9</meta:editing-cycles>
    <meta:generator>LibreOffice/25.8.5.2$Linux_X86_64 LibreOffice_project/580$Build-2</meta:generator>
    <meta:document-statistic meta:table-count="0" meta:image-count="0" meta:object-count="15" meta:page-count="2" meta:paragraph-count="28" meta:word-count="308" meta:character-count="1841" meta:non-whitespace-character-count="1551"/>
  </office:meta>
</office:document-meta>
</file>

<file path=Object 1/content.xml><?xml version="1.0" encoding="utf-8"?>
<math xmlns="http://www.w3.org/1998/Math/MathML" display="block">
  <semantics>
    <mrow>
      <mover accent="true">
        <mi>v</mi>
        <mo stretchy="false">¯</mo>
      </mover>
      <mo stretchy="false">=</mo>
      <mfrac>
        <mi>d</mi>
        <mi>t</mi>
      </mfrac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n>2</mn>
      </mfrac>
    </mrow>
    <annotation encoding="StarMath 5.0">bar v = frac { d } { t } = frac { v_f - v_i } { 2 }</annotation>
  </semantics>
</math>
</file>

<file path=Object 10/content.xml><?xml version="1.0" encoding="utf-8"?>
<math xmlns="http://www.w3.org/1998/Math/MathML" display="block">
  <semantics>
    <mrow>
      <mi>a</mi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i>t</mi>
      </mfrac>
    </mrow>
    <annotation encoding="StarMath 5.0">a = frac { v_f - v_i } { t }</annotation>
  </semantics>
</math>
</file>

<file path=Object 11/content.xml><?xml version="1.0" encoding="utf-8"?>
<math xmlns="http://www.w3.org/1998/Math/MathML" display="block">
  <semantics>
    <mrow>
      <msub>
        <mi>v</mi>
        <mi>f</mi>
      </msub>
      <mo stretchy="false">=</mo>
      <mrow>
        <msub>
          <mi>v</mi>
          <mi>i</mi>
        </msub>
        <mo stretchy="false">+</mo>
        <mi mathvariant="italic">at</mi>
      </mrow>
    </mrow>
    <annotation encoding="StarMath 5.0">v_f = v_i + at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sub>
      <mi>v</mi>
      <mi>f</mi>
    </msub>
    <annotation encoding="StarMath 5.0">v_f</annotation>
  </semantics>
</math>
</file>

<file path=Object 14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15/content.xml><?xml version="1.0" encoding="utf-8"?>
<math xmlns="http://www.w3.org/1998/Math/MathML" display="block">
  <semantics>
    <mi>t</mi>
    <annotation encoding="StarMath 5.0">t</annotation>
  </semantics>
</math>
</file>

<file path=Object 2/content.xml><?xml version="1.0" encoding="utf-8"?>
<math xmlns="http://www.w3.org/1998/Math/MathML" display="block">
  <semantics>
    <mover accent="true">
      <mi>v</mi>
      <mo stretchy="false">¯</mo>
    </mover>
    <annotation encoding="StarMath 5.0">bar v</annotation>
  </semantics>
</math>
</file>

<file path=Object 3/content.xml><?xml version="1.0" encoding="utf-8"?>
<math xmlns="http://www.w3.org/1998/Math/MathML" display="block">
  <semantics>
    <mi>d</mi>
    <annotation encoding="StarMath 5.0">d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sub>
      <mi>v</mi>
      <mi>f</mi>
    </msub>
    <annotation encoding="StarMath 5.0">v_f</annotation>
  </semantics>
</math>
</file>

<file path=Object 6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8/content.xml><?xml version="1.0" encoding="utf-8"?>
<math xmlns="http://www.w3.org/1998/Math/MathML" display="block">
  <semantics>
    <msub>
      <mi>v</mi>
      <mi>f</mi>
    </msub>
    <annotation encoding="StarMath 5.0">v_f</annotation>
  </semantics>
</math>
</file>

<file path=Object 9/content.xml><?xml version="1.0" encoding="utf-8"?>
<math xmlns="http://www.w3.org/1998/Math/MathML" display="block">
  <semantics>
    <mrow>
      <mtext>m</mtext>
      <mo stretchy="false">/</mo>
      <msup>
        <mtext>s</mtext>
        <mn>2</mn>
      </msup>
    </mrow>
    <annotation encoding="StarMath 5.0">"m" / "s" ^ 2</annotation>
  </semantics>
</math>
</file>
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A0000021ABABF00B0.png" manifest:media-type="image/png"/>
  <manifest:file-entry manifest:full-path="Pictures/100000010000030B00000104898129F1.png" manifest:media-type="image/png"/>
  <manifest:file-entry manifest:full-path="Pictures/1000000100000240000001D435BF91D0.png" manifest:media-type="image/png"/>
  <manifest:file-entry manifest:full-path="Pictures/100000010000019100000148EFA46A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d7fa6d" officeooo:paragraph-rsid="00d7fa6d"/>
    </style:style>
    <style:style style:name="P2" style:family="paragraph" style:parent-style-name="Text_20_body">
      <style:paragraph-properties fo:text-align="center" style:justify-single-word="false"/>
      <style:text-properties fo:font-style="normal" officeooo:rsid="009dd8e0" officeooo:paragraph-rsid="009dd8e0" style:font-style-asian="normal" style:font-style-complex="normal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Heading_20_1" style:list-style-name="">
      <style:text-properties officeooo:rsid="004c7a21" officeooo:paragraph-rsid="004c7a21"/>
    </style:style>
    <style:style style:name="P5" style:family="paragraph" style:parent-style-name="Heading_20_1">
      <style:paragraph-properties fo:break-before="page"/>
      <style:text-properties officeooo:rsid="00d7fa6d" officeooo:paragraph-rsid="00d7fa6d"/>
    </style:style>
    <style:style style:name="P6" style:family="paragraph" style:parent-style-name="Text_20_body">
      <style:text-properties fo:font-weight="bold" officeooo:rsid="00d7fa6d" officeooo:paragraph-rsid="00d9fcf1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d9fcf1" officeooo:paragraph-rsid="00d9fcf1" style:font-weight-asian="normal" style:font-weight-complex="normal"/>
    </style:style>
    <style:style style:name="P8" style:family="paragraph" style:parent-style-name="Heading_20_1">
      <style:text-properties officeooo:rsid="00da6a5a" officeooo:paragraph-rsid="00da6a5a"/>
    </style:style>
    <style:style style:name="P9" style:family="paragraph" style:parent-style-name="Text_20_body">
      <style:paragraph-properties fo:text-align="start" style:justify-single-word="false"/>
      <style:text-properties fo:font-style="italic" officeooo:paragraph-rsid="00ed37d2" style:font-style-asian="italic" style:font-style-complex="italic"/>
    </style:style>
    <style:style style:name="P10" style:family="paragraph" style:parent-style-name="Text_20_body">
      <style:text-properties fo:font-weight="bold" officeooo:rsid="00da6a5a" officeooo:paragraph-rsid="00da6a5a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db1c43" officeooo:paragraph-rsid="00da6a5a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e14120" officeooo:paragraph-rsid="00e14120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weight="normal" officeooo:rsid="00e14120" officeooo:paragraph-rsid="00e14120" style:font-weight-asian="normal" style:font-weight-complex="normal"/>
    </style:style>
    <style:style style:name="T1" style:family="text">
      <style:text-properties officeooo:rsid="00d7fa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8a6c0" style:font-weight-asian="normal" style:font-weight-complex="normal"/>
    </style:style>
    <style:style style:name="T4" style:family="text">
      <style:text-properties fo:font-weight="normal" officeooo:rsid="00d9fcf1" style:font-weight-asian="normal" style:font-weight-complex="normal"/>
    </style:style>
    <style:style style:name="T5" style:family="text">
      <style:text-properties officeooo:rsid="00ed37d2"/>
    </style:style>
    <style:style style:name="T6" style:family="text">
      <style:text-properties officeooo:rsid="002feec6"/>
    </style:style>
    <style:style style:name="T7" style:family="text">
      <style:text-properties officeooo:rsid="002900b4"/>
    </style:style>
    <style:style style:name="T8" style:family="text">
      <style:text-properties fo:font-weight="normal" officeooo:rsid="00db1c43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raction<text:bookmark-start text:name="__DdeLink__138_391587487"/><text:bookmark-start text:name="__DdeLink__502_3041763869"/></text:p>
      <text:p text:style-name="P2">May <text:span text:style-name="T1">12</text:span>, 202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27_4069653955" office:name="­" text:style-name="Index_20_Link" text:visited-style-name="Index_20_Link">­<text:tab/>1</text:a></text:p>
          <text:p text:style-name="P3"><text:a xlink:type="simple" xlink:href="#__RefHeading___Toc377_489150173" office:name="Diffraction of a Wave" text:style-name="Index_20_Link" text:visited-style-name="Index_20_Link">Diffraction of a Wave<text:tab/>2</text:a></text:p>
          <text:p text:style-name="P3"><text:a xlink:type="simple" xlink:href="#__RefHeading___Toc590_3765879464" office:name="Young’s Double-Slit Experiment" text:style-name="Index_20_Link" text:visited-style-name="Index_20_Link">Young’s Double-Slit Experiment<text:tab/>3</text:a></text:p>
          <text:p text:style-name="P3"><text:a xlink:type="simple" xlink:href="#__RefHeading___Toc592_3765879464" office:name="Polarization" text:style-name="Index_20_Link" text:visited-style-name="Index_20_Link">Polarization<text:tab/>3</text:a></text:p>
        </text:index-body>
      </text:table-of-content>
      <text:h text:style-name="P4" text:outline-level="1"><text:bookmark-start text:name="__RefHeading___Toc627_4069653955"/>­<text:bookmark-end text:name="__RefHeading___Toc627_4069653955"/></text:h>
      <text:h text:style-name="P5" text:outline-level="1"><text:bookmark-end text:name="__DdeLink__138_391587487"/><text:bookmark-end text:name="__DdeLink__502_3041763869"/><text:bookmark-start text:name="__RefHeading___Toc377_489150173"/>Diffraction of a Wave<text:bookmark-end text:name="__RefHeading___Toc377_489150173"/></text:h>
      <text:p text:style-name="P6">Diffraction <text:span text:style-name="T2">refers to the spreading of wave fronts into a region behind a barrier in the path of a wave. </text:span><text:span text:style-name="T3">This is a property that exists on all waves. </text:span><text:span text:style-name="T4">Since light is also a wave, diffraction also occurs on it.</text:span></text:p>
      <text:p text:style-name="P7"><draw:frame draw:style-name="fr1" draw:name="Frame5" text:anchor-type="as-char" svg:width="4.0165in" style:rel-width="58%" svg:height="3.7516in" style:rel-height="scale-min" draw:z-index="0"><draw:text-box><text:p text:style-name="Figure"><draw:frame draw:style-name="fr2" draw:name="Image1 Copy 1" text:anchor-type="paragraph" svg:width="4.0165in" style:rel-width="100%" svg:height="3.2846in" style:rel-height="scale" draw:z-index="1"><draw:image xlink:href="Pictures/100000010000019100000148EFA46A86.png" xlink:type="simple" xlink:show="embed" xlink:actuate="onLoad" draw:mime-type="image/png"/></draw:frame>Figure <text:sequence text:ref-name="refFigure0" text:name="Figure" text:formula="ooow:Figure+1" style:num-format="1">1</text:sequence>: The pattern that appears when diffraction occurs on a wave.</text:p></draw:text-box></draw:frame></text:p>
      <text:p text:style-name="P7"><draw:frame draw:style-name="fr3" draw:name="Frame1" text:anchor-type="paragraph" svg:width="4.5016in" style:rel-width="65%" svg:height="4.1228in" style:rel-height="scale-min" draw:z-index="2"><draw:text-box><text:p text:style-name="Figure"><draw:frame draw:style-name="fr2" draw:name="Image2 Copy 1" text:anchor-type="paragraph" svg:width="4.5016in" style:rel-width="100%" svg:height="3.6563in" style:rel-height="scale" draw:z-index="3"><draw:image xlink:href="Pictures/1000000100000240000001D435BF91D0.png" xlink:type="simple" xlink:show="embed" xlink:actuate="onLoad" draw:mime-type="image/png"/></draw:frame>Figure <text:sequence text:ref-name="refFigure1" text:name="Figure" text:formula="ooow:Figure+1" style:num-format="1">2</text:sequence>: Light waves diffracting over a barrier and engaging in interference.</text:p></draw:text-box></draw:frame></text:p>
      <text:h text:style-name="P8" text:outline-level="1"><text:bookmark-start text:name="__RefHeading___Toc590_3765879464"/><text:soft-page-break/>Young’s Double-Slit Experiment<text:span text:style-name="T5">*</text:span><text:bookmark-end text:name="__RefHeading___Toc590_3765879464"/></text:h>
      <text:p text:style-name="P9">(This <text:span text:style-name="T6">idea or </text:span>topic is <text:span text:style-name="T5">excluded in </text:span>the new <text:span text:style-name="T7">Physical Science: Physics course.</text:span>)</text:p>
      <text:p text:style-name="P10">Young’s double-slit experiment<text:span text:style-name="T2"> proved that light behaves like a wave due to its properties of diffraction.</text:span></text:p>
      <text:h text:style-name="P8" text:outline-level="1"><text:bookmark-start text:name="__RefHeading___Toc592_3765879464"/>Polarization<text:bookmark-end text:name="__RefHeading___Toc592_3765879464"/></text:h>
      <text:p text:style-name="P10">Polarization<text:span text:style-name="T2"> is the phenomenon in which waves of light or other radiation are restricted in direction of vibration. It is essentially the </text:span>filtering of light<text:span text:style-name="T2"> by direction. </text:span><text:span text:style-name="T8">Recall that light is electromagnetic, so the oscillations of the medium particles are perpendicular to the direction of the wave.</text:span></text:p>
      <text:p text:style-name="P11"><draw:frame draw:style-name="fr1" draw:name="Frame2" text:anchor-type="as-char" svg:width="6.9252in" style:rel-width="100%" svg:height="2.5854in" style:rel-height="scale-min" draw:z-index="4"><draw:text-box><text:p text:style-name="Figure"><draw:frame draw:style-name="fr2" draw:name="Image3 Copy 1" text:anchor-type="paragraph" svg:width="6.9252in" style:rel-width="100%" svg:height="2.3102in" style:rel-height="scale" draw:z-index="5"><draw:image xlink:href="Pictures/100000010000030B00000104898129F1.png" xlink:type="simple" xlink:show="embed" xlink:actuate="onLoad" draw:mime-type="image/png"/></draw:frame>Figure <text:sequence text:ref-name="refFigure2" text:name="Figure" text:formula="ooow:Figure+1" style:num-format="1">3</text:sequence>: A visualization of light polarization.</text:p></draw:text-box></draw:frame></text:p>
      <text:p text:style-name="P12">A common analogy is the <text:span text:style-name="T9">picket fence analogy</text:span>. When the pickets of two aligned fences are in the vertical direction, a vertical wave can make it through both fences. However, if the pickets of the second fence were horizontal, vertical vibrations will be unable to pass through the second fence.</text:p>
      <text:p text:style-name="P13"><text:soft-page-break/><draw:frame draw:style-name="fr1" draw:name="Frame3" text:anchor-type="as-char" svg:width="2.9083in" style:rel-width="42%" svg:height="3.5571in" style:rel-height="scale-min" draw:z-index="6"><draw:text-box><text:p text:style-name="Figure"><draw:frame draw:style-name="fr2" draw:name="Image4" text:anchor-type="paragraph" svg:width="2.9083in" style:rel-width="100%" svg:height="3.0902in" style:rel-height="scale" draw:z-index="7"><draw:image xlink:href="Pictures/10000001000001FA0000021ABABF00B0.png" xlink:type="simple" xlink:show="embed" xlink:actuate="onLoad" draw:mime-type="image/png"/></draw:frame>Figure <text:sequence text:ref-name="refFigure3" text:name="Figure" text:formula="ooow:Figure+1" style:num-format="1">4</text:sequence>: An illustration of the picket fence analogy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063add9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19T23:22:56.573947752</dc:date>
    <meta:editing-duration>PT18H22M39S</meta:editing-duration>
    <meta:editing-cycles>150</meta:editing-cycles>
    <meta:generator>LibreOffice/25.8.5.2$Linux_X86_64 LibreOffice_project/580$Build-2</meta:generator>
    <meta:document-statistic meta:table-count="0" meta:image-count="4" meta:object-count="0" meta:page-count="4" meta:paragraph-count="23" meta:word-count="235" meta:character-count="1411" meta:non-whitespace-character-count="1196"/>
  </office:meta>
</office:document-meta>
</file>
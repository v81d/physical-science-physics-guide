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styles.xml" manifest:media-type="text/xml"/>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Pictures/10000001000001B10000016B0ABE23ED.png" manifest:media-type="image/png"/>
  <manifest:file-entry manifest:full-path="Pictures/100000010000019B0000013FF7FF809B.png" manifest:media-type="image/png"/>
  <manifest:file-entry manifest:full-path="Pictures/100000010000013200000131D7FAECCB.png" manifest:media-type="image/png"/>
  <manifest:file-entry manifest:full-path="Pictures/100000010000014D00000144AFE67B4B.png" manifest:media-type="image/png"/>
  <manifest:file-entry manifest:full-path="Pictures/100000010000021900000166FD05574E.png" manifest:media-type="image/png"/>
  <manifest:file-entry manifest:full-path="Pictures/10000001000000FE000000FF374236D1.png" manifest:media-type="image/png"/>
  <manifest:file-entry manifest:full-path="Pictures/10000001000000EC000001029C255601.png" manifest:media-type="image/png"/>
  <manifest:file-entry manifest:full-path="Pictures/100000010000019800000160A1A6C0FF.png" manifest:media-type="image/png"/>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meta.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0e81740" officeooo:paragraph-rsid="00e81740"/>
    </style:style>
    <style:style style:name="P2" style:family="paragraph" style:parent-style-name="Text_20_body">
      <style:paragraph-properties fo:text-align="center" style:justify-single-word="false"/>
      <style:text-properties fo:font-style="normal" officeooo:rsid="009dd8e0" officeooo:paragraph-rsid="009dd8e0"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text-properties officeooo:rsid="004c7a21" officeooo:paragraph-rsid="004c7a21"/>
    </style:style>
    <style:style style:name="P6" style:family="paragraph" style:parent-style-name="Heading_20_1">
      <style:paragraph-properties fo:break-before="page"/>
      <style:text-properties officeooo:rsid="00e81740" officeooo:paragraph-rsid="00e81740"/>
    </style:style>
    <style:style style:name="P7" style:family="paragraph" style:parent-style-name="Text_20_body">
      <style:text-properties officeooo:rsid="00e81740" officeooo:paragraph-rsid="00e81740"/>
    </style:style>
    <style:style style:name="P8" style:family="paragraph" style:parent-style-name="Text_20_body">
      <style:paragraph-properties fo:text-align="center" style:justify-single-word="false"/>
      <style:text-properties fo:font-weight="normal" officeooo:rsid="00ec91f6" officeooo:paragraph-rsid="00e81740" style:font-weight-asian="normal" style:font-weight-complex="normal"/>
    </style:style>
    <style:style style:name="P9" style:family="paragraph" style:parent-style-name="Heading_20_1">
      <style:text-properties officeooo:rsid="00ee2618" officeooo:paragraph-rsid="00ee2618"/>
    </style:style>
    <style:style style:name="P10" style:family="paragraph" style:parent-style-name="Text_20_body">
      <style:text-properties fo:font-weight="bold" officeooo:rsid="00ee2618" officeooo:paragraph-rsid="00ee2618" style:font-weight-asian="bold" style:font-weight-complex="bold"/>
    </style:style>
    <style:style style:name="P11" style:family="paragraph" style:parent-style-name="Text_20_body">
      <style:paragraph-properties fo:text-align="center" style:justify-single-word="false"/>
      <style:text-properties fo:font-weight="normal" officeooo:rsid="00ee2618" officeooo:paragraph-rsid="00ee2618" style:font-weight-asian="normal" style:font-weight-complex="normal"/>
    </style:style>
    <style:style style:name="P12" style:family="paragraph" style:parent-style-name="Text_20_body">
      <style:paragraph-properties fo:text-align="start" style:justify-single-word="false"/>
      <style:text-properties fo:font-weight="normal" officeooo:rsid="00ee2618" officeooo:paragraph-rsid="00ee2618" style:font-weight-asian="normal" style:font-weight-complex="normal"/>
    </style:style>
    <style:style style:name="P13" style:family="paragraph" style:parent-style-name="Text_20_body">
      <style:text-properties officeooo:rsid="00ef6389" officeooo:paragraph-rsid="00ef6389"/>
    </style:style>
    <style:style style:name="P14" style:family="paragraph" style:parent-style-name="Text_20_body">
      <style:paragraph-properties fo:text-align="center" style:justify-single-word="false"/>
    </style:style>
    <style:style style:name="P15" style:family="paragraph" style:parent-style-name="Heading_20_2">
      <style:text-properties officeooo:rsid="00f13ea4" officeooo:paragraph-rsid="00f13ea4"/>
    </style:style>
    <style:style style:name="P16" style:family="paragraph" style:parent-style-name="Heading_20_2">
      <style:text-properties officeooo:rsid="00f43f13" officeooo:paragraph-rsid="00f43f13"/>
    </style:style>
    <style:style style:name="P17" style:family="paragraph" style:parent-style-name="Text_20_body">
      <style:text-properties officeooo:rsid="00f43f13" officeooo:paragraph-rsid="00f43f13"/>
    </style:style>
    <style:style style:name="P18" style:family="paragraph" style:parent-style-name="Text_20_body">
      <style:paragraph-properties fo:text-align="center" style:justify-single-word="false"/>
      <style:text-properties officeooo:paragraph-rsid="00f43f13"/>
    </style:style>
    <style:style style:name="P19" style:family="paragraph" style:parent-style-name="Heading_20_2">
      <style:text-properties officeooo:rsid="00f52afd" officeooo:paragraph-rsid="00f52afd"/>
    </style:style>
    <style:style style:name="P20" style:family="paragraph" style:parent-style-name="Text_20_body">
      <style:paragraph-properties fo:text-align="start" style:justify-single-word="false"/>
      <style:text-properties officeooo:rsid="00f52afd" officeooo:paragraph-rsid="00f52afd"/>
    </style:style>
    <style:style style:name="P21" style:family="paragraph" style:parent-style-name="Text_20_body">
      <style:paragraph-properties fo:text-align="center" style:justify-single-word="false"/>
      <style:text-properties fo:font-weight="normal" officeooo:rsid="00f52afd" officeooo:paragraph-rsid="00f52afd" style:font-weight-asian="normal" style:font-weight-complex="normal"/>
    </style:style>
    <style:style style:name="P22" style:family="paragraph" style:parent-style-name="Text_20_body">
      <style:paragraph-properties fo:text-align="start" style:justify-single-word="false"/>
      <style:text-properties fo:font-weight="normal" officeooo:rsid="00f52afd" officeooo:paragraph-rsid="00f52afd" style:font-weight-asian="normal" style:font-weight-complex="normal"/>
    </style:style>
    <style:style style:name="P23" style:family="paragraph" style:parent-style-name="Text_20_body">
      <style:text-properties officeooo:rsid="00f52afd" officeooo:paragraph-rsid="00f52afd"/>
    </style:style>
    <style:style style:name="P24" style:family="paragraph" style:parent-style-name="Text_20_body">
      <style:paragraph-properties fo:text-align="center" style:justify-single-word="false"/>
      <style:text-properties officeooo:rsid="00f52afd" officeooo:paragraph-rsid="00f52afd"/>
    </style:style>
    <style:style style:name="P25" style:family="paragraph" style:parent-style-name="Text_20_body">
      <style:paragraph-properties fo:text-align="start" style:justify-single-word="false"/>
      <style:text-properties officeooo:rsid="00f70521" officeooo:paragraph-rsid="00f70521"/>
    </style:style>
    <style:style style:name="P26" style:family="paragraph" style:parent-style-name="Text_20_body">
      <style:paragraph-properties fo:text-align="start" style:justify-single-word="false"/>
      <style:text-properties officeooo:rsid="00fba306" officeooo:paragraph-rsid="00fba306"/>
    </style:style>
    <style:style style:name="P27" style:family="paragraph" style:parent-style-name="Heading_20_1">
      <style:text-properties officeooo:rsid="00fa387d" officeooo:paragraph-rsid="00fa387d"/>
    </style:style>
    <style:style style:name="P28" style:family="paragraph" style:parent-style-name="Text_20_body" style:list-style-name="L1">
      <style:text-properties officeooo:rsid="00fa387d" officeooo:paragraph-rsid="00fa387d"/>
    </style:style>
    <style:style style:name="P29" style:family="paragraph" style:parent-style-name="Text_20_body" style:list-style-name="L1">
      <style:paragraph-properties fo:text-align="center" style:justify-single-word="false"/>
      <style:text-properties officeooo:rsid="00fa387d" officeooo:paragraph-rsid="00fa387d"/>
    </style:style>
    <style:style style:name="T1" style:family="text">
      <style:text-properties officeooo:rsid="00d7fa6d"/>
    </style:style>
    <style:style style:name="T2" style:family="text">
      <style:text-properties officeooo:rsid="00e81740"/>
    </style:style>
    <style:style style:name="T3" style:family="text">
      <style:text-properties officeooo:rsid="00e9f7be"/>
    </style:style>
    <style:style style:name="T4" style:family="text">
      <style:text-properties officeooo:rsid="00eb0bff"/>
    </style:style>
    <style:style style:name="T5" style:family="text">
      <style:text-properties officeooo:rsid="00ec91f6"/>
    </style:style>
    <style:style style:name="T6" style:family="text">
      <style:text-properties fo:font-weight="bold" officeooo:rsid="00ec91f6" style:font-weight-asian="bold" style:font-weight-complex="bold"/>
    </style:style>
    <style:style style:name="T7" style:family="text">
      <style:text-properties fo:font-weight="normal" officeooo:rsid="00ec91f6" style:font-weight-asian="normal" style:font-weight-complex="normal"/>
    </style:style>
    <style:style style:name="T8" style:family="text">
      <style:text-properties fo:font-weight="normal" style:font-weight-asian="normal" style:font-weight-complex="normal"/>
    </style:style>
    <style:style style:name="T9" style:family="text">
      <style:text-properties officeooo:rsid="00ee2618"/>
    </style:style>
    <style:style style:name="T10" style:family="text">
      <style:text-properties officeooo:rsid="00ef6389"/>
    </style:style>
    <style:style style:name="T11" style:family="text">
      <style:text-properties fo:font-weight="bold" style:font-weight-asian="bold" style:font-weight-complex="bold"/>
    </style:style>
    <style:style style:name="T12" style:family="text">
      <style:text-properties fo:font-weight="normal" officeooo:rsid="00f52afd" style:font-weight-asian="normal" style:font-weight-complex="normal"/>
    </style:style>
    <style:style style:name="T13" style:family="text">
      <style:text-properties officeooo:rsid="00f43f1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ometric Optics<text:bookmark-start text:name="__DdeLink__502_3041763869"/><text:bookmark-start text:name="__DdeLink__138_391587487"/></text:p>
      <text:p text:style-name="P2">May <text:span text:style-name="T1">1</text:span><text:span text:style-name="T2">3</text:span>,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276_1421335070" office:name="Plane Mirrors" text:style-name="Index_20_Link" text:visited-style-name="Index_20_Link">Plane Mirrors<text:tab/>2</text:a></text:p>
          <text:p text:style-name="P3"><text:a xlink:type="simple" xlink:href="#__RefHeading___Toc278_1421335070" office:name="Concave and Convex Mirrors" text:style-name="Index_20_Link" text:visited-style-name="Index_20_Link">Concave and Convex Mirrors<text:tab/>2</text:a></text:p>
          <text:p text:style-name="P4"><text:a xlink:type="simple" xlink:href="#__RefHeading___Toc280_1421335070" office:name="Radius of Curvature and Focal Length" text:style-name="Index_20_Link" text:visited-style-name="Index_20_Link">Radius of Curvature and Focal Length<text:tab/>3</text:a></text:p>
          <text:p text:style-name="P4"><text:a xlink:type="simple" xlink:href="#__RefHeading___Toc282_1421335070" office:name="Reflections on Concave Mirrors" text:style-name="Index_20_Link" text:visited-style-name="Index_20_Link">Reflections on Concave Mirrors<text:tab/>4</text:a></text:p>
          <text:p text:style-name="P4"><text:a xlink:type="simple" xlink:href="#__RefHeading___Toc15283_1175297884" office:name="Reflections on Convex Mirrors" text:style-name="Index_20_Link" text:visited-style-name="Index_20_Link">Reflections on Convex Mirrors<text:tab/>5</text:a></text:p>
          <text:p text:style-name="P4"><text:a xlink:type="simple" xlink:href="#__RefHeading___Toc15285_1175297884" office:name="Calculating Focal Length" text:style-name="Index_20_Link" text:visited-style-name="Index_20_Link">Calculating Focal Length<text:tab/>5</text:a></text:p>
          <text:p text:style-name="P4"><text:a xlink:type="simple" xlink:href="#__RefHeading___Toc15287_1175297884" office:name="Calculating Magnification" text:style-name="Index_20_Link" text:visited-style-name="Index_20_Link">Calculating Magnification<text:tab/>5</text:a></text:p>
          <text:p text:style-name="P3"><text:a xlink:type="simple" xlink:href="#__RefHeading___Toc15289_1175297884" office:name="Examples and Applications" text:style-name="Index_20_Link" text:visited-style-name="Index_20_Link">Examples and Applications<text:tab/>6</text:a></text:p>
        </text:index-body>
      </text:table-of-content>
      <text:h text:style-name="P5" text:outline-level="1"><text:bookmark-start text:name="__RefHeading___Toc627_4069653955"/>­<text:bookmark-end text:name="__RefHeading___Toc627_4069653955"/></text:h>
      <text:h text:style-name="P6" text:outline-level="1"><text:bookmark-end text:name="__DdeLink__502_3041763869"/><text:bookmark-end text:name="__DdeLink__138_391587487"/><text:bookmark-start text:name="__RefHeading___Toc276_1421335070"/>Plane Mirrors<text:bookmark-end text:name="__RefHeading___Toc276_1421335070"/></text:h>
      <text:p text:style-name="P7">Plane mirrors have a flat surface and reflect rays with equal angles of incidence and reflection. <text:span text:style-name="T3">If all rays were extended backward behind the mirror, they would intersect at one point representing the image of the </text:span><text:span text:style-name="T4">original point. </text:span><text:span text:style-name="T5">To an observer, the rays appear to come from the image at that point, but no source is there and no rays actually converge there. Thus, the image at that point is a </text:span><text:span text:style-name="T6">virtual image</text:span><text:span text:style-name="T7">.</text:span></text:p>
      <text:p text:style-name="P8"><draw:frame draw:style-name="fr1" draw:name="Frame1" text:anchor-type="as-char" svg:width="4.2492in" draw:z-index="0"><draw:text-box fo:min-height="3.6661in"><text:p text:style-name="Figure"><draw:frame draw:style-name="fr2" draw:name="Image1" text:anchor-type="paragraph" svg:width="4.2492in" style:rel-width="100%" svg:height="3.6661in" style:rel-height="scale" draw:z-index="1"><draw:image xlink:href="Pictures/100000010000019800000160A1A6C0FF.png" xlink:type="simple" xlink:show="embed" xlink:actuate="onLoad" draw:mime-type="image/png"/></draw:frame>Figure <text:sequence text:ref-name="refFigure0" text:name="Figure" text:formula="ooow:Figure+1" style:num-format="1">1</text:sequence>: The reflection of an object at point P can be seen by the observer due to the existence of an imaginary virtual image.</text:p></draw:text-box></draw:frame></text:p>
      <text:h text:style-name="P9" text:outline-level="1"><text:bookmark-start text:name="__RefHeading___Toc278_1421335070"/>Concave and Convex Mirrors<text:bookmark-end text:name="__RefHeading___Toc278_1421335070"/></text:h>
      <text:p text:style-name="P10">Concave<text:span text:style-name="T8"> and </text:span>convex mirrors<text:span text:style-name="T8"> are curved mirrors similar to portions of a sphere.</text:span></text:p>
      <text:p text:style-name="P11"><text:soft-page-break/><draw:frame draw:style-name="fr1" draw:name="Frame2" text:anchor-type="as-char" svg:width="2.0244in" draw:z-index="2"><draw:text-box fo:min-height="2.2134in"><text:p text:style-name="Figure"><draw:frame draw:style-name="fr2" draw:name="Image2" text:anchor-type="paragraph" svg:width="2.0244in" style:rel-width="100%" svg:height="2.2134in" style:rel-height="scale" draw:z-index="3"><draw:image xlink:href="Pictures/10000001000000EC000001029C255601.png" xlink:type="simple" xlink:show="embed" xlink:actuate="onLoad" draw:mime-type="image/png"/></draw:frame>Figure <text:sequence text:ref-name="refFigure1" text:name="Figure" text:formula="ooow:Figure+1" style:num-format="1">2</text:sequence>: Concave mirrors reflect light from their inner surface, like the inside of a spoon.</text:p></draw:text-box></draw:frame><draw:frame draw:style-name="fr1" draw:name="Frame3" text:anchor-type="as-char" svg:width="2.1953in" draw:z-index="4"><draw:text-box fo:min-height="2.2043in"><text:p text:style-name="Figure"><draw:frame draw:style-name="fr2" draw:name="Image3" text:anchor-type="paragraph" svg:width="2.1953in" style:rel-width="100%" svg:height="2.2043in" style:rel-height="scale" draw:z-index="5"><draw:image xlink:href="Pictures/10000001000000FE000000FF374236D1.png" xlink:type="simple" xlink:show="embed" xlink:actuate="onLoad" draw:mime-type="image/png"/></draw:frame>Figure <text:sequence text:ref-name="refFigure2" text:name="Figure" text:formula="ooow:Figure+1" style:num-format="1">3</text:sequence>: Convex mirrors reflect light from their outer surface, <text:span text:style-name="T9">similar to</text:span> the outside of a spoon.</text:p></draw:text-box></draw:frame></text:p>
      <text:p text:style-name="P12">Most lenses and mirrors have at least some curvature. Convex lenses and mirorrs are shaped like an oval and bulge out in the middle. On the other hand, concave lenses and mirrors get sucked into the middle and look like an hourglass.</text:p>
      <text:h text:style-name="Heading_20_2" text:outline-level="2"><text:bookmark-start text:name="__RefHeading___Toc280_1421335070"/>Radius of Curvature <text:span text:style-name="T10">and Focal Length</text:span><text:bookmark-end text:name="__RefHeading___Toc280_1421335070"/></text:h>
      <text:p text:style-name="P13">The <text:span text:style-name="T11">radius of curvature</text:span><text:span text:style-name="T8"> in a curved mirror is the distance from the lens to the center of the circle if the curve of the lens were extended to form a full circle.</text:span></text:p>
      <text:p text:style-name="P13"><text:span text:style-name="T8">The </text:span><text:span text:style-name="T11">focal length</text:span><text:span text:style-name="T8"> of a curved mirror is exactly half the radius of curvature </text:span><text:span text:style-name="T12">(</text:span><text:span text:style-name="T12"><draw:frame draw:style-name="fr3" draw:name="Object3" text:anchor-type="as-char" svg:y="-0.2445in" svg:width="0.4146in" svg:height="0.3953in" draw:z-index="18"><draw:object xlink:href="./Object 3" xlink:type="simple" xlink:show="embed" xlink:actuate="onLoad"/><draw:image xlink:href="./ObjectReplacements/Object 3" xlink:type="simple" xlink:show="embed" xlink:actuate="onLoad"/></draw:frame></text:span><text:span text:style-name="T12">, where </text:span><text:span text:style-name="T12"><draw:frame draw:style-name="fr3" draw:name="Object4" text:anchor-type="as-char" svg:y="-0.1492in" svg:width="0.122in" svg:height="0.1854in" draw:z-index="19"><draw:object xlink:href="./Object 4" xlink:type="simple" xlink:show="embed" xlink:actuate="onLoad"/><draw:image xlink:href="./ObjectReplacements/Object 4" xlink:type="simple" xlink:show="embed" xlink:actuate="onLoad"/></draw:frame></text:span><text:span text:style-name="T12"><text:s/>is the focal length and </text:span><text:span text:style-name="T12"><draw:frame draw:style-name="fr3" draw:name="Object5" text:anchor-type="as-char" svg:y="-0.1492in" svg:width="0.1181in" svg:height="0.1854in" draw:z-index="20"><draw:object xlink:href="./Object 5" xlink:type="simple" xlink:show="embed" xlink:actuate="onLoad"/><draw:image xlink:href="./ObjectReplacements/Object 5" xlink:type="simple" xlink:show="embed" xlink:actuate="onLoad"/></draw:frame></text:span><text:span text:style-name="T12"><text:s/>is the radius of curvature)</text:span><text:span text:style-name="T8">.</text:span></text:p>
      <text:p text:style-name="P14"><draw:frame draw:style-name="fr1" draw:name="Frame4" text:anchor-type="as-char" svg:width="4.448in" draw:z-index="6"><draw:text-box fo:min-height="2.9654in"><text:p text:style-name="Figure"><draw:frame draw:style-name="fr2" draw:name="Image4" text:anchor-type="paragraph" svg:width="4.448in" style:rel-width="100%" svg:height="2.9654in" style:rel-height="scale" draw:z-index="7"><draw:image xlink:href="Pictures/100000010000021900000166FD05574E.png" xlink:type="simple" xlink:show="embed" xlink:actuate="onLoad" draw:mime-type="image/png"/></draw:frame>Figure <text:sequence text:ref-name="refFigure3" text:name="Figure" text:formula="ooow:Figure+1" style:num-format="1">4</text:sequence>: Point C is the center of the circle, point F is the focal point, and segment CP is the radius of curvature.</text:p></draw:text-box></draw:frame></text:p>
      <text:h text:style-name="P15" text:outline-level="2"><text:bookmark-start text:name="__RefHeading___Toc282_1421335070"/><text:soft-page-break/><text:span text:style-name="T13">Reflections</text:span> o<text:span text:style-name="T13">n</text:span> Concave Mirrors<text:bookmark-end text:name="__RefHeading___Toc282_1421335070"/></text:h>
      <text:p text:style-name="P14"><draw:frame draw:style-name="fr1" draw:name="Frame5" text:anchor-type="as-char" svg:width="3.4681in" draw:z-index="8"><draw:text-box fo:min-height="3.3744in"><text:p text:style-name="Figure"><draw:frame draw:style-name="fr2" draw:name="Image5" text:anchor-type="paragraph" svg:width="3.4681in" style:rel-width="100%" svg:height="3.3744in" style:rel-height="scale" draw:z-index="9"><draw:image xlink:href="Pictures/100000010000014D00000144AFE67B4B.png" xlink:type="simple" xlink:show="embed" xlink:actuate="onLoad" draw:mime-type="image/png"/></draw:frame>Figure <text:sequence text:ref-name="refFigure4" text:name="Figure" text:formula="ooow:Figure+1" style:num-format="1">5</text:sequence>: The image formed when an object is placed beyond point C (the center of curvature) is located between C and F. It is a real, inverted image that is smaller in size than the object.</text:p></draw:text-box></draw:frame><draw:frame draw:style-name="fr1" draw:name="Frame6" text:anchor-type="as-char" svg:width="3.1866in" draw:z-index="10"><draw:text-box fo:min-height="3.1764in"><text:p text:style-name="Figure"><draw:frame draw:style-name="fr2" draw:name="Image6" text:anchor-type="paragraph" svg:width="3.1866in" style:rel-width="100%" svg:height="3.1764in" style:rel-height="scale" draw:z-index="11"><draw:image xlink:href="Pictures/100000010000013200000131D7FAECCB.png" xlink:type="simple" xlink:show="embed" xlink:actuate="onLoad" draw:mime-type="image/png"/></draw:frame>Figure <text:sequence text:ref-name="refFigure5" text:name="Figure" text:formula="ooow:Figure+1" style:num-format="1">6</text:sequence>: The image formed when an object is placed between points C and F is located beyond C. It is a real, inverted image that is larger in size than the object.</text:p></draw:text-box></draw:frame><draw:frame draw:style-name="fr1" draw:name="Frame7" text:anchor-type="as-char" svg:width="4.2807in" draw:z-index="12"><draw:text-box fo:min-height="3.322in"><text:p text:style-name="Figure"><draw:frame draw:style-name="fr2" draw:name="Image7" text:anchor-type="paragraph" svg:width="4.2807in" style:rel-width="100%" svg:height="3.322in" style:rel-height="scale" draw:z-index="13"><draw:image xlink:href="Pictures/100000010000019B0000013FF7FF809B.png" xlink:type="simple" xlink:show="embed" xlink:actuate="onLoad" draw:mime-type="image/png"/></draw:frame>Figure <text:sequence text:ref-name="refFigure6" text:name="Figure" text:formula="ooow:Figure+1" style:num-format="1">7</text:sequence>: The image formed when an object is placed in front of point F is located behind the mirror. It is a virtual, upright image that is larger in size than the object. It is virtual because it is formed only where light rights seem to be diverging from.</text:p></draw:text-box></draw:frame></text:p>
      <text:h text:style-name="P16" text:outline-level="2"><text:bookmark-start text:name="__RefHeading___Toc15283_1175297884"/><text:soft-page-break/>Reflections on Convex Mirrors<text:bookmark-end text:name="__RefHeading___Toc15283_1175297884"/></text:h>
      <text:p text:style-name="P17">When an object is placed in front of a convex mirror, a <text:span text:style-name="T8">virtual iamge will always be formed </text:span><text:span text:style-name="T11">behind the mirror</text:span><text:span text:style-name="T8">. The image will always be smaller and upright.</text:span></text:p>
      <text:p text:style-name="P18"><draw:frame draw:style-name="fr1" draw:name="Frame8" text:anchor-type="as-char" svg:width="4.5098in" draw:z-index="14"><draw:text-box fo:min-height="3.7807in"><text:p text:style-name="Figure"><draw:frame draw:style-name="fr2" draw:name="Image8" text:anchor-type="paragraph" svg:width="4.5098in" style:rel-width="100%" svg:height="3.7807in" style:rel-height="scale" draw:z-index="15"><draw:image xlink:href="Pictures/10000001000001B10000016B0ABE23ED.png" xlink:type="simple" xlink:show="embed" xlink:actuate="onLoad" draw:mime-type="image/png"/></draw:frame>Figure <text:sequence text:ref-name="refFigure7" text:name="Figure" text:formula="ooow:Figure+1" style:num-format="1">8</text:sequence>: The image formed by a convex mirror <text:span text:style-name="T13">(</text:span>no matter where the object is placed<text:span text:style-name="T13">)</text:span> will be virtual, upright, and smaller than the object. As the object is moved closer to the mirror, the <text:span text:style-name="T13">size of the </text:span>image will approach the size of the object.</text:p></draw:text-box></draw:frame></text:p>
      <text:h text:style-name="P19" text:outline-level="2"><text:bookmark-start text:name="__RefHeading___Toc15285_1175297884"/>Calculating Focal Length<text:bookmark-end text:name="__RefHeading___Toc15285_1175297884"/></text:h>
      <text:p text:style-name="P20">To calculate the <text:span text:style-name="T8">focal length given the distance to an object and the distance to that object’s image, use the formula:</text:span></text:p>
      <text:p text:style-name="P21"><draw:frame draw:style-name="fr3" draw:name="Object1" text:anchor-type="as-char" svg:y="-0.2445in" svg:width="0.7575in" svg:height="0.4201in" draw:z-index="16"><draw:object xlink:href="./Object 1" xlink:type="simple" xlink:show="embed" xlink:actuate="onLoad"/><draw:image xlink:href="./ObjectReplacements/Object 1" xlink:type="simple" xlink:show="embed" xlink:actuate="onLoad"/></draw:frame>,</text:p>
      <text:p text:style-name="P22">where <draw:frame draw:style-name="fr3" draw:name="Object2" text:anchor-type="as-char" svg:y="-0.1492in" svg:width="0.122in" svg:height="0.1854in" draw:z-index="17"><draw:object xlink:href="./Object 2" xlink:type="simple" xlink:show="embed" xlink:actuate="onLoad"/><draw:image xlink:href="./ObjectReplacements/Object 2" xlink:type="simple" xlink:show="embed" xlink:actuate="onLoad"/></draw:frame><text:s/>is the focal length, <draw:frame draw:style-name="fr3" draw:name="Object6" text:anchor-type="as-char" svg:y="-0.1492in" svg:width="0.1516in" svg:height="0.2102in" draw:z-index="21"><draw:object xlink:href="./Object 6" xlink:type="simple" xlink:show="embed" xlink:actuate="onLoad"/><draw:image xlink:href="./ObjectReplacements/Object 6" xlink:type="simple" xlink:show="embed" xlink:actuate="onLoad"/></draw:frame><text:s/>is the distance to the object, and <draw:frame draw:style-name="fr3" draw:name="Object7" text:anchor-type="as-char" svg:y="-0.1492in" svg:width="0.1272in" svg:height="0.2102in" draw:z-index="22"><draw:object xlink:href="./Object 7" xlink:type="simple" xlink:show="embed" xlink:actuate="onLoad"/><draw:image xlink:href="./ObjectReplacements/Object 7" xlink:type="simple" xlink:show="embed" xlink:actuate="onLoad"/></draw:frame><text:s/>is the distance to the image.</text:p>
      <text:h text:style-name="P19" text:outline-level="2"><text:bookmark-start text:name="__RefHeading___Toc15287_1175297884"/>Calculating Magnification<text:bookmark-end text:name="__RefHeading___Toc15287_1175297884"/></text:h>
      <text:p text:style-name="P23">To calculate the <text:span text:style-name="T11">magnification</text:span> of an object in a curved mirror, use:</text:p>
      <text:p text:style-name="P24"><draw:frame draw:style-name="fr3" draw:name="Object8" text:anchor-type="as-char" svg:y="-0.2693in" svg:width="0.6307in" svg:height="0.4453in" draw:z-index="23"><draw:object xlink:href="./Object 8" xlink:type="simple" xlink:show="embed" xlink:actuate="onLoad"/><draw:image xlink:href="./ObjectReplacements/Object 8" xlink:type="simple" xlink:show="embed" xlink:actuate="onLoad"/></draw:frame>,</text:p>
      <text:p text:style-name="P25">where <draw:frame draw:style-name="fr3" draw:name="Object9" text:anchor-type="as-char" svg:y="-0.1492in" svg:width="0.1193in" svg:height="0.2102in" draw:z-index="24"><draw:object xlink:href="./Object 9" xlink:type="simple" xlink:show="embed" xlink:actuate="onLoad"/><draw:image xlink:href="./ObjectReplacements/Object 9" xlink:type="simple" xlink:show="embed" xlink:actuate="onLoad"/></draw:frame><text:s/>is the height of the image, <draw:frame draw:style-name="fr3" draw:name="Object10" text:anchor-type="as-char" svg:y="-0.1492in" svg:width="0.1437in" svg:height="0.2102in" draw:z-index="25"><draw:object xlink:href="./Object 10" xlink:type="simple" xlink:show="embed" xlink:actuate="onLoad"/><draw:image xlink:href="./ObjectReplacements/Object 10" xlink:type="simple" xlink:show="embed" xlink:actuate="onLoad"/></draw:frame><text:s/>is the height of the object, <draw:frame draw:style-name="fr3" draw:name="Object11" text:anchor-type="as-char" svg:y="-0.1492in" svg:width="0.1272in" svg:height="0.2102in" draw:z-index="26"><draw:object xlink:href="./Object 11" xlink:type="simple" xlink:show="embed" xlink:actuate="onLoad"/><draw:image xlink:href="./ObjectReplacements/Object 11" xlink:type="simple" xlink:show="embed" xlink:actuate="onLoad"/></draw:frame><text:s/>is the distance to the image, and <draw:frame draw:style-name="fr3" draw:name="Object12" text:anchor-type="as-char" svg:y="-0.1492in" svg:width="0.1516in" svg:height="0.2102in" draw:z-index="27"><draw:object xlink:href="./Object 12" xlink:type="simple" xlink:show="embed" xlink:actuate="onLoad"/><draw:image xlink:href="./ObjectReplacements/Object 12" xlink:type="simple" xlink:show="embed" xlink:actuate="onLoad"/></draw:frame><text:s/>is the distance to the object.</text:p>
      <text:p text:style-name="P26"><text:soft-page-break/>Magnification is defined as the ratio of the height of the image to the height of the object.</text:p>
      <text:h text:style-name="P27" text:outline-level="1"><text:bookmark-start text:name="__RefHeading___Toc15289_1175297884"/>Examples and Applications<text:bookmark-end text:name="__RefHeading___Toc15289_1175297884"/></text:h>
      <text:list text:style-name="L1">
        <text:list-item>
          <text:p text:style-name="P28">A <draw:frame draw:style-name="fr3" draw:name="Object13" text:anchor-type="as-char" svg:y="-0.1492in" svg:width="0.3701in" svg:height="0.1854in" draw:z-index="28"><draw:object xlink:href="./Object 13" xlink:type="simple" xlink:show="embed" xlink:actuate="onLoad"/><draw:image xlink:href="./ObjectReplacements/Object 13" xlink:type="simple" xlink:show="embed" xlink:actuate="onLoad"/></draw:frame><text:s/>high object is placed <draw:frame draw:style-name="fr3" draw:name="Object14" text:anchor-type="as-char" svg:y="-0.1492in" svg:width="0.3661in" svg:height="0.1854in" draw:z-index="29"><draw:object xlink:href="./Object 14" xlink:type="simple" xlink:show="embed" xlink:actuate="onLoad"/><draw:image xlink:href="./ObjectReplacements/Object 14" xlink:type="simple" xlink:show="embed" xlink:actuate="onLoad"/></draw:frame><text:s/>from a concave mirror whose radius of curvature is <draw:frame draw:style-name="fr3" draw:name="Object15" text:anchor-type="as-char" svg:y="-0.1492in" svg:width="0.2917in" svg:height="0.1854in" draw:z-index="30"><draw:object xlink:href="./Object 15" xlink:type="simple" xlink:show="embed" xlink:actuate="onLoad"/><draw:image xlink:href="./ObjectReplacements/Object 15" xlink:type="simple" xlink:show="embed" xlink:actuate="onLoad"/></draw:frame><text:s/>meters. Calculate the distance to the image and its height.</text:p>
          <text:p text:style-name="P29"><draw:frame draw:style-name="fr3" draw:name="Object16" text:anchor-type="as-char" svg:y="-0.8555in" svg:width="1.3327in" svg:height="1.6783in" draw:z-index="31"><draw:object xlink:href="./Object 16" xlink:type="simple" xlink:show="embed" xlink:actuate="onLoad"/><draw:image xlink:href="./ObjectReplacements/Object 16" xlink:type="simple" xlink:show="embed" xlink:actuate="onLoad"/></draw:frame></text:p>
          <text:p text:style-name="P29"><draw:frame draw:style-name="fr3" draw:name="Object17" text:anchor-type="as-char" svg:y="-0.5618in" svg:width="1.0717in" svg:height="1.0909in" draw:z-index="32"><draw:object xlink:href="./Object 17" xlink:type="simple" xlink:show="embed" xlink:actuate="onLoad"/><draw:image xlink:href="./ObjectReplacements/Object 17" xlink:type="simple" xlink:show="embed" xlink:actuate="onLoad"/></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063add9"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09T21:03:09.405111013</dc:date>
    <meta:editing-duration>PT19H15M55S</meta:editing-duration>
    <meta:editing-cycles>160</meta:editing-cycles>
    <meta:generator>LibreOffice/25.8.5.2$Linux_X86_64 LibreOffice_project/580$Build-2</meta:generator>
    <meta:document-statistic meta:table-count="0" meta:image-count="8" meta:object-count="17" meta:page-count="6" meta:paragraph-count="50" meta:word-count="661" meta:character-count="3598" meta:non-whitespace-character-count="2969"/>
  </office:meta>
</office:document-meta>
</file>

<file path=Object 1/content.xml><?xml version="1.0" encoding="utf-8"?>
<math xmlns="http://www.w3.org/1998/Math/MathML" display="block">
  <semantics>
    <mrow>
      <mfrac>
        <mn>1</mn>
        <mi>F</mi>
      </mfrac>
      <mo stretchy="false">=</mo>
      <mrow>
        <mfrac>
          <mn>1</mn>
          <msub>
            <mi>d</mi>
            <mi>o</mi>
          </msub>
        </mfrac>
        <mo stretchy="false">+</mo>
        <mfrac>
          <mn>1</mn>
          <msub>
            <mi>d</mi>
            <mi>i</mi>
          </msub>
        </mfrac>
      </mrow>
    </mrow>
    <annotation encoding="StarMath 5.0">frac { 1 } { F } = { frac { 1 } { d_o } } + { frac { 1 } { d_i } }</annotation>
  </semantics>
</math>
</file>

<file path=Object 10/content.xml><?xml version="1.0" encoding="utf-8"?>
<math xmlns="http://www.w3.org/1998/Math/MathML" display="block">
  <semantics>
    <msub>
      <mi>h</mi>
      <mi>o</mi>
    </msub>
    <annotation encoding="StarMath 5.0">h_o</annotation>
  </semantics>
</math>
</file>

<file path=Object 11/content.xml><?xml version="1.0" encoding="utf-8"?>
<math xmlns="http://www.w3.org/1998/Math/MathML" display="block">
  <semantics>
    <msub>
      <mi>d</mi>
      <mi>i</mi>
    </msub>
    <annotation encoding="StarMath 5.0">d_i</annotation>
  </semantics>
</math>
</file>

<file path=Object 12/content.xml><?xml version="1.0" encoding="utf-8"?>
<math xmlns="http://www.w3.org/1998/Math/MathML" display="block">
  <semantics>
    <msub>
      <mi>d</mi>
      <mi>o</mi>
    </msub>
    <annotation encoding="StarMath 5.0">d_o</annotation>
  </semantics>
</math>
</file>

<file path=Object 13/content.xml><?xml version="1.0" encoding="utf-8"?>
<math xmlns="http://www.w3.org/1998/Math/MathML" display="block">
  <semantics>
    <mrow>
      <mn>2.0</mn>
      <mtext>m</mtext>
    </mrow>
    <annotation encoding="StarMath 5.0">2.0 "m"</annotation>
  </semantics>
</math>
</file>

<file path=Object 14/content.xml><?xml version="1.0" encoding="utf-8"?>
<math xmlns="http://www.w3.org/1998/Math/MathML" display="block">
  <semantics>
    <mrow>
      <mn>7.1</mn>
      <mtext>m</mtext>
    </mrow>
    <annotation encoding="StarMath 5.0">7.1 "m"</annotation>
  </semantics>
</math>
</file>

<file path=Object 15/content.xml><?xml version="1.0" encoding="utf-8"?>
<math xmlns="http://www.w3.org/1998/Math/MathML" display="block">
  <semantics>
    <mn>10.2</mn>
    <annotation encoding="StarMath 5.0">10.2</annotation>
  </semantics>
</math>
</file>

<file path=Object 16/content.xml><?xml version="1.0" encoding="utf-8"?>
<math xmlns="http://www.w3.org/1998/Math/MathML" display="block">
  <semantics>
    <mtable>
      <mtr>
        <mtd>
          <mrow>
            <mfrac>
              <mn>1</mn>
              <mi>F</mi>
            </mfrac>
            <mo stretchy="false">=</mo>
            <mrow>
              <mfrac>
                <mn>1</mn>
                <msub>
                  <mi>d</mi>
                  <mi>o</mi>
                </msub>
              </mfrac>
              <mo stretchy="false">+</mo>
              <mfrac>
                <mn>1</mn>
                <msub>
                  <mi>d</mi>
                  <mi>i</mi>
                </msub>
              </mfrac>
            </mrow>
          </mrow>
        </mtd>
      </mtr>
      <mtr>
        <mtd>
          <mrow>
            <mfrac>
              <mn>1</mn>
              <mfrac>
                <mrow>
                  <mn>10.2</mn>
                  <mtext>m</mtext>
                </mrow>
                <mn>2</mn>
              </mfrac>
            </mfrac>
            <mo stretchy="false">=</mo>
            <mrow>
              <mfrac>
                <mn>1</mn>
                <mrow>
                  <mn>7.1</mn>
                  <mtext>m</mtext>
                </mrow>
              </mfrac>
              <mo stretchy="false">+</mo>
              <mfrac>
                <mn>1</mn>
                <msub>
                  <mi>d</mi>
                  <mi>i</mi>
                </msub>
              </mfrac>
            </mrow>
          </mrow>
        </mtd>
      </mtr>
      <mtr>
        <mtd>
          <mrow>
            <mn>0.06</mn>
            <mo stretchy="false">≈</mo>
            <mfrac>
              <mn>1</mn>
              <msub>
                <mi>d</mi>
                <mi>i</mi>
              </msub>
            </mfrac>
          </mrow>
        </mtd>
      </mtr>
      <mtr>
        <mtd>
          <mrow>
            <mrow>
              <msub>
                <mi>d</mi>
                <mi>i</mi>
              </msub>
              <mo stretchy="false">≈</mo>
              <mn>18</mn>
            </mrow>
            <mtext>m</mtext>
          </mrow>
        </mtd>
      </mtr>
    </mtable>
    <annotation encoding="StarMath 5.0">frac { 1 } { F } = { frac { 1 } { d_o } } + { frac { 1 } { d_i } } newline
frac { 1 } { frac { 10.2 "m" } { 2 } } = { frac { 1 } { 7.1 "m" } } + { frac { 1 } { d_i } } newline
0.06 approx frac { 1 } { d_i } newline
d_i approx 18 "m"</annotation>
  </semantics>
</math>
</file>

<file path=Object 17/content.xml><?xml version="1.0" encoding="utf-8"?>
<math xmlns="http://www.w3.org/1998/Math/MathML" display="block">
  <semantics>
    <mtable>
      <mtr>
        <mtd>
          <mrow>
            <mfrac>
              <msub>
                <mi>h</mi>
                <mi>i</mi>
              </msub>
              <msub>
                <mi>h</mi>
                <mi>o</mi>
              </msub>
            </mfrac>
            <mo stretchy="false">=</mo>
            <mrow>
              <mo stretchy="false">−</mo>
              <mfrac>
                <msub>
                  <mi>d</mi>
                  <mi>i</mi>
                </msub>
                <msub>
                  <mi>d</mi>
                  <mi>o</mi>
                </msub>
              </mfrac>
            </mrow>
          </mrow>
        </mtd>
      </mtr>
      <mtr>
        <mtd>
          <mrow>
            <mfrac>
              <msub>
                <mi>h</mi>
                <mi>i</mi>
              </msub>
              <mrow>
                <mn>2.0</mn>
                <mtext>m</mtext>
              </mrow>
            </mfrac>
            <mo stretchy="false">=</mo>
            <mrow>
              <mo stretchy="false">−</mo>
              <mfrac>
                <mrow>
                  <mn>18</mn>
                  <mtext>m</mtext>
                </mrow>
                <mrow>
                  <mn>7.1</mn>
                  <mtext>m</mtext>
                </mrow>
              </mfrac>
            </mrow>
          </mrow>
        </mtd>
      </mtr>
      <mtr>
        <mtd>
          <mrow>
            <mrow>
              <msub>
                <mi>h</mi>
                <mi>i</mi>
              </msub>
              <mo stretchy="false">≈</mo>
              <mn>5.1</mn>
            </mrow>
            <mtext>m</mtext>
          </mrow>
        </mtd>
      </mtr>
    </mtable>
    <annotation encoding="StarMath 5.0">frac { h_i } { h_o } = - frac { d_i } { d_o } newline
frac { h_i } { 2.0 "m" } = - frac { 18 "m" } { 7.1 "m" } newline
h_i approx 5.1 "m"</annotation>
  </semantics>
</math>
</file>

<file path=Object 2/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i>F</mi>
      <mo stretchy="false">=</mo>
      <mfrac>
        <mi>R</mi>
        <mn>2</mn>
      </mfrac>
    </mrow>
    <annotation encoding="StarMath 5.0">F = frac { R } { 2 }</annotation>
  </semantics>
</math>
</file>

<file path=Object 4/content.xml><?xml version="1.0" encoding="utf-8"?>
<math xmlns="http://www.w3.org/1998/Math/MathML" display="block">
  <semantics>
    <mi>F</mi>
    <annotation encoding="StarMath 5.0">F</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sub>
      <mi>d</mi>
      <mi>o</mi>
    </msub>
    <annotation encoding="StarMath 5.0">d_o</annotation>
  </semantics>
</math>
</file>

<file path=Object 7/content.xml><?xml version="1.0" encoding="utf-8"?>
<math xmlns="http://www.w3.org/1998/Math/MathML" display="block">
  <semantics>
    <msub>
      <mi>d</mi>
      <mi>i</mi>
    </msub>
    <annotation encoding="StarMath 5.0">d_i</annotation>
  </semantics>
</math>
</file>

<file path=Object 8/content.xml><?xml version="1.0" encoding="utf-8"?>
<math xmlns="http://www.w3.org/1998/Math/MathML" display="block">
  <semantics>
    <mrow>
      <mfrac>
        <msub>
          <mi>h</mi>
          <mi>i</mi>
        </msub>
        <msub>
          <mi>h</mi>
          <mi>o</mi>
        </msub>
      </mfrac>
      <mo stretchy="false">=</mo>
      <mrow>
        <mo stretchy="false">−</mo>
        <mfrac>
          <msub>
            <mi>d</mi>
            <mi>i</mi>
          </msub>
          <msub>
            <mi>d</mi>
            <mi>o</mi>
          </msub>
        </mfrac>
      </mrow>
    </mrow>
    <annotation encoding="StarMath 5.0">frac { h_i } { h_o } = - frac { d_i } { d_o }</annotation>
  </semantics>
</math>
</file>

<file path=Object 9/content.xml><?xml version="1.0" encoding="utf-8"?>
<math xmlns="http://www.w3.org/1998/Math/MathML" display="block">
  <semantics>
    <msub>
      <mi>h</mi>
      <mi>i</mi>
    </msub>
    <annotation encoding="StarMath 5.0">h_i</annotation>
  </semantics>
</math>
</file>
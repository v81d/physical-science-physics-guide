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2fa7f3" officeooo:paragraph-rsid="002fa7f3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2fa7f3" officeooo:paragraph-rsid="00374cb0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123fc99" officeooo:paragraph-rsid="001dc2ea" style:font-style-asian="normal" style:font-style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7" style:family="paragraph" style:parent-style-name="Heading_20_1" style:list-style-name="">
      <style:text-properties officeooo:rsid="004c7a21" officeooo:paragraph-rsid="001dc2ea"/>
    </style:style>
    <style:style style:name="P8" style:family="paragraph" style:parent-style-name="Heading_20_1">
      <style:paragraph-properties fo:break-before="page"/>
      <style:text-properties officeooo:rsid="002fa7f3" officeooo:paragraph-rsid="002fa7f3"/>
    </style:style>
    <style:style style:name="P9" style:family="paragraph" style:parent-style-name="Text_20_body">
      <style:text-properties officeooo:rsid="002fa7f3" officeooo:paragraph-rsid="002fa7f3"/>
    </style:style>
    <style:style style:name="P10" style:family="paragraph" style:parent-style-name="Text_20_body" style:list-style-name="L1">
      <style:text-properties fo:font-weight="normal" officeooo:rsid="002fa7f3" officeooo:paragraph-rsid="002fa7f3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2fa7f3" officeooo:paragraph-rsid="002fa7f3" style:font-weight-asian="normal" style:font-weight-complex="normal"/>
    </style:style>
    <style:style style:name="P12" style:family="paragraph" style:parent-style-name="Heading_20_2">
      <style:text-properties officeooo:rsid="002fa7f3" officeooo:paragraph-rsid="002fa7f3"/>
    </style:style>
    <style:style style:name="P13" style:family="paragraph" style:parent-style-name="Text_20_body" style:list-style-name="L2">
      <style:text-properties fo:font-weight="bold" officeooo:rsid="002fa7f3" officeooo:paragraph-rsid="002fa7f3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2fa7f3" officeooo:paragraph-rsid="00374cb0" style:font-weight-asian="bold" style:font-weight-complex="bold"/>
    </style:style>
    <style:style style:name="P15" style:family="paragraph" style:parent-style-name="Heading_20_1">
      <style:text-properties officeooo:rsid="002fa7f3" officeooo:paragraph-rsid="002fa7f3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2fa7f3" officeooo:paragraph-rsid="00374cb0" style:font-weight-asian="bold" style:font-weight-complex="bold"/>
    </style:style>
    <style:style style:name="P17" style:family="paragraph" style:parent-style-name="Heading_20_2">
      <style:text-properties officeooo:rsid="0031a1f6" officeooo:paragraph-rsid="0031a1f6"/>
    </style:style>
    <style:style style:name="P18" style:family="paragraph" style:parent-style-name="Text_20_body">
      <style:text-properties officeooo:rsid="0031a1f6" officeooo:paragraph-rsid="0031a1f6"/>
    </style:style>
    <style:style style:name="P19" style:family="paragraph" style:parent-style-name="Text_20_body" style:list-style-name="L3">
      <style:text-properties officeooo:rsid="0031a1f6" officeooo:paragraph-rsid="0031a1f6"/>
    </style:style>
    <style:style style:name="P20" style:family="paragraph" style:parent-style-name="Text_20_body" style:list-style-name="L4">
      <style:text-properties officeooo:rsid="0031a1f6" officeooo:paragraph-rsid="0031a1f6"/>
    </style:style>
    <style:style style:name="P21" style:family="paragraph" style:parent-style-name="Text_20_body" style:list-style-name="L4">
      <style:text-properties fo:font-weight="normal" officeooo:rsid="0031a1f6" officeooo:paragraph-rsid="0031a1f6" style:font-weight-asian="normal" style:font-weight-complex="normal"/>
    </style:style>
    <style:style style:name="P22" style:family="paragraph" style:parent-style-name="Text_20_body">
      <style:text-properties fo:font-weight="normal" officeooo:rsid="0031a1f6" officeooo:paragraph-rsid="0031a1f6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weight="normal" officeooo:rsid="0031a1f6" officeooo:paragraph-rsid="0031a1f6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31a1f6" officeooo:paragraph-rsid="0031a1f6" style:font-weight-asian="normal" style:font-weight-complex="normal"/>
    </style:style>
    <style:style style:name="P25" style:family="paragraph" style:parent-style-name="Heading_20_3">
      <style:text-properties officeooo:rsid="0031a1f6" officeooo:paragraph-rsid="0031a1f6"/>
    </style:style>
    <style:style style:name="P26" style:family="paragraph" style:parent-style-name="Text_20_body" style:list-style-name="L5">
      <style:text-properties officeooo:rsid="0031a1f6" officeooo:paragraph-rsid="0031a1f6"/>
    </style:style>
    <style:style style:name="P27" style:family="paragraph" style:parent-style-name="Text_20_body" style:list-style-name="L5">
      <style:text-properties fo:font-weight="normal" officeooo:rsid="0031a1f6" officeooo:paragraph-rsid="0031a1f6" style:font-weight-asian="normal" style:font-weight-complex="normal"/>
    </style:style>
    <style:style style:name="P28" style:family="paragraph" style:parent-style-name="Text_20_body" style:list-style-name="L6">
      <style:text-properties fo:font-weight="normal" officeooo:rsid="0031a1f6" officeooo:paragraph-rsid="0031a1f6" style:font-weight-asian="normal" style:font-weight-complex="normal"/>
    </style:style>
    <style:style style:name="P29" style:family="paragraph" style:parent-style-name="Text_20_body" style:list-style-name="L7">
      <style:text-properties fo:font-weight="normal" officeooo:rsid="0031a1f6" officeooo:paragraph-rsid="0031a1f6" style:font-weight-asian="normal" style:font-weight-complex="normal"/>
    </style:style>
    <style:style style:name="T1" style:family="text">
      <style:text-properties officeooo:rsid="00374cb0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85e88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74cb0" style:font-style-asian="italic" style:font-weight-asian="normal" style:font-style-complex="italic" style:font-weight-complex="normal"/>
    </style:style>
    <style:style style:name="T5" style:family="text">
      <style:text-properties officeooo:rsid="0029b735"/>
    </style:style>
    <style:style style:name="T6" style:family="text">
      <style:text-properties officeooo:rsid="002fa7f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74cb0" style:font-weight-asian="normal" style:font-weight-complex="normal"/>
    </style:style>
    <style:style style:name="T10" style:family="text">
      <style:text-properties fo:font-style="italic" fo:font-weight="normal" officeooo:rsid="002900b4" style:font-style-asian="italic" style:font-weight-asian="normal" style:font-style-complex="italic" style:font-weight-complex="normal"/>
    </style:style>
    <style:style style:name="T11" style:family="text">
      <style:text-properties officeooo:rsid="003250b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ton’s Laws<text:span text:style-name="T1">**</text:span></text:p>
      <text:p text:style-name="P2"><text:span text:style-name="T2">(This </text:span><text:span text:style-name="T3">idea or </text:span><text:span text:style-name="T2">topic is </text:span><text:span text:style-name="T4">a major aspect of the new Physical Science: Physics course.</text:span><text:span text:style-name="T2">)</text:span><text:bookmark-start text:name="__DdeLink__138_391587487"/><text:bookmark-start text:name="__DdeLink__502_3041763869"/></text:p>
      <text:p text:style-name="P3">October <text:span text:style-name="T5">2</text:span><text:span text:style-name="T6">9</text:span>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27_4069653955" office:name="­" text:style-name="Index_20_Link" text:visited-style-name="Index_20_Link">­<text:tab/>1</text:a></text:p>
          <text:p text:style-name="P4"><text:a xlink:type="simple" xlink:href="#__RefHeading___Toc1434_3911434191" office:name="Introduction to Forces" text:style-name="Index_20_Link" text:visited-style-name="Index_20_Link">Introduction to Forces<text:tab/>2</text:a></text:p>
          <text:p text:style-name="P5"><text:a xlink:type="simple" xlink:href="#__RefHeading___Toc1436_3911434191" office:name="The Fundamental Forces of Nature" text:style-name="Index_20_Link" text:visited-style-name="Index_20_Link">The Fundamental Forces of Nature<text:tab/>2</text:a></text:p>
          <text:p text:style-name="P4"><text:a xlink:type="simple" xlink:href="#__RefHeading___Toc1438_3911434191" office:name="Newton’s Laws of Motion**" text:style-name="Index_20_Link" text:visited-style-name="Index_20_Link">Newton’s Laws of Motion**<text:tab/>2</text:a></text:p>
          <text:p text:style-name="P5"><text:a xlink:type="simple" xlink:href="#__RefHeading___Toc1440_3911434191" office:name="The Law of Inertia" text:style-name="Index_20_Link" text:visited-style-name="Index_20_Link">The Law of Inertia<text:tab/>2</text:a></text:p>
          <text:p text:style-name="P5"><text:a xlink:type="simple" xlink:href="#__RefHeading___Toc1442_3911434191" office:name="The Law of Force and Acceleration" text:style-name="Index_20_Link" text:visited-style-name="Index_20_Link">The Law of Force and Acceleration<text:tab/>3</text:a></text:p>
          <text:p text:style-name="P6"><text:a xlink:type="simple" xlink:href="#__RefHeading___Toc1444_3911434191" office:name="Important Concepts About Newton’s Second Law" text:style-name="Index_20_Link" text:visited-style-name="Index_20_Link">Important Concepts About Newton’s Second Law<text:tab/>3</text:a></text:p>
          <text:p text:style-name="P5"><text:a xlink:type="simple" xlink:href="#__RefHeading___Toc1446_3911434191" office:name="The Law of Action and Reaction" text:style-name="Index_20_Link" text:visited-style-name="Index_20_Link">The Law of Action and Reaction<text:tab/>4</text:a></text:p>
        </text:index-body>
      </text:table-of-content>
      <text:h text:style-name="P7" text:outline-level="1"><text:bookmark-start text:name="__RefHeading___Toc627_4069653955"/>­<text:bookmark-end text:name="__RefHeading___Toc627_4069653955"/></text:h>
      <text:h text:style-name="P8" text:outline-level="1"><text:bookmark-end text:name="__DdeLink__502_3041763869"/><text:bookmark-end text:name="__DdeLink__138_391587487"/><text:bookmark-start text:name="__RefHeading___Toc1434_3911434191"/>Introduction to Forces<text:bookmark-end text:name="__RefHeading___Toc1434_3911434191"/></text:h>
      <text:p text:style-name="P9">A <text:span text:style-name="T7">force </text:span><text:span text:style-name="T8">is essentially a </text:span><text:span text:style-name="T7">push or pull</text:span><text:span text:style-name="T8"> upon an object resulting from the object’s interaction with another object. Examples include:</text:span></text:p>
      <text:list text:style-name="L1">
        <text:list-item>
          <text:p text:style-name="P10">An object’s weight</text:p>
        </text:list-item>
        <text:list-item>
          <text:p text:style-name="P10">The tension on a rope</text:p>
        </text:list-item>
        <text:list-item>
          <text:p text:style-name="P10">The force of friction</text:p>
        </text:list-item>
        <text:list-item>
          <text:p text:style-name="P10">The attraction between an electron and a proton</text:p>
        </text:list-item>
      </text:list>
      <text:p text:style-name="P11">Bodies do not have to be in contact to exert forces on each other. To visualize this, consider how Earth’s gravity can exert a force on an object very far away, such as the Moon.</text:p>
      <text:h text:style-name="P12" text:outline-level="2"><text:bookmark-start text:name="__RefHeading___Toc1436_3911434191"/>The Fundamental Forces of Nature<text:bookmark-end text:name="__RefHeading___Toc1436_3911434191"/></text:h>
      <text:p text:style-name="P9">There are many forces that occur naturally, with the four fundamental forces being:</text:p>
      <text:list text:style-name="L2">
        <text:list-item>
          <text:p text:style-name="P13">Gravity<text:span text:style-name="T8">: The attraction between any two bodies with mass. This is one of the weakest natural forces.</text:span></text:p>
        </text:list-item>
        <text:list-item>
          <text:p text:style-name="P13">Electromagnetic<text:span text:style-name="T8">: Forces between any two bodies with charge. It can be attractive or repulsive.</text:span></text:p>
        </text:list-item>
        <text:list-item>
          <text:p text:style-name="P14">Weak Nuclear Force<text:span text:style-name="T8">:</text:span><text:span text:style-name="T9">*</text:span><text:span text:style-name="T8"> </text:span><text:span text:style-name="T2">(This </text:span><text:span text:style-name="T3">idea or </text:span><text:span text:style-name="T2">topic is excluded in the new </text:span><text:span text:style-name="T10">Physical Science: Physics course.</text:span><text:span text:style-name="T2">) </text:span><text:span text:style-name="T8">The nuclear force responsible for radioactive decay.</text:span></text:p>
        </text:list-item>
        <text:list-item>
          <text:p text:style-name="P14">Strong Nuclear Force<text:span text:style-name="T8">:</text:span><text:span text:style-name="T9">*</text:span><text:span text:style-name="T8"> </text:span><text:span text:style-name="T2">(This </text:span><text:span text:style-name="T3">idea or </text:span><text:span text:style-name="T2">topic is excluded in the new </text:span><text:span text:style-name="T10">Physical Science: Physics course.</text:span><text:span text:style-name="T2">) </text:span><text:span text:style-name="T8">The force that holds quarks (constituents of protons and neutrons) together.</text:span></text:p>
        </text:list-item>
      </text:list>
      <text:h text:style-name="P15" text:outline-level="1"><text:bookmark-start text:name="__RefHeading___Toc1438_3911434191"/>Newton’s Laws of Motion<text:span text:style-name="T1">**</text:span><text:bookmark-end text:name="__RefHeading___Toc1438_3911434191"/></text:h>
      <text:p text:style-name="P16"><text:span text:style-name="T2">(This </text:span><text:span text:style-name="T3">idea or </text:span><text:span text:style-name="T2">topic is </text:span><text:span text:style-name="T4">a major aspect of the new Physical Science: Physics course.</text:span><text:span text:style-name="T2">)</text:span></text:p>
      <text:p text:style-name="P9">Isaac Newton’s three primary laws of motion are the <text:span text:style-name="T7">law of inertia</text:span><text:span text:style-name="T8">, the </text:span><text:span text:style-name="T7">law of force and acceleration</text:span><text:span text:style-name="T8">, and the </text:span><text:span text:style-name="T7">law of action and reaction</text:span><text:span text:style-name="T8">.</text:span></text:p>
      <text:h text:style-name="P17" text:outline-level="2"><text:bookmark-start text:name="__RefHeading___Toc1440_3911434191"/>The Law of Inertia<text:bookmark-end text:name="__RefHeading___Toc1440_3911434191"/></text:h>
      <text:p text:style-name="P18">Newton’s first law, the law of inertia, states that:</text:p>
      <text:list text:style-name="L3">
        <text:list-item>
          <text:p text:style-name="P19">A moving body will continue moving in the same direction with the same speed until some <text:span text:style-name="T7">net force</text:span> acts on it.</text:p>
        </text:list-item>
        <text:list-item>
          <text:p text:style-name="P19">A body at rest will remain at rest unless a net force acts on it.</text:p>
        </text:list-item>
      </text:list>
      <text:p text:style-name="P18">In other words, it takes a net force to change a body’s velocity.</text:p>
      <text:h text:style-name="Heading_20_2" text:outline-level="2"><text:bookmark-start text:name="__RefHeading___Toc1442_3911434191"/><text:soft-page-break/>The Law of Force and Acceleration<text:bookmark-end text:name="__RefHeading___Toc1442_3911434191"/></text:h>
      <text:p text:style-name="P18">Newton’s second law, the law of force and acceleration suggests that:</text:p>
      <text:list text:style-name="L4">
        <text:list-item>
          <text:p text:style-name="P20">The acceleration an object experiences is directly proportional to the net force acting on it.</text:p>
          <text:list>
            <text:list-item>
              <text:p text:style-name="P20">Mass is the constant of proportionality.</text:p>
            </text:list-item>
            <text:list-item>
              <text:p text:style-name="P20">For a given mass, if the acceleration is multiplied by a factor, the net force is multiplied by the same factor.</text:p>
            </text:list-item>
            <text:list-item>
              <text:p text:style-name="P20">For a constant net force, if the mass is multiplied by a factor, the acceleration is <text:span text:style-name="T7">divided</text:span><text:span text:style-name="T8"> by that factor (indirect relationship).</text:span></text:p>
            </text:list-item>
          </text:list>
        </text:list-item>
        <text:list-item>
          <text:p text:style-name="P21">The first law is simply a special case of the second law. If the net force is zero, so is the acceleration.</text:p>
        </text:list-item>
      </text:list>
      <text:p text:style-name="P22">The formula for the law of force and acceleration is given by:</text:p>
      <text:p text:style-name="P23"><draw:frame draw:style-name="fr1" draw:name="Object4" text:anchor-type="as-char" svg:y="-0.1492in" svg:width="0.6035in" svg:height="0.2102in" draw:z-index="3"><draw:object xlink:href="./Object 4" xlink:type="simple" xlink:show="embed" xlink:actuate="onLoad"/><draw:image xlink:href="./ObjectReplacements/Object 4" xlink:type="simple" xlink:show="embed" xlink:actuate="onLoad"/></draw:frame>,</text:p>
      <text:p text:style-name="P24">where <draw:frame draw:style-name="fr1" draw:name="Object5" text:anchor-type="as-char" svg:y="-0.1492in" svg:width="0.2528in" svg:height="0.2102in" draw:z-index="4"><draw:object xlink:href="./Object 5" xlink:type="simple" xlink:show="embed" xlink:actuate="onLoad"/><draw:image xlink:href="./ObjectReplacements/Object 5" xlink:type="simple" xlink:show="embed" xlink:actuate="onLoad"/></draw:frame><text:s/>is the net force <text:span text:style-name="T11">(measured in Newtons, </text:span><text:span text:style-name="T11"><draw:frame draw:style-name="fr1" draw:name="Object14" text:anchor-type="as-char" svg:y="-0.1492in" svg:width="0.1299in" svg:height="0.1854in" draw:z-index="5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) </text:span>acting on an object, <draw:frame draw:style-name="fr1" draw:name="Object6" text:anchor-type="as-char" svg:y="-0.1492in" svg:width="0.1256in" svg:height="0.1854in" draw:z-index="6"><draw:object xlink:href="./Object 6" xlink:type="simple" xlink:show="embed" xlink:actuate="onLoad"/><draw:image xlink:href="./ObjectReplacements/Object 6" xlink:type="simple" xlink:show="embed" xlink:actuate="onLoad"/></draw:frame><text:s/>is the mass of the object, and <draw:frame draw:style-name="fr1" draw:name="Object7" text:anchor-type="as-char" svg:y="-0.1492in" svg:width="0.0898in" svg:height="0.1854in" draw:z-index="7"><draw:object xlink:href="./Object 7" xlink:type="simple" xlink:show="embed" xlink:actuate="onLoad"/><draw:image xlink:href="./ObjectReplacements/Object 7" xlink:type="simple" xlink:show="embed" xlink:actuate="onLoad"/></draw:frame><text:s/>is the acceleration of the object.</text:p>
      <text:p text:style-name="P24">Following this formula directly, the formula for calculating the force of gravity (or equivalently, weight) is:</text:p>
      <text:p text:style-name="P23"><draw:frame draw:style-name="fr1" draw:name="Object8" text:anchor-type="as-char" svg:y="-0.1492in" svg:width="0.8339in" svg:height="0.2102in" draw:z-index="8"><draw:object xlink:href="./Object 8" xlink:type="simple" xlink:show="embed" xlink:actuate="onLoad"/><draw:image xlink:href="./ObjectReplacements/Object 8" xlink:type="simple" xlink:show="embed" xlink:actuate="onLoad"/></draw:frame>,</text:p>
      <text:p text:style-name="P24">where <draw:frame draw:style-name="fr1" draw:name="Object9" text:anchor-type="as-char" svg:y="-0.1492in" svg:width="0.1799in" svg:height="0.2102in" draw:z-index="9"><draw:object xlink:href="./Object 9" xlink:type="simple" xlink:show="embed" xlink:actuate="onLoad"/><draw:image xlink:href="./ObjectReplacements/Object 9" xlink:type="simple" xlink:show="embed" xlink:actuate="onLoad"/></draw:frame><text:s/>is the force of gravity acting on an object, <draw:frame draw:style-name="fr1" draw:name="Object10" text:anchor-type="as-char" svg:y="-0.1492in" svg:width="0.161in" svg:height="0.1854in" draw:z-index="10"><draw:object xlink:href="./Object 10" xlink:type="simple" xlink:show="embed" xlink:actuate="onLoad"/><draw:image xlink:href="./ObjectReplacements/Object 10" xlink:type="simple" xlink:show="embed" xlink:actuate="onLoad"/></draw:frame><text:s/>is the object’s weight, <draw:frame draw:style-name="fr1" draw:name="Object11" text:anchor-type="as-char" svg:y="-0.1492in" svg:width="0.1256in" svg:height="0.1854in" draw:z-index="11"><draw:object xlink:href="./Object 11" xlink:type="simple" xlink:show="embed" xlink:actuate="onLoad"/><draw:image xlink:href="./ObjectReplacements/Object 11" xlink:type="simple" xlink:show="embed" xlink:actuate="onLoad"/></draw:frame><text:s/>is the object’s mass, and <draw:frame draw:style-name="fr1" draw:name="Object12" text:anchor-type="as-char" svg:y="-0.1492in" svg:width="0.0957in" svg:height="0.1854in" draw:z-index="12"><draw:object xlink:href="./Object 12" xlink:type="simple" xlink:show="embed" xlink:actuate="onLoad"/><draw:image xlink:href="./ObjectReplacements/Object 12" xlink:type="simple" xlink:show="embed" xlink:actuate="onLoad"/></draw:frame><text:s/>is the acceleration due to gravity experienced by the object (e.g., <draw:frame draw:style-name="fr1" draw:name="Object13" text:anchor-type="as-char" svg:y="-0.1728in" svg:width="0.5661in" svg:height="0.2091in" draw:z-index="13"><draw:object xlink:href="./Object 13" xlink:type="simple" xlink:show="embed" xlink:actuate="onLoad"/><draw:image xlink:href="./ObjectReplacements/Object 13" xlink:type="simple" xlink:show="embed" xlink:actuate="onLoad"/></draw:frame><text:s/>near the surface of Earth).</text:p>
      <text:h text:style-name="P25" text:outline-level="3"><text:bookmark-start text:name="__RefHeading___Toc1444_3911434191"/>Important Concepts About Newton’s Second Law<text:bookmark-end text:name="__RefHeading___Toc1444_3911434191"/></text:h>
      <text:list text:style-name="L5">
        <text:list-item>
          <text:p text:style-name="P26">A system at <text:span text:style-name="T7">equilibrium</text:span><text:span text:style-name="T8"> experiences a net force of zero.</text:span></text:p>
          <text:list>
            <text:list-item>
              <text:p text:style-name="P26">An object at equilibrium can be either <text:span text:style-name="T7">at rest</text:span><text:span text:style-name="T8"> or moving at a </text:span><text:span text:style-name="T7">constant velocity</text:span><text:span text:style-name="T8">.</text:span></text:p>
            </text:list-item>
          </text:list>
        </text:list-item>
        <text:list-item>
          <text:p text:style-name="P27">When more than one force acts on a body, the net force is the sum of all the forces (with direction considered).</text:p>
          <text:list>
            <text:list-item>
              <text:p text:style-name="P27">To calculate the net force (<draw:frame draw:style-name="fr1" draw:name="Object1" text:anchor-type="as-char" svg:y="-0.1492in" svg:width="0.2528in" svg:height="0.2102in" draw:z-index="0"><draw:object xlink:href="./Object 1" xlink:type="simple" xlink:show="embed" xlink:actuate="onLoad"/><draw:image xlink:href="./ObjectReplacements/Object 1" xlink:type="simple" xlink:show="embed" xlink:actuate="onLoad"/></draw:frame>) when the forces are in different directions, you must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8">Break up the forces into their components.</text:p>
                </text:list-item>
                <text:list-item>
                  <text:p text:style-name="P28">Find the sum of the horizontal forces (<draw:frame draw:style-name="fr1" draw:name="Object2" text:anchor-type="as-char" svg:y="-0.1492in" svg:width="0.2945in" svg:height="0.2102in" draw:z-index="1"><draw:object xlink:href="./Object 2" xlink:type="simple" xlink:show="embed" xlink:actuate="onLoad"/><draw:image xlink:href="./ObjectReplacements/Object 2" xlink:type="simple" xlink:show="embed" xlink:actuate="onLoad"/></draw:frame>).</text:p>
                </text:list-item>
                <text:list-item>
                  <text:p text:style-name="P28">Find the sum of the vertical forces (<draw:frame draw:style-name="fr1" draw:name="Object3" text:anchor-type="as-char" svg:y="-0.1492in" svg:width="0.3028in" svg:height="0.2102in" draw:z-index="2"><draw:object xlink:href="./Object 3" xlink:type="simple" xlink:show="embed" xlink:actuate="onLoad"/><draw:image xlink:href="./ObjectReplacements/Object 3" xlink:type="simple" xlink:show="embed" xlink:actuate="onLoad"/></draw:frame>).</text:p>
                </text:list-item>
                <text:list-item>
                  <text:p text:style-name="P28">Use geometry (i.e., the Pythagorean theoream) to calculate the resulting net force given the net horizontal force and the net vertical force.</text:p>
                </text:list-item>
              </text:list>
            </text:list-item>
          </text:list>
        </text:list-item>
      </text:list>
      <text:h text:style-name="P17" text:outline-level="2"><text:bookmark-start text:name="__RefHeading___Toc1446_3911434191"/><text:soft-page-break/>The Law of Action and Reaction<text:bookmark-end text:name="__RefHeading___Toc1446_3911434191"/></text:h>
      <text:p text:style-name="P22">Newton’s third law, the law of action and reaction, states that, for every action, there is an equal and opposite reaction. Some analogies include:</text:p>
      <text:list text:style-name="L7">
        <text:list-item>
          <text:p text:style-name="P29">If you hit a tennis ball with a racket, the force on the ball due to the racket is the same as the force on the racket due to the ball, except in the opposite direction.</text:p>
        </text:list-item>
        <text:list-item>
          <text:p text:style-name="P29">If you drop an apple, the Earth pulls on the apple just as hard as the apple pulls on the Earth.</text:p>
        </text:list-item>
        <text:list-item>
          <text:p text:style-name="P29">If you fire a rifle, the bullet pushes the rifle backward just as hard as the rifle pushes the bullet forwar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4:13:00.953938585</meta:creation-date>
    <dc:date>2026-06-19T22:54:55.028402387</dc:date>
    <meta:editing-duration>PT1H2M15S</meta:editing-duration>
    <meta:editing-cycles>15</meta:editing-cycles>
    <meta:generator>LibreOffice/25.8.5.2$Linux_X86_64 LibreOffice_project/580$Build-2</meta:generator>
    <meta:document-statistic meta:table-count="0" meta:image-count="0" meta:object-count="14" meta:page-count="4" meta:paragraph-count="61" meta:word-count="792" meta:character-count="4303" meta:non-whitespace-character-count="3590"/>
  </office:meta>
</office:document-meta>
</file>

<file path=Object 1/content.xml><?xml version="1.0" encoding="utf-8"?>
<math xmlns="http://www.w3.org/1998/Math/MathML" display="block">
  <semantics>
    <msub>
      <mi>F</mi>
      <mtext>net</mtext>
    </msub>
    <annotation encoding="StarMath 5.0">F_"net"</annotation>
  </semantics>
</math>
</file>

<file path=Object 10/content.xml><?xml version="1.0" encoding="utf-8"?>
<math xmlns="http://www.w3.org/1998/Math/MathML" display="block">
  <semantics>
    <mi>W</mi>
    <annotation encoding="StarMath 5.0">W</annotation>
  </semantics>
</math>
</file>

<file path=Object 11/content.xml><?xml version="1.0" encoding="utf-8"?>
<math xmlns="http://www.w3.org/1998/Math/MathML" display="block">
  <semantics>
    <mi>m</mi>
    <annotation encoding="StarMath 5.0">m</annotation>
  </semantics>
</math>
</file>

<file path=Object 12/content.xml><?xml version="1.0" encoding="utf-8"?>
<math xmlns="http://www.w3.org/1998/Math/MathML" display="block">
  <semantics>
    <mi>g</mi>
    <annotation encoding="StarMath 5.0">g</annotation>
  </semantics>
</math>
</file>

<file path=Object 13/content.xml><?xml version="1.0" encoding="utf-8"?>
<math xmlns="http://www.w3.org/1998/Math/MathML" display="block">
  <semantics>
    <mrow>
      <mn>9.8</mn>
      <mrow>
        <mtext>m</mtext>
        <mo stretchy="false">/</mo>
        <msup>
          <mtext>s</mtext>
          <mn>2</mn>
        </msup>
      </mrow>
    </mrow>
    <annotation encoding="StarMath 5.0">9.8 "m" / "s"^2</annotation>
  </semantics>
</math>
</file>

<file path=Object 14/content.xml><?xml version="1.0" encoding="utf-8"?>
<math xmlns="http://www.w3.org/1998/Math/MathML" display="block">
  <semantics>
    <mtext>N</mtext>
    <annotation encoding="StarMath 5.0">"N"</annotation>
  </semantics>
</math>
</file>

<file path=Object 2/content.xml><?xml version="1.0" encoding="utf-8"?>
<math xmlns="http://www.w3.org/1998/Math/MathML" display="block">
  <semantics>
    <mrow>
      <mi mathvariant="normal">Σ</mi>
      <msub>
        <mi>F</mi>
        <mi>x</mi>
      </msub>
    </mrow>
    <annotation encoding="StarMath 5.0">%SIGMA F_x</annotation>
  </semantics>
</math>
</file>

<file path=Object 3/content.xml><?xml version="1.0" encoding="utf-8"?>
<math xmlns="http://www.w3.org/1998/Math/MathML" display="block">
  <semantics>
    <mrow>
      <mi mathvariant="normal">Σ</mi>
      <msub>
        <mi>F</mi>
        <mi>y</mi>
      </msub>
    </mrow>
    <annotation encoding="StarMath 5.0">%SIGMA F_y</annotation>
  </semantics>
</math>
</file>

<file path=Object 4/content.xml><?xml version="1.0" encoding="utf-8"?>
<math xmlns="http://www.w3.org/1998/Math/MathML" display="block">
  <semantics>
    <mrow>
      <msub>
        <mi>F</mi>
        <mtext>net</mtext>
      </msub>
      <mo stretchy="false">=</mo>
      <mi mathvariant="italic">ma</mi>
    </mrow>
    <annotation encoding="StarMath 5.0">F_"net" = ma</annotation>
  </semantics>
</math>
</file>

<file path=Object 5/content.xml><?xml version="1.0" encoding="utf-8"?>
<math xmlns="http://www.w3.org/1998/Math/MathML" display="block">
  <semantics>
    <msub>
      <mi>F</mi>
      <mtext>net</mtext>
    </msub>
    <annotation encoding="StarMath 5.0">F_"net"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row>
      <msub>
        <mi>F</mi>
        <mi>g</mi>
      </msub>
      <mo stretchy="false">=</mo>
      <mi>W</mi>
      <mo stretchy="false">=</mo>
      <mi mathvariant="italic">mg</mi>
    </mrow>
    <annotation encoding="StarMath 5.0">F_g = W = mg</annotation>
  </semantics>
</math>
</file>

<file path=Object 9/content.xml><?xml version="1.0" encoding="utf-8"?>
<math xmlns="http://www.w3.org/1998/Math/MathML" display="block">
  <semantics>
    <msub>
      <mi>F</mi>
      <mi>g</mi>
    </msub>
    <annotation encoding="StarMath 5.0">F_g</annotation>
  </semantics>
</math>
</file>
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content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normal" officeooo:rsid="001be25d" officeooo:paragraph-rsid="001be25d" style:font-style-asian="normal" style:font-style-complex="normal"/>
    </style:style>
    <style:style style:name="P2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officeooo:paragraph-rsid="001be25d"/>
    </style:style>
    <style:style style:name="P5" style:family="paragraph" style:parent-style-name="Heading_20_1">
      <style:paragraph-properties fo:text-align="start" style:justify-single-word="false" fo:break-before="page"/>
    </style:style>
    <style:style style:name="P6" style:family="paragraph" style:parent-style-name="Heading_20_2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officeooo:rsid="001be25d" officeooo:paragraph-rsid="001be25d"/>
    </style:style>
    <style:style style:name="P8" style:family="paragraph" style:parent-style-name="Text_20_body" style:list-style-name="L1">
      <style:paragraph-properties fo:text-align="start" style:justify-single-word="false"/>
      <style:text-properties fo:font-weight="bold" officeooo:rsid="001be25d" officeooo:paragraph-rsid="001be25d" style:font-weight-asian="bold" style:font-weight-complex="bold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font-weight="bold" officeooo:rsid="001be25d" officeooo:paragraph-rsid="001be25d" style:font-weight-asian="bold" style:font-weight-complex="bold"/>
    </style:style>
    <style:style style:name="P11" style:family="paragraph" style:parent-style-name="Text_20_body" style:list-style-name="L2">
      <style:paragraph-properties fo:text-align="start" style:justify-single-word="false"/>
      <style:text-properties fo:font-weight="normal" officeooo:rsid="001be25d" officeooo:paragraph-rsid="001be25d" style:font-weight-asian="normal" style:font-weight-complex="normal"/>
    </style:style>
    <style:style style:name="P12" style:family="paragraph" style:parent-style-name="Text_20_body" style:list-style-name="L3">
      <style:paragraph-properties fo:text-align="start" style:justify-single-word="false"/>
      <style:text-properties fo:font-weight="normal" officeooo:rsid="001be25d" officeooo:paragraph-rsid="001be25d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officeooo:rsid="001bf07a" officeooo:paragraph-rsid="001bf07a"/>
    </style:style>
    <style:style style:name="P14" style:family="paragraph" style:parent-style-name="Text_20_body" style:list-style-name="L4">
      <style:paragraph-properties fo:text-align="start" style:justify-single-word="false"/>
      <style:text-properties officeooo:rsid="001bf07a" officeooo:paragraph-rsid="001bf07a"/>
    </style:style>
    <style:style style:name="T1" style:family="text">
      <style:text-properties officeooo:rsid="001be25d"/>
    </style:style>
    <style:style style:name="T2" style:family="text">
      <style:text-properties fo:font-weight="bold" officeooo:rsid="001be25d" style:font-weight-asian="bold" style:font-weight-complex="bold"/>
    </style:style>
    <style:style style:name="T3" style:family="text">
      <style:text-properties fo:font-weight="normal" officeooo:rsid="001be25d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01bf07a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th in Physics</text:p>
      <text:p text:style-name="P1">September 10, 202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701_679008467" office:name="The International System of Units" text:style-name="Index_20_Link" text:visited-style-name="Index_20_Link">The International System of Units<text:tab/>2</text:a></text:p>
          <text:p text:style-name="P3"><text:a xlink:type="simple" xlink:href="#__RefHeading___Toc703_679008467" office:name="Quantities &amp; Units" text:style-name="Index_20_Link" text:visited-style-name="Index_20_Link">Quantities &amp; Units<text:tab/>2</text:a></text:p>
          <text:p text:style-name="P2"><text:a xlink:type="simple" xlink:href="#__RefHeading___Toc705_679008467" office:name="­Scalar &amp; Vector Quantities" text:style-name="Index_20_Link" text:visited-style-name="Index_20_Link">­Scalar &amp; Vector Quantities<text:tab/>2</text:a></text:p>
          <text:p text:style-name="P3"><text:a xlink:type="simple" xlink:href="#__RefHeading___Toc707_679008467" office:name="Scalar Quantities" text:style-name="Index_20_Link" text:visited-style-name="Index_20_Link">Scalar Quantities<text:tab/>2</text:a></text:p>
          <text:p text:style-name="P3"><text:a xlink:type="simple" xlink:href="#__RefHeading___Toc709_679008467" office:name="Vector Quantities" text:style-name="Index_20_Link" text:visited-style-name="Index_20_Link">Vector Quantities<text:tab/>3</text:a></text:p>
          <text:p text:style-name="P2"><text:a xlink:type="simple" xlink:href="#__RefHeading___Toc711_679008467" office:name="Notation" text:style-name="Index_20_Link" text:visited-style-name="Index_20_Link">Notation<text:tab/>3</text:a></text:p>
          <text:p text:style-name="P3"><text:a xlink:type="simple" xlink:href="#__RefHeading___Toc713_679008467" office:name="Scientific Notation" text:style-name="Index_20_Link" text:visited-style-name="Index_20_Link">Scientific Notation<text:tab/>3</text:a></text:p>
          <text:p text:style-name="P3"><text:a xlink:type="simple" xlink:href="#__RefHeading___Toc715_679008467" office:name="Unit Prefixes" text:style-name="Index_20_Link" text:visited-style-name="Index_20_Link">Unit Prefixes<text:tab/>3</text:a></text:p>
          <text:p text:style-name="P2"><text:a xlink:type="simple" xlink:href="#__RefHeading___Toc717_679008467" office:name="Comparisons &amp; Analogies" text:style-name="Index_20_Link" text:visited-style-name="Index_20_Link">Comparisons &amp; Analogies<text:tab/>3</text:a></text:p>
        </text:index-body>
      </text:table-of-content>
      <text:p text:style-name="P4"/>
      <text:h text:style-name="P5" text:outline-level="1"><text:bookmark-start text:name="__RefHeading___Toc701_679008467"/>The International System of Units<text:bookmark-end text:name="__RefHeading___Toc701_679008467"/></text:h>
      <text:p text:style-name="P4"><text:span text:style-name="T1">The </text:span><text:span text:style-name="T2">International System of Units</text:span><text:span text:style-name="T3">, abbreviated </text:span><text:span text:style-name="T2">SI</text:span><text:span text:style-name="T3">, defines the modern interpretation of the metric system. The SI is currently the most widely adopted measurement system in the world. It allows for clear communication within the scientific community.</text:span></text:p>
      <text:h text:style-name="P6" text:outline-level="2"><text:bookmark-start text:name="__RefHeading___Toc703_679008467"/>Quantities &amp; Units<text:bookmark-end text:name="__RefHeading___Toc703_679008467"/></text:h>
      <text:p text:style-name="P7">The SI implements a consistent form of measurements with a defined set of units. In physics, common units include:</text:p>
      <text:list text:style-name="L1">
        <text:list-item>
          <text:p text:style-name="P8">Displacement and Distance<text:span text:style-name="T4">: meter (</text:span><text:span text:style-name="T4"><draw:frame draw:style-name="fr1" draw:name="Object1" text:anchor-type="as-char" svg:y="-0.1492in" svg:width="0.1409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)</text:span></text:p>
        </text:list-item>
        <text:list-item>
          <text:p text:style-name="P8">Time<text:span text:style-name="T4">: second (</text:span><text:span text:style-name="T4"><draw:frame draw:style-name="fr1" draw:name="Object2" text:anchor-type="as-char" svg:y="-0.1492in" svg:width="0.0701in" svg:height="0.185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)</text:span></text:p>
        </text:list-item>
        <text:list-item>
          <text:p text:style-name="P8">Velocity and Speed<text:span text:style-name="T4">: meters per second (</text:span><text:span text:style-name="T4"><draw:frame draw:style-name="fr1" draw:name="Object3" text:anchor-type="as-char" svg:y="-0.1492in" svg:width="0.2835in" svg:height="0.1854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)</text:span></text:p>
        </text:list-item>
        <text:list-item>
          <text:p text:style-name="P8">Mass<text:span text:style-name="T4">: kilogram (</text:span><text:span text:style-name="T4"><draw:frame draw:style-name="fr1" draw:name="Object4" text:anchor-type="as-char" svg:y="-0.1492in" svg:width="0.1783in" svg:height="0.1854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)</text:span></text:p>
        </text:list-item>
        <text:list-item>
          <text:p text:style-name="P8">Momentum<text:span text:style-name="T4">: kilogram meters per second (</text:span><text:span text:style-name="T4"><draw:frame draw:style-name="fr1" draw:name="Object5" text:anchor-type="as-char" svg:y="-0.1492in" svg:width="0.5161in" svg:height="0.1854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4">)</text:span></text:p>
        </text:list-item>
        <text:list-item>
          <text:p text:style-name="P8">Force<text:span text:style-name="T4">: Newton (</text:span><text:span text:style-name="T4"><draw:frame draw:style-name="fr1" draw:name="Object6" text:anchor-type="as-char" svg:y="-0.1492in" svg:width="0.1299in" svg:height="0.1854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4">)</text:span></text:p>
        </text:list-item>
        <text:list-item>
          <text:p text:style-name="P8">Energy<text:span text:style-name="T4">: joule (</text:span><text:span text:style-name="T4"><draw:frame draw:style-name="fr1" draw:name="Object7" text:anchor-type="as-char" svg:y="-0.1492in" svg:width="0.0756in" svg:height="0.1854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)</text:span></text:p>
        </text:list-item>
      </text:list>
      <text:h text:style-name="P9" text:outline-level="1"><text:bookmark-start text:name="__RefHeading___Toc705_679008467"/>­<text:span text:style-name="T1">Scalar &amp; Vector Quantities</text:span><text:bookmark-end text:name="__RefHeading___Toc705_679008467"/></text:h>
      <text:p text:style-name="P10">Scalars<text:span text:style-name="T4"> and </text:span>vectors<text:span text:style-name="T4"> are two types of quantities that describe different aspects of the physical world.</text:span></text:p>
      <text:h text:style-name="P6" text:outline-level="2"><text:bookmark-start text:name="__RefHeading___Toc707_679008467"/>Scalar Quantities<text:bookmark-end text:name="__RefHeading___Toc707_679008467"/></text:h>
      <text:p text:style-name="P7">A <text:span text:style-name="T5">scalar</text:span><text:span text:style-name="T4"> is a quantity that has </text:span><text:span text:style-name="T5">only magnitude</text:span><text:span text:style-name="T4"> (size or amount) and </text:span><text:span text:style-name="T5">no direction</text:span><text:span text:style-name="T4">. Some examples of scalar quantities include:</text:span></text:p>
      <text:list text:style-name="L2">
        <text:list-item>
          <text:p text:style-name="P11">Distance</text:p>
        </text:list-item>
        <text:list-item>
          <text:p text:style-name="P11">Speed</text:p>
        </text:list-item>
        <text:list-item>
          <text:p text:style-name="P11">Time</text:p>
        </text:list-item>
        <text:list-item>
          <text:p text:style-name="P11">Mass</text:p>
        </text:list-item>
        <text:list-item>
          <text:p text:style-name="P11">Temperature</text:p>
        </text:list-item>
        <text:list-item>
          <text:p text:style-name="P11">Kinetic energy</text:p>
        </text:list-item>
        <text:list-item>
          <text:p text:style-name="P11">Gravitational energy</text:p>
        </text:list-item>
        <text:list-item>
          <text:p text:style-name="P11">Power</text:p>
        </text:list-item>
        <text:list-item>
          <text:p text:style-name="P11">Current</text:p>
        </text:list-item>
        <text:list-item>
          <text:p text:style-name="P11"><text:soft-page-break/>Potential difference</text:p>
        </text:list-item>
        <text:list-item>
          <text:p text:style-name="P11">Resistance</text:p>
        </text:list-item>
      </text:list>
      <text:h text:style-name="P6" text:outline-level="2"><text:bookmark-start text:name="__RefHeading___Toc709_679008467"/>Vector Quantities<text:bookmark-end text:name="__RefHeading___Toc709_679008467"/></text:h>
      <text:p text:style-name="P7">A <text:span text:style-name="T5">vector</text:span><text:span text:style-name="T4"> is a quantity that includes </text:span><text:span text:style-name="T5">both magnitude and direction</text:span><text:span text:style-name="T4">. Common vector quantities in physics include:</text:span></text:p>
      <text:list text:style-name="L3">
        <text:list-item>
          <text:p text:style-name="P12">Displacement</text:p>
        </text:list-item>
        <text:list-item>
          <text:p text:style-name="P12">Velocity</text:p>
        </text:list-item>
        <text:list-item>
          <text:p text:style-name="P12">Acceleration</text:p>
        </text:list-item>
        <text:list-item>
          <text:p text:style-name="P12">Force</text:p>
        </text:list-item>
        <text:list-item>
          <text:p text:style-name="P12">Weight</text:p>
        </text:list-item>
      </text:list>
      <text:h text:style-name="P9" text:outline-level="1"><text:bookmark-start text:name="__RefHeading___Toc711_679008467"/>Notation<text:bookmark-end text:name="__RefHeading___Toc711_679008467"/></text:h>
      <text:p text:style-name="P7">There are many conventions for writing quantities in science. For example, <text:span text:style-name="T5">scientific notation</text:span><text:span text:style-name="T4"> is used to abbreviate large quantities, and </text:span><text:span text:style-name="T5">prefixes</text:span><text:span text:style-name="T4"> are used for both clarity and to represent power</text:span><text:span text:style-name="T6">s</text:span><text:span text:style-name="T4"> of ten.</text:span></text:p>
      <text:h text:style-name="P6" text:outline-level="2"><text:bookmark-start text:name="__RefHeading___Toc713_679008467"/>Scientific Notation<text:bookmark-end text:name="__RefHeading___Toc713_679008467"/></text:h>
      <text:p text:style-name="P7">In physics, <text:span text:style-name="T5">scientific notation</text:span><text:span text:style-name="T4"> is often used to write very large or very small quantities. For example, </text:span><text:span text:style-name="T4"><draw:frame draw:style-name="fr1" draw:name="Object8" text:anchor-type="as-char" svg:y="-0.1492in" svg:width="1.4118in" svg:height="0.1854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4"><text:s/>can be written as </text:span><text:span text:style-name="T4"><draw:frame draw:style-name="fr1" draw:name="Object9" text:anchor-type="as-char" svg:y="-0.1728in" svg:width="0.7811in" svg:height="0.2091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4">.</text:span></text:p>
      <text:h text:style-name="P6" text:outline-level="2"><text:bookmark-start text:name="__RefHeading___Toc715_679008467"/>Unit Prefixes<text:bookmark-end text:name="__RefHeading___Toc715_679008467"/></text:h>
      <text:p text:style-name="P10">Unit prefixes<text:span text:style-name="T4"> are commonly used to represent </text:span><text:span text:style-name="T6">powers of ten. For instance, you can write </text:span><text:span text:style-name="T6"><draw:frame draw:style-name="fr1" draw:name="Object10" text:anchor-type="as-char" svg:y="-0.1728in" svg:width="0.7335in" svg:height="0.2091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6"><text:s/>(</text:span><text:span text:style-name="T6"><draw:frame draw:style-name="fr1" draw:name="Object11" text:anchor-type="as-char" svg:y="-0.1492in" svg:width="0.4953in" svg:height="0.1854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6">) as </text:span><text:span text:style-name="T6"><draw:frame draw:style-name="fr1" draw:name="Object12" text:anchor-type="as-char" svg:y="-0.1492in" svg:width="0.4543in" svg:height="0.1854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6">.</text:span></text:p>
      <text:h text:style-name="P9" text:outline-level="1"><text:bookmark-start text:name="__RefHeading___Toc717_679008467"/>Comparisons &amp; Analogies<text:bookmark-end text:name="__RefHeading___Toc717_679008467"/></text:h>
      <text:p text:style-name="P13">Consider the following real-world analogies:</text:p>
      <text:list text:style-name="L4">
        <text:list-item>
          <text:p text:style-name="P14">The length of an average high school classroom is about <draw:frame draw:style-name="fr1" draw:name="Object13" text:anchor-type="as-char" svg:y="-0.1492in" svg:width="0.3272in" svg:height="0.1854in" draw:z-index="12"><draw:object xlink:href="./Object 13" xlink:type="simple" xlink:show="embed" xlink:actuate="onLoad"/><draw:image xlink:href="./ObjectReplacements/Object 13" xlink:type="simple" xlink:show="embed" xlink:actuate="onLoad"/></draw:frame>.</text:p>
        </text:list-item>
        <text:list-item>
          <text:p text:style-name="P14">The width of an average door is approximately <draw:frame draw:style-name="fr1" draw:name="Object14" text:anchor-type="as-char" svg:y="-0.1492in" svg:width="0.2409in" svg:height="0.1854in" draw:z-index="15"><draw:object xlink:href="./Object 14" xlink:type="simple" xlink:show="embed" xlink:actuate="onLoad"/><draw:image xlink:href="./ObjectReplacements/Object 14" xlink:type="simple" xlink:show="embed" xlink:actuate="onLoad"/></draw:frame>.</text:p>
        </text:list-item>
        <text:list-item>
          <text:p text:style-name="P14">The approximate width of a human thumb is <draw:frame draw:style-name="fr1" draw:name="Object15" text:anchor-type="as-char" svg:y="-0.1728in" svg:width="0.6807in" svg:height="0.2091in" draw:z-index="13"><draw:object xlink:href="./Object 15" xlink:type="simple" xlink:show="embed" xlink:actuate="onLoad"/><draw:image xlink:href="./ObjectReplacements/Object 15" xlink:type="simple" xlink:show="embed" xlink:actuate="onLoad"/></draw:frame><text:s/>(<draw:frame draw:style-name="fr1" draw:name="Object16" text:anchor-type="as-char" svg:y="-0.1492in" svg:width="0.4516in" svg:height="0.1854in" draw:z-index="14"><draw:object xlink:href="./Object 16" xlink:type="simple" xlink:show="embed" xlink:actuate="onLoad"/><draw:image xlink:href="./ObjectReplacements/Object 16" xlink:type="simple" xlink:show="embed" xlink:actuate="onLoad"/></draw:frame>).</text:p>
        </text:list-item>
        <text:list-item>
          <text:p text:style-name="P14">The thickness of one sheet of paper is about <draw:frame draw:style-name="fr1" draw:name="Object17" text:anchor-type="as-char" svg:y="-0.1728in" svg:width="0.6854in" svg:height="0.2091in" draw:z-index="16"><draw:object xlink:href="./Object 17" xlink:type="simple" xlink:show="embed" xlink:actuate="onLoad"/><draw:image xlink:href="./ObjectReplacements/Object 17" xlink:type="simple" xlink:show="embed" xlink:actuate="onLoad"/></draw:frame><text:s/>(<draw:frame draw:style-name="fr1" draw:name="Object18" text:anchor-type="as-char" svg:y="-0.1492in" svg:width="0.6181in" svg:height="0.1854in" draw:z-index="17"><draw:object xlink:href="./Object 18" xlink:type="simple" xlink:show="embed" xlink:actuate="onLoad"/><draw:image xlink:href="./ObjectReplacements/Object 18" xlink:type="simple" xlink:show="embed" xlink:actuate="onLoad"/></draw:frame>).</text:p>
        </text:list-item>
        <text:list-item>
          <text:p text:style-name="P14">The length of a regular American football field is about <draw:frame draw:style-name="fr1" draw:name="Object19" text:anchor-type="as-char" svg:y="-0.1492in" svg:width="0.4102in" svg:height="0.1854in" draw:z-index="18"><draw:object xlink:href="./Object 19" xlink:type="simple" xlink:show="embed" xlink:actuate="onLoad"/><draw:image xlink:href="./ObjectReplacements/Object 19" xlink:type="simple" xlink:show="embed" xlink:actuate="onLoad"/></draw:frame>.</text:p>
        </text:list-item>
        <text:list-item>
          <text:p text:style-name="P14">The diameter of a normal dinner plate is <draw:frame draw:style-name="fr1" draw:name="Object20" text:anchor-type="as-char" svg:y="-0.1728in" svg:width="0.8071in" svg:height="0.2091in" draw:z-index="19"><draw:object xlink:href="./Object 20" xlink:type="simple" xlink:show="embed" xlink:actuate="onLoad"/><draw:image xlink:href="./ObjectReplacements/Object 20" xlink:type="simple" xlink:show="embed" xlink:actuate="onLoad"/></draw:frame><text:s/>(<draw:frame draw:style-name="fr1" draw:name="Object21" text:anchor-type="as-char" svg:y="-0.1492in" svg:width="0.4543in" svg:height="0.1854in" draw:z-index="20"><draw:object xlink:href="./Object 21" xlink:type="simple" xlink:show="embed" xlink:actuate="onLoad"/><draw:image xlink:href="./ObjectReplacements/Object 21" xlink:type="simple" xlink:show="embed" xlink:actuate="onLoad"/></draw:frame>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21:16:42.494352298</meta:creation-date>
    <dc:date>2026-06-09T20:25:46.969985208</dc:date>
    <meta:editing-duration>PT9M18S</meta:editing-duration>
    <meta:editing-cycles>8</meta:editing-cycles>
    <meta:generator>LibreOffice/25.8.5.2$Linux_X86_64 LibreOffice_project/580$Build-2</meta:generator>
    <meta:document-statistic meta:table-count="0" meta:image-count="0" meta:object-count="21" meta:page-count="3" meta:paragraph-count="59" meta:word-count="392" meta:character-count="2250" meta:non-whitespace-character-count="1943"/>
  </office:meta>
</office:document-meta>
</file>

<file path=Object 1/content.xml><?xml version="1.0" encoding="utf-8"?>
<math xmlns="http://www.w3.org/1998/Math/MathML" display="block">
  <semantics>
    <mtext>m</mtext>
    <annotation encoding="StarMath 5.0">"m"</annotation>
  </semantics>
</math>
</file>

<file path=Object 10/content.xml><?xml version="1.0" encoding="utf-8"?>
<math xmlns="http://www.w3.org/1998/Math/MathML" display="block">
  <semantics>
    <mrow>
      <mrow>
        <mn>2.3</mn>
        <mo stretchy="false">×</mo>
        <msup>
          <mn>10</mn>
          <mn>3</mn>
        </msup>
      </mrow>
      <mtext>m</mtext>
    </mrow>
    <annotation encoding="StarMath 5.0">2.3 times 10^3 "m"</annotation>
  </semantics>
</math>
</file>

<file path=Object 11/content.xml><?xml version="1.0" encoding="utf-8"?>
<math xmlns="http://www.w3.org/1998/Math/MathML" display="block">
  <semantics>
    <mrow>
      <mn>2300</mn>
      <mtext>m</mtext>
    </mrow>
    <annotation encoding="StarMath 5.0">2300 "m"</annotation>
  </semantics>
</math>
</file>

<file path=Object 12/content.xml><?xml version="1.0" encoding="utf-8"?>
<math xmlns="http://www.w3.org/1998/Math/MathML" display="block">
  <semantics>
    <mrow>
      <mn>2.3</mn>
      <mtext>km</mtext>
    </mrow>
    <annotation encoding="StarMath 5.0">2.3 "km"</annotation>
  </semantics>
</math>
</file>

<file path=Object 13/content.xml><?xml version="1.0" encoding="utf-8"?>
<math xmlns="http://www.w3.org/1998/Math/MathML" display="block">
  <semantics>
    <mrow>
      <mn>10</mn>
      <mtext>m</mtext>
    </mrow>
    <annotation encoding="StarMath 5.0">10 "m"</annotation>
  </semantics>
</math>
</file>

<file path=Object 14/content.xml><?xml version="1.0" encoding="utf-8"?>
<math xmlns="http://www.w3.org/1998/Math/MathML" display="block">
  <semantics>
    <mrow>
      <mn>1</mn>
      <mtext>m</mtext>
    </mrow>
    <annotation encoding="StarMath 5.0">1 "m"</annotation>
  </semantics>
</math>
</file>

<file path=Object 15/content.xml><?xml version="1.0" encoding="utf-8"?>
<math xmlns="http://www.w3.org/1998/Math/MathML" display="block">
  <semantics>
    <mrow>
      <mrow>
        <mn>2</mn>
        <mo stretchy="false">×</mo>
        <msup>
          <mn>10</mn>
          <mrow>
            <mo stretchy="false">−</mo>
            <mn>2</mn>
          </mrow>
        </msup>
      </mrow>
      <mtext>m</mtext>
    </mrow>
    <annotation encoding="StarMath 5.0">2 times 10^-2 "m"</annotation>
  </semantics>
</math>
</file>

<file path=Object 16/content.xml><?xml version="1.0" encoding="utf-8"?>
<math xmlns="http://www.w3.org/1998/Math/MathML" display="block">
  <semantics>
    <mrow>
      <mn>0.02</mn>
      <mtext>m</mtext>
    </mrow>
    <annotation encoding="StarMath 5.0">0.02 "m"</annotation>
  </semantics>
</math>
</file>

<file path=Object 17/content.xml><?xml version="1.0" encoding="utf-8"?>
<math xmlns="http://www.w3.org/1998/Math/MathML" display="block">
  <semantics>
    <mrow>
      <mrow>
        <mn>1</mn>
        <mo stretchy="false">×</mo>
        <msup>
          <mn>10</mn>
          <mrow>
            <mo stretchy="false">−</mo>
            <mn>4</mn>
          </mrow>
        </msup>
      </mrow>
      <mtext>m</mtext>
    </mrow>
    <annotation encoding="StarMath 5.0">1 times 10^-4 "m"</annotation>
  </semantics>
</math>
</file>

<file path=Object 18/content.xml><?xml version="1.0" encoding="utf-8"?>
<math xmlns="http://www.w3.org/1998/Math/MathML" display="block">
  <semantics>
    <mrow>
      <mn>0.0001</mn>
      <mtext>m</mtext>
    </mrow>
    <annotation encoding="StarMath 5.0">0.0001 "m"</annotation>
  </semantics>
</math>
</file>

<file path=Object 19/content.xml><?xml version="1.0" encoding="utf-8"?>
<math xmlns="http://www.w3.org/1998/Math/MathML" display="block">
  <semantics>
    <mrow>
      <mn>100</mn>
      <mtext>m</mtext>
    </mrow>
    <annotation encoding="StarMath 5.0">100 "m"</annotation>
  </semantics>
</math>
</file>

<file path=Object 2/content.xml><?xml version="1.0" encoding="utf-8"?>
<math xmlns="http://www.w3.org/1998/Math/MathML" display="block">
  <semantics>
    <mtext>s</mtext>
    <annotation encoding="StarMath 5.0">"s"</annotation>
  </semantics>
</math>
</file>

<file path=Object 20/content.xml><?xml version="1.0" encoding="utf-8"?>
<math xmlns="http://www.w3.org/1998/Math/MathML" display="block">
  <semantics>
    <mrow>
      <mrow>
        <mn>2.5</mn>
        <mo stretchy="false">×</mo>
        <msup>
          <mn>10</mn>
          <mrow>
            <mo stretchy="false">−</mo>
            <mn>1</mn>
          </mrow>
        </msup>
      </mrow>
      <mtext>m</mtext>
    </mrow>
    <annotation encoding="StarMath 5.0">2.5 times 10^-1 "m"</annotation>
  </semantics>
</math>
</file>

<file path=Object 21/content.xml><?xml version="1.0" encoding="utf-8"?>
<math xmlns="http://www.w3.org/1998/Math/MathML" display="block">
  <semantics>
    <mrow>
      <mn>0.25</mn>
      <mtext>m</mtext>
    </mrow>
    <annotation encoding="StarMath 5.0">0.25 "m"</annotation>
  </semantics>
</math>
</file>

<file path=Object 3/content.xml><?xml version="1.0" encoding="utf-8"?>
<math xmlns="http://www.w3.org/1998/Math/MathML" display="block">
  <semantics>
    <mrow>
      <mtext>m</mtext>
      <mo stretchy="false">/</mo>
      <mtext>s</mtext>
    </mrow>
    <annotation encoding="StarMath 5.0">"m" / "s"</annotation>
  </semantics>
</math>
</file>

<file path=Object 4/content.xml><?xml version="1.0" encoding="utf-8"?>
<math xmlns="http://www.w3.org/1998/Math/MathML" display="block">
  <semantics>
    <mtext>kg</mtext>
    <annotation encoding="StarMath 5.0">"kg"</annotation>
  </semantics>
</math>
</file>

<file path=Object 5/content.xml><?xml version="1.0" encoding="utf-8"?>
<math xmlns="http://www.w3.org/1998/Math/MathML" display="block">
  <semantics>
    <mrow>
      <mtext>kg</mtext>
      <mo stretchy="false">⋅</mo>
      <mtext>m</mtext>
      <mo stretchy="false">/</mo>
      <mtext>s</mtext>
    </mrow>
    <annotation encoding="StarMath 5.0">"kg" cdot "m" / "s"</annotation>
  </semantics>
</math>
</file>

<file path=Object 6/content.xml><?xml version="1.0" encoding="utf-8"?>
<math xmlns="http://www.w3.org/1998/Math/MathML" display="block">
  <semantics>
    <mtext>N</mtext>
    <annotation encoding="StarMath 5.0">"N"</annotation>
  </semantics>
</math>
</file>

<file path=Object 7/content.xml><?xml version="1.0" encoding="utf-8"?>
<math xmlns="http://www.w3.org/1998/Math/MathML" display="block">
  <semantics>
    <mtext>J</mtext>
    <annotation encoding="StarMath 5.0">"J"</annotation>
  </semantics>
</math>
</file>

<file path=Object 8/content.xml><?xml version="1.0" encoding="utf-8"?>
<math xmlns="http://www.w3.org/1998/Math/MathML" display="block">
  <semantics>
    <mrow>
      <mn>2,300,000,000,000</mn>
      <mtext>m</mtext>
    </mrow>
    <annotation encoding="StarMath 5.0">2,300,000,000,000 "m"</annotation>
  </semantics>
</math>
</file>

<file path=Object 9/content.xml><?xml version="1.0" encoding="utf-8"?>
<math xmlns="http://www.w3.org/1998/Math/MathML" display="block">
  <semantics>
    <mrow>
      <mrow>
        <mn>2.3</mn>
        <mo stretchy="false">×</mo>
        <msup>
          <mn>10</mn>
          <mn>12</mn>
        </msup>
      </mrow>
      <mtext>m</mtext>
    </mrow>
    <annotation encoding="StarMath 5.0">2.3 times 10^12 "m"</annotation>
  </semantics>
</math>
</file>
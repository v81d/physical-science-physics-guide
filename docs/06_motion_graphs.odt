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Configurations2/" manifest:media-type="application/vnd.sun.xml.ui.configuration"/>
  <manifest:file-entry manifest:full-path="meta.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hiron Hei HK ExtraLight" svg:font-family="'Chiron Hei HK Extra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123fc99" officeooo:paragraph-rsid="001dc2ea"/>
    </style:style>
    <style:style style:name="P2" style:family="paragraph" style:parent-style-name="Text_20_body">
      <style:paragraph-properties fo:text-align="center" style:justify-single-word="false"/>
      <style:text-properties fo:font-style="normal" officeooo:rsid="0123fc99" officeooo:paragraph-rsid="001dc2ea" style:font-style-asian="normal" style:font-style-complex="normal"/>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Contents_20_3">
      <style:paragraph-properties>
        <style:tab-stops>
          <style:tab-stop style:position="6.5307in" style:type="right" style:leader-style="dotted" style:leader-text="."/>
        </style:tab-stops>
      </style:paragraph-properties>
    </style:style>
    <style:style style:name="P6" style:family="paragraph" style:parent-style-name="Heading_20_1" style:list-style-name="">
      <style:text-properties officeooo:rsid="004c7a21" officeooo:paragraph-rsid="001dc2ea"/>
    </style:style>
    <style:style style:name="P7" style:family="paragraph" style:parent-style-name="Heading_20_1">
      <style:paragraph-properties fo:break-before="page"/>
      <style:text-properties officeooo:rsid="0123fc99" officeooo:paragraph-rsid="001dc2ea"/>
    </style:style>
    <style:style style:name="P8" style:family="paragraph" style:parent-style-name="Text_20_body">
      <style:text-properties fo:font-weight="bold" officeooo:rsid="0123fc99" officeooo:paragraph-rsid="001dc2ea" style:font-weight-asian="bold" style:font-weight-complex="bold"/>
    </style:style>
    <style:style style:name="P9" style:family="paragraph" style:parent-style-name="Heading_20_1">
      <style:text-properties officeooo:rsid="0123fc99" officeooo:paragraph-rsid="001dc2ea"/>
    </style:style>
    <style:style style:name="P10" style:family="paragraph" style:parent-style-name="Text_20_body">
      <style:text-properties officeooo:rsid="0123fc99" officeooo:paragraph-rsid="001dc2ea"/>
    </style:style>
    <style:style style:name="P11" style:family="paragraph" style:parent-style-name="Text_20_body" style:list-style-name="L1">
      <style:text-properties officeooo:rsid="0123fc99" officeooo:paragraph-rsid="001dc2ea"/>
    </style:style>
    <style:style style:name="P12" style:family="paragraph" style:parent-style-name="Heading_20_2">
      <style:text-properties officeooo:rsid="0123fc99" officeooo:paragraph-rsid="001dc2ea"/>
    </style:style>
    <style:style style:name="P13" style:family="paragraph" style:parent-style-name="Text_20_body" style:list-style-name="L2">
      <style:text-properties fo:font-weight="normal" officeooo:rsid="0123fc99" officeooo:paragraph-rsid="001dc2ea" style:font-weight-asian="normal" style:font-weight-complex="normal"/>
    </style:style>
    <style:style style:name="P14" style:family="paragraph" style:parent-style-name="Text_20_body">
      <style:text-properties fo:font-weight="normal" officeooo:rsid="0123fc99" officeooo:paragraph-rsid="001dc2ea" style:font-weight-asian="normal" style:font-weight-complex="normal"/>
    </style:style>
    <style:style style:name="P15" style:family="paragraph" style:parent-style-name="Heading_20_3">
      <style:text-properties officeooo:rsid="0123fc99" officeooo:paragraph-rsid="001dc2ea"/>
    </style:style>
    <style:style style:name="P16" style:family="paragraph" style:parent-style-name="Text_20_body" style:list-style-name="L3">
      <style:text-properties officeooo:rsid="0123fc99" officeooo:paragraph-rsid="001dc2ea"/>
    </style:style>
    <style:style style:name="P17" style:family="paragraph" style:parent-style-name="Text_20_body" style:list-style-name="L3">
      <style:paragraph-properties fo:text-align="center" style:justify-single-word="false"/>
      <style:text-properties fo:font-weight="normal" officeooo:rsid="0123fc99" officeooo:paragraph-rsid="001dc2ea" style:font-weight-asian="normal" style:font-weight-complex="normal"/>
    </style:style>
    <style:style style:name="P18" style:family="paragraph" style:parent-style-name="Text_20_body" style:list-style-name="L3">
      <style:text-properties fo:font-weight="normal" officeooo:rsid="0123fc99" officeooo:paragraph-rsid="001dc2ea" style:font-weight-asian="normal" style:font-weight-complex="normal"/>
    </style:style>
    <style:style style:name="P19" style:family="paragraph" style:parent-style-name="Heading_20_2">
      <style:text-properties officeooo:rsid="012a30b1" officeooo:paragraph-rsid="001dc2ea"/>
    </style:style>
    <style:style style:name="P20" style:family="paragraph" style:parent-style-name="Text_20_body">
      <style:text-properties fo:font-weight="bold" officeooo:rsid="012a30b1" officeooo:paragraph-rsid="001dc2ea" style:font-weight-asian="bold" style:font-weight-complex="bold"/>
    </style:style>
    <style:style style:name="P21" style:family="paragraph" style:parent-style-name="Text_20_body" style:list-style-name="L4">
      <style:text-properties fo:font-weight="normal" officeooo:rsid="0123fc99" officeooo:paragraph-rsid="001dc2ea" style:font-weight-asian="normal" style:font-weight-complex="normal"/>
    </style:style>
    <style:style style:name="P22" style:family="paragraph" style:parent-style-name="Text_20_body">
      <style:text-properties fo:font-weight="normal" officeooo:rsid="012b2381" officeooo:paragraph-rsid="001dc2e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officeooo:rsid="012a30b1" style:font-weight-asian="normal" style:font-weight-complex="normal"/>
    </style:style>
    <style:style style:name="T4" style:family="text">
      <style:text-properties fo:font-weight="bold" officeooo:rsid="01266536" style:font-weight-asian="bold" style:font-weight-complex="bold"/>
    </style:style>
    <style:style style:name="T5" style:family="text">
      <style:text-properties officeooo:rsid="0126d3f6"/>
    </style:style>
    <style:style style:name="T6" style:family="text">
      <style:text-properties fo:font-weight="bold" officeooo:rsid="0126d3f6" style:font-weight-asian="bold" style:font-weight-complex="bold"/>
    </style:style>
    <style:style style:name="T7" style:family="text">
      <style:text-properties officeooo:rsid="012a30b1"/>
    </style:style>
    <style:style style:name="T8" style:family="text">
      <style:text-properties fo:font-weight="bold" officeooo:rsid="012a30b1" style:font-weight-asian="bold" style:font-weight-complex="bold"/>
    </style:style>
    <style:style style:name="T9" style:family="text">
      <style:text-properties fo:font-weight="bold" officeooo:rsid="012b2381" style:font-weight-asian="bold" style:font-weight-complex="bol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tion Graphs<text:bookmark-start text:name="__DdeLink__138_391587487"/><text:bookmark-start text:name="__DdeLink__502_3041763869"/></text:p>
      <text:p text:style-name="P2">October 8, 202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627_4069653955" office:name="­" text:style-name="Index_20_Link" text:visited-style-name="Index_20_Link">­<text:tab/>1</text:a></text:p>
          <text:p text:style-name="P3"><text:a xlink:type="simple" xlink:href="#__RefHeading___Toc1092_207463880" office:name="Introduction to Motion Graphs" text:style-name="Index_20_Link" text:visited-style-name="Index_20_Link">Introduction to Motion Graphs<text:tab/>2</text:a></text:p>
          <text:p text:style-name="P3"><text:a xlink:type="simple" xlink:href="#__RefHeading___Toc1094_207463880" office:name="Drawing Motion Graphs" text:style-name="Index_20_Link" text:visited-style-name="Index_20_Link">Drawing Motion Graphs<text:tab/>2</text:a></text:p>
          <text:p text:style-name="P4"><text:a xlink:type="simple" xlink:href="#__RefHeading___Toc1096_207463880" office:name="Distance-Time Graphs" text:style-name="Index_20_Link" text:visited-style-name="Index_20_Link">Distance-Time Graphs<text:tab/>2</text:a></text:p>
          <text:p text:style-name="P5"><text:a xlink:type="simple" xlink:href="#__RefHeading___Toc1098_207463880" office:name="Distance-Time Graphs with Acceleration" text:style-name="Index_20_Link" text:visited-style-name="Index_20_Link">Distance-Time Graphs with Acceleration<text:tab/>2</text:a></text:p>
          <text:p text:style-name="P4"><text:a xlink:type="simple" xlink:href="#__RefHeading___Toc1100_207463880" office:name="Velocity-Time Graphs" text:style-name="Index_20_Link" text:visited-style-name="Index_20_Link">Velocity-Time Graphs<text:tab/>4</text:a></text:p>
        </text:index-body>
      </text:table-of-content>
      <text:h text:style-name="P6" text:outline-level="1"><text:bookmark-start text:name="__RefHeading___Toc627_4069653955"/>­<text:bookmark-end text:name="__RefHeading___Toc627_4069653955"/></text:h>
      <text:h text:style-name="P7" text:outline-level="1"><text:bookmark-end text:name="__DdeLink__502_3041763869"/><text:bookmark-end text:name="__DdeLink__138_391587487"/><text:bookmark-start text:name="__RefHeading___Toc1092_207463880"/>Introduction to Motion Graphs<text:bookmark-end text:name="__RefHeading___Toc1092_207463880"/></text:h>
      <text:p text:style-name="P8">Motion graphs<text:span text:style-name="T1"> are used to represent the relationship between time and distance or time and velocity.</text:span></text:p>
      <text:h text:style-name="P9" text:outline-level="1"><text:bookmark-start text:name="__RefHeading___Toc1094_207463880"/>Drawing Motion Graphs<text:bookmark-end text:name="__RefHeading___Toc1094_207463880"/></text:h>
      <text:p text:style-name="P10">When drawing a motion garph, there are important considerations to be aware of:</text:p>
      <text:list text:style-name="L1">
        <text:list-item>
          <text:p text:style-name="P11">Make sure the <draw:frame draw:style-name="fr1" draw:name="Object1" text:anchor-type="as-char" svg:y="-0.1492in" svg:width="0.0925in" svg:height="0.1854in" draw:z-index="0"><draw:object xlink:href="./Object 1" xlink:type="simple" xlink:show="embed" xlink:actuate="onLoad"/><draw:image xlink:href="./ObjectReplacements/Object 1" xlink:type="simple" xlink:show="embed" xlink:actuate="onLoad"/><svg:desc>formula</svg:desc></draw:frame>- and <draw:frame draw:style-name="fr1" draw:name="Object2" text:anchor-type="as-char" svg:y="-0.1492in" svg:width="0.1063in" svg:height="0.1854in" draw:z-index="1"><draw:object xlink:href="./Object 2" xlink:type="simple" xlink:show="embed" xlink:actuate="onLoad"/><draw:image xlink:href="./ObjectReplacements/Object 2" xlink:type="simple" xlink:show="embed" xlink:actuate="onLoad"/><svg:desc>formula</svg:desc></draw:frame>-axes are labeled with the correct units of measurement.</text:p>
        </text:list-item>
        <text:list-item>
          <text:p text:style-name="P11">Keep the increment consistent across an axis. One way to approximate the increment of an axis is to divide the value of the greatest point on that axis by the number of grid lines intersecting the axis.</text:p>
        </text:list-item>
        <text:list-item>
          <text:p text:style-name="P11">Accurately plot points and estimate the <text:span text:style-name="T2">line or curve of best fit</text:span><text:span text:style-name="T1">.</text:span></text:p>
        </text:list-item>
      </text:list>
      <text:h text:style-name="P12" text:outline-level="2"><text:bookmark-start text:name="__RefHeading___Toc1096_207463880"/>Distance-Time Graphs<text:bookmark-end text:name="__RefHeading___Toc1096_207463880"/></text:h>
      <text:p text:style-name="P8">Distance-time graphs<text:span text:style-name="T1"> show the relationship between time and distance of an object. The most common forms </text:span><text:span text:style-name="T3">in which </text:span><text:span text:style-name="T1">they can appear are:</text:span></text:p>
      <text:list text:style-name="L2">
        <text:list-item>
          <text:p text:style-name="P13"><text:bookmark-start text:name="__DdeLink__997_207463880"/>A horizontal line, meaning the object is <text:span text:style-name="T2">at rest</text:span>.</text:p>
        </text:list-item>
        <text:list-item>
          <text:p text:style-name="P13">A constantly increasing or decreasing line, meaning the object is at a<text:span text:style-name="T2"> constant velocity</text:span>.</text:p>
        </text:list-item>
        <text:list-item>
          <text:p text:style-name="P13">An exponentially increasing or decreasing curve, meaning the object is <text:span text:style-name="T2">accelerating</text:span>.<text:bookmark-end text:name="__DdeLink__997_207463880"/></text:p>
        </text:list-item>
      </text:list>
      <text:p text:style-name="P14">The slope of any distance-time graph represents the <text:span text:style-name="T2">velocity</text:span> of the object.</text:p>
      <text:h text:style-name="P15" text:outline-level="3"><text:bookmark-start text:name="__RefHeading___Toc1098_207463880"/>Distance-Time Graphs with Acceleration<text:bookmark-end text:name="__RefHeading___Toc1098_207463880"/></text:h>
      <text:p text:style-name="P10"><text:bookmark-start text:name="__DdeLink__894_207463880"/>Distance-time graphs can depict an accelerating object. However, it is important to be aware of the four primary shapes a distance-time graph representing acceleration can produce:</text:p>
      <text:list text:style-name="L3">
        <text:list-item>
          <text:p text:style-name="P16"><text:bookmark-start text:name="__DdeLink__958_207463880"/>If the object is speeding up forward, its velocity becomes <text:span text:style-name="T2">increasingly positive</text:span><text:span text:style-name="T1">, so</text:span> its curve <text:span text:style-name="T2">bends upward</text:span><text:span text:style-name="T1">.</text:span></text:p>
          <text:p text:style-name="P17"><draw:frame draw:style-name="fr2" draw:name="Object3" text:anchor-type="as-char" svg:width="3.9311in" svg:height="2.2102in" draw:z-index="2"><draw:object xlink:href="./Object 3" xlink:type="simple" xlink:show="embed" xlink:actuate="onLoad"/><draw:image xlink:href="./ObjectReplacements/Object 3" xlink:type="simple" xlink:show="embed" xlink:actuate="onLoad"/><svg:desc>chart</svg:desc></draw:frame></text:p>
        </text:list-item>
        <text:list-item>
          <text:p text:style-name="P18"><text:soft-page-break/>If the object is speeding up backward, its velocity becomes <text:span text:style-name="T2">increasingly negative</text:span>, so its curve <text:span text:style-name="T2">bends downward</text:span>.</text:p>
          <text:p text:style-name="P17"><draw:frame draw:style-name="fr2" draw:name="Object4" text:anchor-type="as-char" svg:width="3.9311in" svg:height="2.2102in" draw:z-index="3"><draw:object xlink:href="./Object 4" xlink:type="simple" xlink:show="embed" xlink:actuate="onLoad"/><draw:image xlink:href="./ObjectReplacements/Object 4" xlink:type="simple" xlink:show="embed" xlink:actuate="onLoad"/><svg:desc>chart</svg:desc></draw:frame></text:p>
        </text:list-item>
        <text:list-item>
          <text:p text:style-name="P18"><text:bookmark-start text:name="__DdeLink__896_207463880"/>If the object is slowing down forward, its velocity is positive but <text:span text:style-name="T2">decreases toward zero</text:span>,<text:span text:style-name="T2"> </text:span>so its curve <text:bookmark-end text:name="__DdeLink__894_207463880"/>rises but <text:span text:style-name="T2">levels off </text:span><text:span text:style-name="T4">above</text:span>.<text:bookmark-end text:name="__DdeLink__896_207463880"/></text:p>
          <text:p text:style-name="P17"><draw:frame draw:style-name="fr2" draw:name="Object5" text:anchor-type="as-char" svg:width="3.9311in" svg:height="2.2102in" draw:z-index="4"><draw:object xlink:href="./Object 5" xlink:type="simple" xlink:show="embed" xlink:actuate="onLoad"/><draw:image xlink:href="./ObjectReplacements/Object 5" xlink:type="simple" xlink:show="embed" xlink:actuate="onLoad"/><svg:desc>chart</svg:desc></draw:frame></text:p>
        </text:list-item>
        <text:list-item>
          <text:p text:style-name="P18">If the object is slowing down backward, its velocity is <text:span text:style-name="T5">negative</text:span> but<text:span text:style-name="T2"> </text:span><text:span text:style-name="T6">increases</text:span><text:span text:style-name="T2"> toward zero</text:span>,<text:span text:style-name="T2"> </text:span>so its curve falls but <text:span text:style-name="T2">levels off </text:span><text:span text:style-name="T4">below</text:span>.<text:bookmark-end text:name="__DdeLink__958_207463880"/></text:p>
          <text:p text:style-name="P17"><draw:frame draw:style-name="fr2" draw:name="Object16" text:anchor-type="as-char" svg:width="3.9311in" svg:height="2.2102in" draw:z-index="5"><draw:object xlink:href="./Object 6" xlink:type="simple" xlink:show="embed" xlink:actuate="onLoad"/><draw:image xlink:href="./ObjectReplacements/Object 6" xlink:type="simple" xlink:show="embed" xlink:actuate="onLoad"/><svg:desc>chart</svg:desc></draw:frame></text:p>
        </text:list-item>
      </text:list>
      <text:h text:style-name="P19" text:outline-level="2"><text:bookmark-start text:name="__RefHeading___Toc1100_207463880"/><text:soft-page-break/>Velocity-Time Graphs<text:bookmark-end text:name="__RefHeading___Toc1100_207463880"/></text:h>
      <text:p text:style-name="P20">Velocity-time graphs<text:span text:style-name="T1"> depict the relationship between time and velocity. The main shapes they can produce are:</text:span></text:p>
      <text:list text:style-name="L4">
        <text:list-item>
          <text:p text:style-name="P21">A horizontal line, meaning the object is <text:span text:style-name="T7">traveling at a </text:span><text:span text:style-name="T8">constant velocity</text:span>.</text:p>
        </text:list-item>
        <text:list-item>
          <text:p text:style-name="P21">A constantly increasing or decreasing line, meaning the object is <text:span text:style-name="T8">accelerating uniformly</text:span>.</text:p>
        </text:list-item>
        <text:list-item>
          <text:p text:style-name="P21">An exponentially increasing or decreasing curve, meaning the object <text:span text:style-name="T7">is </text:span><text:span text:style-name="T8">accelerating </text:span><text:span text:style-name="T9">at a non-constant rate</text:span>.</text:p>
        </text:list-item>
      </text:list>
      <text:p text:style-name="P22">The slope value of any velocity-time graph is the <text:span text:style-name="T2">rate of acceleration</text:span>. The area under a velocity-time graph is the <text:span text:style-name="T2">displacement</text:span> of the objec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hiron Hei HK ExtraLight" svg:font-family="'Chiron Hei HK Extra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Chiron Hei HK ExtraLight"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hiron Hei HK ExtraLight"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31T14:13:00.953938585</meta:creation-date>
    <dc:date>2026-05-31T14:54:00.029432875</dc:date>
    <meta:editing-duration>PT1M15S</meta:editing-duration>
    <meta:editing-cycles>2</meta:editing-cycles>
    <meta:generator>LibreOffice/25.8.5.2$Linux_X86_64 LibreOffice_project/580$Build-2</meta:generator>
    <meta:document-statistic meta:table-count="0" meta:image-count="0" meta:object-count="6" meta:page-count="4" meta:paragraph-count="39" meta:word-count="408" meta:character-count="2470" meta:non-whitespace-character-count="2114"/>
  </office:meta>
</office:document-meta>
</file>

<file path=Object 1/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i>y</mi>
    <annotation encoding="StarMath 5.0">y</annotation>
  </semantics>
</math>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13pt" style:font-size-asian="13pt" style:font-size-complex="13pt"/>
    </style:style>
    <style:style style:name="ch6"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9.985cm" svg:height="5.614cm" xlink:href="." xlink:type="simple" chart:class="chart:scatter" chart:style-name="ch1">
        <chart:title svg:x="2.009cm" svg:y="0.248cm" chart:style-name="ch2">
          <text:p>Object Speeding Up Forward</text:p>
        </chart:title>
        <chart:plot-area chart:style-name="ch3" svg:x="1.21cm" svg:y="1.139cm" svg:width="8.576cm" svg:height="3.382cm">
          <chart:coordinate-region svg:x="1.844cm" svg:y="1.338cm" svg:width="7.845cm" svg:height="2.536cm"/>
          <chart:axis chart:dimension="x" chart:name="primary-x" chart:style-name="ch4" chartooo:axis-type="auto">
            <chart:title svg:x="4.859cm" svg:y="4.633cm" chart:style-name="ch2">
              <text:p><text:span text:style-name="T1">Time (s)</text:span></text:p>
            </chart:title>
            <chart:categories table:cell-range-address="local-table.$A$2:.$A$7"/>
          </chart:axis>
          <chart:axis chart:dimension="y" chart:name="primary-y" chart:style-name="ch4">
            <chart:title svg:x="0.451cm" svg:y="3.787cm" chart:style-name="ch5">
              <text:p><text:span text:style-name="T1">Distance (m)</text:span></text:p>
            </chart:title>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1</text:p>
              </table:table-cell>
            </table:table-row>
          </table:table-header-rows>
          <table:table-rows>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2">
                <text:p>2</text:p>
              </table:table-cell>
              <table:table-cell office:value-type="float" office:value="4">
                <text:p>4</text:p>
              </table:table-cell>
            </table:table-row>
            <table:table-row>
              <table:table-cell office:value-type="string">
                <text:p/>
              </table:table-cell>
              <table:table-cell office:value-type="float" office:value="3">
                <text:p>3</text:p>
              </table:table-cell>
              <table:table-cell office:value-type="float" office:value="9">
                <text:p>9</text:p>
              </table:table-cell>
            </table:table-row>
            <table:table-row>
              <table:table-cell office:value-type="string">
                <text:p/>
              </table:table-cell>
              <table:table-cell office:value-type="float" office:value="4">
                <text:p>4</text:p>
              </table:table-cell>
              <table:table-cell office:value-type="float" office:value="16">
                <text:p>16</text:p>
              </table:table-cell>
            </table:table-row>
            <table:table-row>
              <table:table-cell office:value-type="string">
                <text:p/>
              </table:table-cell>
              <table:table-cell office:value-type="float" office:value="5">
                <text:p>5</text:p>
              </table:table-cell>
              <table:table-cell office:value-type="float" office:value="25">
                <text:p>2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5.2$Linux_X86_64 LibreOffice_project/58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13pt" style:font-size-asian="13pt" style:font-size-complex="13pt"/>
    </style:style>
    <style:style style:name="ch6"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9.985cm" svg:height="5.614cm" xlink:href="." xlink:type="simple" chart:class="chart:scatter" chart:style-name="ch1">
        <chart:title svg:x="1.846cm" svg:y="0.248cm" chart:style-name="ch2">
          <text:p>Object Speeding Up Backward</text:p>
        </chart:title>
        <chart:plot-area chart:style-name="ch3" svg:x="1.21cm" svg:y="1.139cm" svg:width="8.576cm" svg:height="3.382cm">
          <chart:coordinate-region svg:x="1.958cm" svg:y="1.338cm" svg:width="7.731cm" svg:height="2.984cm"/>
          <chart:axis chart:dimension="x" chart:name="primary-x" chart:style-name="ch4" chartooo:axis-type="auto">
            <chart:title svg:x="4.859cm" svg:y="4.633cm" chart:style-name="ch2">
              <text:p><text:span text:style-name="T1">Time (s)</text:span></text:p>
            </chart:title>
            <chart:categories table:cell-range-address="local-table.$A$2:.$A$7"/>
          </chart:axis>
          <chart:axis chart:dimension="y" chart:name="primary-y" chart:style-name="ch4">
            <chart:title svg:x="0.451cm" svg:y="3.787cm" chart:style-name="ch5">
              <text:p><text:span text:style-name="T1">Distance (m)</text:span></text:p>
            </chart:title>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1</text:p>
              </table:table-cell>
            </table:table-row>
          </table:table-header-rows>
          <table:table-rows>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2">
                <text:p>2</text:p>
              </table:table-cell>
              <table:table-cell office:value-type="float" office:value="-4">
                <text:p>-4</text:p>
              </table:table-cell>
            </table:table-row>
            <table:table-row>
              <table:table-cell office:value-type="string">
                <text:p/>
              </table:table-cell>
              <table:table-cell office:value-type="float" office:value="3">
                <text:p>3</text:p>
              </table:table-cell>
              <table:table-cell office:value-type="float" office:value="-9">
                <text:p>-9</text:p>
              </table:table-cell>
            </table:table-row>
            <table:table-row>
              <table:table-cell office:value-type="string">
                <text:p/>
              </table:table-cell>
              <table:table-cell office:value-type="float" office:value="4">
                <text:p>4</text:p>
              </table:table-cell>
              <table:table-cell office:value-type="float" office:value="-16">
                <text:p>-16</text:p>
              </table:table-cell>
            </table:table-row>
            <table:table-row>
              <table:table-cell office:value-type="string">
                <text:p/>
              </table:table-cell>
              <table:table-cell office:value-type="float" office:value="5">
                <text:p>5</text:p>
              </table:table-cell>
              <table:table-cell office:value-type="float" office:value="-25">
                <text:p>-2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5.2$Linux_X86_64 LibreOffice_project/58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13pt" style:font-size-asian="13pt" style:font-size-complex="13pt"/>
    </style:style>
    <style:style style:name="ch6"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9.985cm" svg:height="5.614cm" xlink:href="." xlink:type="simple" chart:class="chart:scatter" chart:style-name="ch1">
        <chart:title svg:x="1.884cm" svg:y="0.248cm" chart:style-name="ch2">
          <text:p>Object Slowing Down Forward</text:p>
        </chart:title>
        <chart:plot-area chart:style-name="ch3" svg:x="1.21cm" svg:y="1.139cm" svg:width="8.576cm" svg:height="3.382cm">
          <chart:coordinate-region svg:x="1.844cm" svg:y="1.338cm" svg:width="7.845cm" svg:height="2.536cm"/>
          <chart:axis chart:dimension="x" chart:name="primary-x" chart:style-name="ch4" chartooo:axis-type="auto">
            <chart:title svg:x="4.859cm" svg:y="4.633cm" chart:style-name="ch2">
              <text:p><text:span text:style-name="T1">Time (s)</text:span></text:p>
            </chart:title>
            <chart:categories table:cell-range-address="local-table.$A$2:.$A$7"/>
          </chart:axis>
          <chart:axis chart:dimension="y" chart:name="primary-y" chart:style-name="ch4">
            <chart:title svg:x="0.451cm" svg:y="3.787cm" chart:style-name="ch5">
              <text:p><text:span text:style-name="T1">Distance (m)</text:span></text:p>
            </chart:title>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1</text:p>
              </table:table-cell>
            </table:table-row>
          </table:table-header-rows>
          <table:table-rows>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5.5">
                <text:p>5.5</text:p>
              </table:table-cell>
            </table:table-row>
            <table:table-row>
              <table:table-cell office:value-type="string">
                <text:p/>
              </table:table-cell>
              <table:table-cell office:value-type="float" office:value="2">
                <text:p>2</text:p>
              </table:table-cell>
              <table:table-cell office:value-type="float" office:value="8.16">
                <text:p>8.16</text:p>
              </table:table-cell>
            </table:table-row>
            <table:table-row>
              <table:table-cell office:value-type="string">
                <text:p/>
              </table:table-cell>
              <table:table-cell office:value-type="float" office:value="3">
                <text:p>3</text:p>
              </table:table-cell>
              <table:table-cell office:value-type="float" office:value="9.27">
                <text:p>9.27</text:p>
              </table:table-cell>
            </table:table-row>
            <table:table-row>
              <table:table-cell office:value-type="string">
                <text:p/>
              </table:table-cell>
              <table:table-cell office:value-type="float" office:value="4">
                <text:p>4</text:p>
              </table:table-cell>
              <table:table-cell office:value-type="float" office:value="9.72">
                <text:p>9.72</text:p>
              </table:table-cell>
            </table:table-row>
            <table:table-row>
              <table:table-cell office:value-type="string">
                <text:p/>
              </table:table-cell>
              <table:table-cell office:value-type="float" office:value="5">
                <text:p>5</text:p>
              </table:table-cell>
              <table:table-cell office:value-type="float" office:value="9.9">
                <text:p>9.9</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5.2$Linux_X86_64 LibreOffice_project/58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13pt" style:font-size-asian="13pt" style:font-size-complex="13pt"/>
    </style:style>
    <style:style style:name="ch6"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9.985cm" svg:height="5.614cm" xlink:href="." xlink:type="simple" chart:class="chart:scatter" chart:style-name="ch1">
        <chart:title svg:x="1.721cm" svg:y="0.248cm" chart:style-name="ch2">
          <text:p>Object Slowing Down Backward</text:p>
        </chart:title>
        <chart:plot-area chart:style-name="ch3" svg:x="1.21cm" svg:y="1.139cm" svg:width="8.576cm" svg:height="3.382cm">
          <chart:coordinate-region svg:x="1.958cm" svg:y="1.338cm" svg:width="7.731cm" svg:height="2.984cm"/>
          <chart:axis chart:dimension="x" chart:name="primary-x" chart:style-name="ch4" chartooo:axis-type="auto">
            <chart:title svg:x="4.859cm" svg:y="4.633cm" chart:style-name="ch2">
              <text:p><text:span text:style-name="T1">Time (s)</text:span></text:p>
            </chart:title>
            <chart:categories table:cell-range-address="local-table.$A$2:.$A$7"/>
          </chart:axis>
          <chart:axis chart:dimension="y" chart:name="primary-y" chart:style-name="ch4">
            <chart:title svg:x="0.451cm" svg:y="3.787cm" chart:style-name="ch5">
              <text:p><text:span text:style-name="T1">Distance (m)</text:span></text:p>
            </chart:title>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1</text:p>
              </table:table-cell>
            </table:table-row>
          </table:table-header-rows>
          <table:table-rows>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5.5">
                <text:p>-5.5</text:p>
              </table:table-cell>
            </table:table-row>
            <table:table-row>
              <table:table-cell office:value-type="string">
                <text:p/>
              </table:table-cell>
              <table:table-cell office:value-type="float" office:value="2">
                <text:p>2</text:p>
              </table:table-cell>
              <table:table-cell office:value-type="float" office:value="-8.16">
                <text:p>-8.16</text:p>
              </table:table-cell>
            </table:table-row>
            <table:table-row>
              <table:table-cell office:value-type="string">
                <text:p/>
              </table:table-cell>
              <table:table-cell office:value-type="float" office:value="3">
                <text:p>3</text:p>
              </table:table-cell>
              <table:table-cell office:value-type="float" office:value="-9.27">
                <text:p>-9.27</text:p>
              </table:table-cell>
            </table:table-row>
            <table:table-row>
              <table:table-cell office:value-type="string">
                <text:p/>
              </table:table-cell>
              <table:table-cell office:value-type="float" office:value="4">
                <text:p>4</text:p>
              </table:table-cell>
              <table:table-cell office:value-type="float" office:value="-9.72">
                <text:p>-9.72</text:p>
              </table:table-cell>
            </table:table-row>
            <table:table-row>
              <table:table-cell office:value-type="string">
                <text:p/>
              </table:table-cell>
              <table:table-cell office:value-type="float" office:value="5">
                <text:p>5</text:p>
              </table:table-cell>
              <table:table-cell office:value-type="float" office:value="-9.9">
                <text:p>-9.9</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5.2$Linux_X86_64 LibreOffice_project/580$Build-2</meta:generator>
  </office:meta>
</office:document-meta>
</file>

<file path=Object 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
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23300000099DBA7B49B.png" manifest:media-type="image/png"/>
  <manifest:file-entry manifest:full-path="Pictures/10000000000001900000011E427A73F6.png" manifest:media-type="image/png"/>
  <manifest:file-entry manifest:full-path="Pictures/10000000000001570000009B6AE34C25.png" manifest:media-type="image/png"/>
  <manifest:file-entry manifest:full-path="Pictures/100000000000022C0000011CA23A5709.png" manifest:media-type="image/png"/>
  <manifest:file-entry manifest:full-path="Pictures/1000000000000107000000B1DEAC849F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9dd8e0" officeooo:paragraph-rsid="009dd8e0"/>
    </style:style>
    <style:style style:name="P2" style:family="paragraph" style:parent-style-name="Text_20_body">
      <style:paragraph-properties fo:text-align="center" style:justify-single-word="false"/>
      <style:text-properties fo:font-style="italic" officeooo:paragraph-rsid="00b50d39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09dd8e0" officeooo:paragraph-rsid="009dd8e0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Heading_20_1" style:list-style-name="">
      <style:text-properties officeooo:rsid="004c7a21" officeooo:paragraph-rsid="004c7a21"/>
    </style:style>
    <style:style style:name="P8" style:family="paragraph" style:parent-style-name="Heading_20_1">
      <style:paragraph-properties fo:break-before="page"/>
      <style:text-properties officeooo:rsid="009dd8e0" officeooo:paragraph-rsid="009dd8e0"/>
    </style:style>
    <style:style style:name="P9" style:family="paragraph" style:parent-style-name="Text_20_body">
      <style:text-properties fo:font-weight="bold" officeooo:rsid="009dd8e0" officeooo:paragraph-rsid="00a01614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9f159f" officeooo:paragraph-rsid="00a01614" style:font-weight-asian="normal" style:font-weight-complex="normal"/>
    </style:style>
    <style:style style:name="P11" style:family="paragraph" style:parent-style-name="Heading_20_2">
      <style:text-properties officeooo:rsid="00a01614" officeooo:paragraph-rsid="00a01614"/>
    </style:style>
    <style:style style:name="P12" style:family="paragraph" style:parent-style-name="Text_20_body">
      <style:text-properties fo:font-weight="normal" officeooo:rsid="009dd8e0" officeooo:paragraph-rsid="00a01614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weight="normal" officeooo:rsid="009dd8e0" officeooo:paragraph-rsid="00a01614" style:font-weight-asian="normal" style:font-weight-complex="normal"/>
    </style:style>
    <style:style style:name="P14" style:family="paragraph" style:parent-style-name="Heading_20_2">
      <style:text-properties officeooo:rsid="00a3cab3" officeooo:paragraph-rsid="00a3cab3"/>
    </style:style>
    <style:style style:name="P15" style:family="paragraph" style:parent-style-name="Heading_20_3">
      <style:text-properties officeooo:rsid="00a3cab3" officeooo:paragraph-rsid="00a3cab3"/>
    </style:style>
    <style:style style:name="P16" style:family="paragraph" style:parent-style-name="Text_20_body">
      <style:text-properties officeooo:rsid="00a3cab3" officeooo:paragraph-rsid="00a3cab3"/>
    </style:style>
    <style:style style:name="P17" style:family="paragraph" style:parent-style-name="Text_20_body">
      <style:paragraph-properties fo:text-align="center" style:justify-single-word="false"/>
      <style:text-properties style:text-underline-style="none" fo:font-weight="normal" officeooo:rsid="00a3cab3" officeooo:paragraph-rsid="00a3cab3" style:font-weight-asian="normal" style:font-weight-complex="normal"/>
    </style:style>
    <style:style style:name="P18" style:family="paragraph" style:parent-style-name="Text_20_body">
      <style:text-properties fo:font-weight="normal" officeooo:rsid="00a3cab3" officeooo:paragraph-rsid="00a3cab3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weight="normal" officeooo:rsid="00a3cab3" officeooo:paragraph-rsid="00a3cab3" style:font-weight-asian="normal" style:font-weight-complex="normal"/>
    </style:style>
    <style:style style:name="P20" style:family="paragraph" style:parent-style-name="Text_20_body">
      <style:text-properties fo:font-weight="normal" officeooo:rsid="00a44ecd" officeooo:paragraph-rsid="00a44ecd" style:font-weight-asian="normal" style:font-weight-complex="normal"/>
    </style:style>
    <style:style style:name="P21" style:family="paragraph" style:parent-style-name="Heading_20_2">
      <style:text-properties officeooo:rsid="00a12eb2" officeooo:paragraph-rsid="00a3cab3"/>
    </style:style>
    <style:style style:name="P22" style:family="paragraph" style:parent-style-name="Text_20_body">
      <style:text-properties fo:font-weight="normal" officeooo:rsid="00a01614" officeooo:paragraph-rsid="00a01614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a01614" officeooo:paragraph-rsid="00a01614" style:font-weight-asian="normal" style:font-weight-complex="normal"/>
    </style:style>
    <style:style style:name="T1" style:family="text">
      <style:text-properties officeooo:rsid="00b50d39"/>
    </style:style>
    <style:style style:name="T2" style:family="text">
      <style:text-properties officeooo:rsid="002feec6"/>
    </style:style>
    <style:style style:name="T3" style:family="text">
      <style:text-properties officeooo:rsid="002900b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9f159f" style:font-weight-asian="normal" style:font-weight-complex="normal"/>
    </style:style>
    <style:style style:name="T6" style:family="text">
      <style:text-properties officeooo:rsid="009f159f"/>
    </style:style>
    <style:style style:name="T7" style:family="text">
      <style:text-properties officeooo:rsid="00a016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9f159f" style:font-weight-asian="bold" style:font-weight-complex="bold"/>
    </style:style>
    <style:style style:name="T10" style:family="text">
      <style:text-properties officeooo:rsid="00a756eb"/>
    </style:style>
    <style:style style:name="T11" style:family="text">
      <style:text-properties fo:font-weight="bold" officeooo:rsid="00a17493" style:font-weight-asian="bold" style:font-weight-complex="bold"/>
    </style:style>
    <style:style style:name="T12" style:family="text">
      <style:text-properties officeooo:rsid="00a17493"/>
    </style:style>
    <style:style style:name="T13" style:family="text">
      <style:text-properties officeooo:rsid="00b224b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lection<text:span text:style-name="T1">**</text:span></text:p>
      <text:p text:style-name="P2">(This <text:span text:style-name="T2">idea or </text:span>topic is <text:span text:style-name="T1">a major aspect of </text:span>the new <text:span text:style-name="T3">Physical Science: Physics course.</text:span>)<text:bookmark-start text:name="__DdeLink__502_3041763869"/><text:bookmark-start text:name="__DdeLink__138_391587487"/></text:p>
      <text:p text:style-name="P3">May 5, 202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664_1500018627" office:name="Reflection of a Wave" text:style-name="Index_20_Link" text:visited-style-name="Index_20_Link">Reflection of a Wave<text:tab/>2</text:a></text:p>
          <text:p text:style-name="P5"><text:a xlink:type="simple" xlink:href="#__RefHeading___Toc666_1500018627" office:name="Law of Reflection" text:style-name="Index_20_Link" text:visited-style-name="Index_20_Link">Law of Reflection<text:tab/>2</text:a></text:p>
          <text:p text:style-name="P5"><text:a xlink:type="simple" xlink:href="#__RefHeading___Toc668_1500018627" office:name="Types of Reflection" text:style-name="Index_20_Link" text:visited-style-name="Index_20_Link">Types of Reflection<text:tab/>2</text:a></text:p>
          <text:p text:style-name="P6"><text:a xlink:type="simple" xlink:href="#__RefHeading___Toc670_1500018627" office:name="Regular Reflection" text:style-name="Index_20_Link" text:visited-style-name="Index_20_Link">Regular Reflection<text:tab/>2</text:a></text:p>
          <text:p text:style-name="P6"><text:a xlink:type="simple" xlink:href="#__RefHeading___Toc672_1500018627" office:name="Diffuse Reflection" text:style-name="Index_20_Link" text:visited-style-name="Index_20_Link">Diffuse Reflection<text:tab/>3</text:a></text:p>
          <text:p text:style-name="P5"><text:a xlink:type="simple" xlink:href="#__RefHeading___Toc674_1500018627" office:name="Direction of Reflection" text:style-name="Index_20_Link" text:visited-style-name="Index_20_Link">Direction of Reflection<text:tab/>3</text:a></text:p>
        </text:index-body>
      </text:table-of-content>
      <text:h text:style-name="P7" text:outline-level="1"><text:bookmark-start text:name="__RefHeading___Toc627_4069653955"/>­<text:bookmark-end text:name="__RefHeading___Toc627_4069653955"/></text:h>
      <text:h text:style-name="P8" text:outline-level="1"><text:bookmark-end text:name="__DdeLink__502_3041763869"/><text:bookmark-end text:name="__DdeLink__138_391587487"/><text:bookmark-start text:name="__RefHeading___Toc664_1500018627"/>Reflection of a Wave<text:bookmark-end text:name="__RefHeading___Toc664_1500018627"/></text:h>
      <text:p text:style-name="P9">Reflection<text:span text:style-name="T4"> is the rebounding of a pulse or wave as it strikes a barrier. </text:span><text:span text:style-name="T5">A light wave that reflects off an object cannot pass through. Hence, the material must be </text:span><text:span text:style-name="T6">opaque</text:span><text:span text:style-name="T5">. Objects that allow light to pass through are </text:span><text:span text:style-name="T6">translucent</text:span><text:span text:style-name="T5">.</text:span></text:p>
      <text:p text:style-name="P10"><draw:frame draw:style-name="fr1" draw:name="Frame1" text:anchor-type="as-char" svg:width="2.7008in" style:rel-width="39%" svg:height="2.0917in" style:rel-height="scale-min" draw:z-index="2"><draw:text-box><text:p text:style-name="Figure"><draw:frame draw:style-name="fr2" draw:name="Image1" text:anchor-type="paragraph" svg:width="2.7008in" style:rel-width="100%" svg:height="1.8165in" style:rel-height="scale" draw:z-index="3"><draw:image xlink:href="Pictures/1000000000000107000000B1DEAC849F.png" xlink:type="simple" xlink:show="embed" xlink:actuate="onLoad" draw:mime-type="image/png"/></draw:frame>Figure <text:sequence text:ref-name="refFigure0" text:name="Figure" text:formula="ooow:Figure+1" style:num-format="1">1</text:sequence>: A depiction of a reflected ray.</text:p></draw:text-box></draw:frame></text:p>
      <text:h text:style-name="P11" text:outline-level="2"><text:bookmark-start text:name="__RefHeading___Toc666_1500018627"/>Law of Reflection<text:bookmark-end text:name="__RefHeading___Toc666_1500018627"/></text:h>
      <text:p text:style-name="P12"><text:span text:style-name="T7">A</text:span> ray that enters <text:span text:style-name="T7">a</text:span> mirror <text:span text:style-name="T7">(i.e., the ray in the figure </text:span>above<text:span text:style-name="T7">) </text:span>is called the <text:span text:style-name="T8">incident ray</text:span>, while the ray that is reflected off the mirror is called the <text:span text:style-name="T8">reflected ray</text:span>. <text:span text:style-name="T6">T</text:span>he <text:span text:style-name="T8">angle of incidence </text:span>(<draw:frame draw:style-name="fr3" draw:name="Object1" text:anchor-type="as-char" svg:y="-0.1492in" svg:width="0.1189in" svg:height="0.21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) and the <text:span text:style-name="T8">angle of reflection</text:span> (<draw:frame draw:style-name="fr3" draw:name="Object2" text:anchor-type="as-char" svg:y="-0.1492in" svg:width="0.1346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) are <text:span text:style-name="T9">equal</text:span>.</text:p>
      <text:p text:style-name="P13"><draw:frame draw:style-name="fr1" draw:name="Frame3" text:anchor-type="as-char" svg:width="4.9862in" style:rel-width="72%" svg:height="3.0134in" style:rel-height="scale-min" draw:z-index="4"><draw:text-box><text:p text:style-name="Figure"><draw:frame draw:style-name="fr2" draw:name="Image3" text:anchor-type="paragraph" svg:width="4.9862in" style:rel-width="100%" svg:height="2.5465in" style:rel-height="scale" draw:z-index="5"><draw:image xlink:href="Pictures/100000000000022C0000011CA23A5709.png" xlink:type="simple" xlink:show="embed" xlink:actuate="onLoad" draw:mime-type="image/png"/></draw:frame>Figure <text:sequence text:ref-name="refFigure1" text:name="Figure" text:formula="ooow:Figure+1" style:num-format="1">2</text:sequence>: The angle of incidence is equal to the angle of reflection on a plane mirror.</text:p></draw:text-box></draw:frame></text:p>
      <text:h text:style-name="P14" text:outline-level="2"><text:bookmark-start text:name="__RefHeading___Toc668_1500018627"/>Types of Reflection<text:bookmark-end text:name="__RefHeading___Toc668_1500018627"/></text:h>
      <text:h text:style-name="P15" text:outline-level="3"><text:bookmark-start text:name="__RefHeading___Toc670_1500018627"/>Regular Reflection<text:bookmark-end text:name="__RefHeading___Toc670_1500018627"/></text:h>
      <text:p text:style-name="P16">In <text:span text:style-name="T8">regular reflection</text:span><text:span text:style-name="T4">, a reflected image (picture) can be seen. This occurs most commonly on mirrors or objects with a smooth surface.</text:span></text:p>
      <text:p text:style-name="P17"><text:soft-page-break/><draw:frame draw:style-name="fr1" draw:name="Frame4" text:anchor-type="as-char" svg:width="4.5709in" style:rel-width="66%" svg:height="2.3402in" style:rel-height="scale-min" draw:z-index="6"><draw:text-box><text:p text:style-name="Figure"><draw:frame draw:style-name="fr2" draw:name="Image4" text:anchor-type="paragraph" svg:width="4.5709in" style:rel-width="100%" svg:height="2.0654in" style:rel-height="scale" draw:z-index="7"><draw:image xlink:href="Pictures/10000000000001570000009B6AE34C25.png" xlink:type="simple" xlink:show="embed" xlink:actuate="onLoad" draw:mime-type="image/png"/></draw:frame>Figure <text:sequence text:ref-name="refFigure2" text:name="Figure" text:formula="ooow:Figure+1" style:num-format="1">3</text:sequence>: Rays reflecting off a smooth surface (plane mirror).</text:p></draw:text-box></draw:frame></text:p>
      <text:h text:style-name="P15" text:outline-level="3"><text:bookmark-start text:name="__RefHeading___Toc672_1500018627"/>Diffuse Reflection<text:bookmark-end text:name="__RefHeading___Toc672_1500018627"/></text:h>
      <text:p text:style-name="P18">In <text:span text:style-name="T8">diffuse reflection</text:span>, no reflected image can be seen because the surface is not smooth.</text:p>
      <text:p text:style-name="P19"><draw:frame draw:style-name="fr1" draw:name="Frame5" text:anchor-type="as-char" svg:width="4.0165in" style:rel-width="58%" svg:height="3.3382in" style:rel-height="scale-min" draw:z-index="8"><draw:text-box><text:p text:style-name="Figure"><draw:frame draw:style-name="fr2" draw:name="Image5" text:anchor-type="paragraph" svg:width="4.0165in" style:rel-width="100%" svg:height="2.8717in" style:rel-height="scale" draw:z-index="9"><draw:image xlink:href="Pictures/10000000000001900000011E427A73F6.png" xlink:type="simple" xlink:show="embed" xlink:actuate="onLoad" draw:mime-type="image/png"/></draw:frame>Figure <text:sequence text:ref-name="refFigure3" text:name="Figure" text:formula="ooow:Figure+1" style:num-format="1">4</text:sequence>: Reflected rays scattered after reflecting off an irregular, rough surface.</text:p></draw:text-box></draw:frame></text:p>
      <text:p text:style-name="P20">The law of reflection is still obeyed because the <text:span text:style-name="T8">normal</text:span> is different at each point <text:span text:style-name="T10">of reflection.</text:span></text:p>
      <text:h text:style-name="P21" text:outline-level="2"><text:bookmark-start text:name="__RefHeading___Toc674_1500018627"/>Direction of Reflection<text:bookmark-end text:name="__RefHeading___Toc674_1500018627"/></text:h>
      <text:p text:style-name="P22">When a wave is attached to a <text:span text:style-name="T8">fixed end</text:span>, the last particle of the medium is unable to move. The reflected wave is <text:span text:style-name="T11">inverted</text:span><text:span text:style-name="T12"> at </text:span><text:span text:style-name="T13">the</text:span><text:span text:style-name="T12"> boundary.</text:span></text:p>
      <text:p text:style-name="P23"><draw:frame draw:style-name="fr1" draw:name="Frame2" text:anchor-type="as-char" svg:width="4.0165in" style:rel-width="58%" svg:height="1.3665in" style:rel-height="scale-min" draw:z-index="10"><draw:text-box><text:p text:style-name="Figure"><draw:frame draw:style-name="fr2" draw:name="Image2" text:anchor-type="paragraph" svg:width="4.0165in" style:rel-width="100%" svg:height="1.0917in" style:rel-height="scale" draw:z-index="11"><draw:image xlink:href="Pictures/100000000000023300000099DBA7B49B.png" xlink:type="simple" xlink:show="embed" xlink:actuate="onLoad" draw:mime-type="image/png"/></draw:frame>Figure <text:sequence text:ref-name="refFigure4" text:name="Figure" text:formula="ooow:Figure+1" style:num-format="1">5</text:sequence>: A wave on a rope attached to a fixed end (a pole)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063add9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19T23:21:38.795154089</dc:date>
    <meta:editing-duration>PT8H12M59S</meta:editing-duration>
    <meta:editing-cycles>106</meta:editing-cycles>
    <meta:generator>LibreOffice/25.8.5.2$Linux_X86_64 LibreOffice_project/580$Build-2</meta:generator>
    <meta:document-statistic meta:table-count="0" meta:image-count="5" meta:object-count="2" meta:page-count="3" meta:paragraph-count="34" meta:word-count="292" meta:character-count="1623" meta:non-whitespace-character-count="1360"/>
  </office:meta>
</office:document-meta>
</file>

<file path=Object 1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2/content.xml><?xml version="1.0" encoding="utf-8"?>
<math xmlns="http://www.w3.org/1998/Math/MathML" display="block">
  <semantics>
    <msub>
      <mi>θ</mi>
      <mi>r</mi>
    </msub>
    <annotation encoding="StarMath 5.0">%theta_r</annotation>
  </semantics>
</math>
</file>
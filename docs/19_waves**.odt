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Pictures/10000001000002C9000001AD9A265ED2.png" manifest:media-type="image/png"/>
  <manifest:file-entry manifest:full-path="Pictures/1000000000000238000001BE70195C06.png" manifest:media-type="image/png"/>
  <manifest:file-entry manifest:full-path="Pictures/100000010000044C00000264E7073CCD.png" manifest:media-type="image/png"/>
  <manifest:file-entry manifest:full-path="Pictures/100000010000036B0000025AC33BC7F5.png" manifest:media-type="image/png"/>
  <manifest:file-entry manifest:full-path="Pictures/10000001000001B2000000E4570BDF13.png" manifest:media-type="image/png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italic" officeooo:paragraph-rsid="0058cb88" style:font-style-asian="italic" style:font-style-complex="italic"/>
    </style:style>
    <style:style style:name="P2" style:family="paragraph" style:parent-style-name="Text_20_body">
      <style:paragraph-properties fo:text-align="center" style:justify-single-word="false"/>
      <style:text-properties fo:font-style="normal" officeooo:rsid="0015d3fa" officeooo:paragraph-rsid="001f6534" style:font-style-asian="normal" style:font-style-complex="normal"/>
    </style:style>
    <style:style style:name="P3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6" style:family="paragraph" style:parent-style-name="Heading_20_1" style:list-style-name="">
      <style:text-properties officeooo:rsid="004c7a21" officeooo:paragraph-rsid="004c7a21"/>
    </style:style>
    <style:style style:name="P7" style:family="paragraph" style:parent-style-name="Heading_20_1">
      <style:paragraph-properties fo:text-align="start" style:justify-single-word="false" fo:break-before="page"/>
    </style:style>
    <style:style style:name="P8" style:family="paragraph" style:parent-style-name="Text_20_body">
      <style:paragraph-properties fo:text-align="start" style:justify-single-word="false"/>
      <style:text-properties officeooo:rsid="001f6534" officeooo:paragraph-rsid="001f6534"/>
    </style:style>
    <style:style style:name="P9" style:family="paragraph" style:parent-style-name="Heading_20_2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fo:font-weight="bold" officeooo:rsid="001f6534" officeooo:paragraph-rsid="001f6534" style:font-weight-asian="bold" style:font-weight-complex="bold"/>
    </style:style>
    <style:style style:name="P11" style:family="paragraph" style:parent-style-name="Text_20_body">
      <style:text-properties officeooo:rsid="0052a4ba" officeooo:paragraph-rsid="0052a4ba"/>
    </style:style>
    <style:style style:name="P12" style:family="paragraph" style:parent-style-name="Text_20_body">
      <style:paragraph-properties fo:text-align="start" style:justify-single-word="false"/>
      <style:text-properties fo:font-weight="bold" officeooo:rsid="002157af" officeooo:paragraph-rsid="002157af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332384" officeooo:paragraph-rsid="00332384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officeooo:rsid="002157af" officeooo:paragraph-rsid="002157af"/>
    </style:style>
    <style:style style:name="P15" style:family="paragraph" style:parent-style-name="Text_20_body">
      <style:paragraph-properties fo:text-align="center" style:justify-single-word="false"/>
      <style:text-properties fo:font-weight="normal" officeooo:rsid="00223e52" officeooo:paragraph-rsid="002157af" style:font-weight-asian="normal" style:font-weight-complex="normal"/>
    </style:style>
    <style:style style:name="P16" style:family="paragraph" style:parent-style-name="Heading_20_2">
      <style:text-properties officeooo:paragraph-rsid="0052a4ba"/>
    </style:style>
    <style:style style:name="P17" style:family="paragraph" style:parent-style-name="Text_20_body">
      <style:paragraph-properties fo:text-align="start" style:justify-single-word="false"/>
      <style:text-properties officeooo:rsid="00223e52" officeooo:paragraph-rsid="00223e52"/>
    </style:style>
    <style:style style:name="P18" style:family="paragraph" style:parent-style-name="Text_20_body">
      <style:paragraph-properties fo:text-align="center" style:justify-single-word="false"/>
      <style:text-properties fo:font-weight="normal" officeooo:rsid="0023ea43" officeooo:paragraph-rsid="00223e52" style:font-weight-asian="normal" style:font-weight-complex="normal"/>
    </style:style>
    <style:style style:name="P19" style:family="paragraph" style:parent-style-name="Heading_20_2">
      <style:text-properties officeooo:rsid="003494f9" officeooo:paragraph-rsid="003494f9"/>
    </style:style>
    <style:style style:name="P20" style:family="paragraph" style:parent-style-name="Text_20_body" style:list-style-name="L1">
      <style:text-properties fo:font-weight="bold" officeooo:rsid="003494f9" officeooo:paragraph-rsid="003494f9" style:font-weight-asian="bold" style:font-weight-complex="bold"/>
    </style:style>
    <style:style style:name="P21" style:family="paragraph" style:parent-style-name="Text_20_body" style:list-style-name="L1">
      <style:paragraph-properties fo:text-align="start" style:justify-single-word="false"/>
      <style:text-properties fo:font-weight="bold" officeooo:rsid="003494f9" officeooo:paragraph-rsid="003494f9" style:font-weight-asian="bold" style:font-weight-complex="bold"/>
    </style:style>
    <style:style style:name="P22" style:family="paragraph" style:parent-style-name="Heading_20_1">
      <style:text-properties officeooo:rsid="003494f9" officeooo:paragraph-rsid="003494f9"/>
    </style:style>
    <style:style style:name="P23" style:family="paragraph" style:parent-style-name="Heading_20_3">
      <style:text-properties officeooo:rsid="0035f80b" officeooo:paragraph-rsid="0035f80b"/>
    </style:style>
    <style:style style:name="P24" style:family="paragraph" style:parent-style-name="Text_20_body">
      <style:text-properties officeooo:rsid="003494f9" officeooo:paragraph-rsid="003494f9"/>
    </style:style>
    <style:style style:name="P25" style:family="paragraph" style:parent-style-name="Text_20_body">
      <style:paragraph-properties fo:text-align="center" style:justify-single-word="false"/>
      <style:text-properties officeooo:rsid="003494f9" officeooo:paragraph-rsid="003494f9"/>
    </style:style>
    <style:style style:name="P26" style:family="paragraph" style:parent-style-name="Text_20_body">
      <style:paragraph-properties fo:text-align="start" style:justify-single-word="false"/>
      <style:text-properties officeooo:rsid="003494f9" officeooo:paragraph-rsid="003494f9"/>
    </style:style>
    <style:style style:name="P27" style:family="paragraph" style:parent-style-name="Text_20_body">
      <style:text-properties officeooo:rsid="0035f80b" officeooo:paragraph-rsid="0035f80b"/>
    </style:style>
    <style:style style:name="P28" style:family="paragraph" style:parent-style-name="Text_20_body">
      <style:paragraph-properties fo:text-align="center" style:justify-single-word="false"/>
      <style:text-properties officeooo:rsid="0035f80b" officeooo:paragraph-rsid="0035f80b"/>
    </style:style>
    <style:style style:name="P29" style:family="paragraph" style:parent-style-name="Text_20_body">
      <style:paragraph-properties fo:text-align="start" style:justify-single-word="false"/>
      <style:text-properties officeooo:rsid="0035f80b" officeooo:paragraph-rsid="0035f80b"/>
    </style:style>
    <style:style style:name="P30" style:family="paragraph" style:parent-style-name="Heading_20_3">
      <style:text-properties officeooo:rsid="00375c78" officeooo:paragraph-rsid="00375c78"/>
    </style:style>
    <style:style style:name="P31" style:family="paragraph" style:parent-style-name="Text_20_body">
      <style:text-properties officeooo:rsid="00375c78" officeooo:paragraph-rsid="00375c78"/>
    </style:style>
    <style:style style:name="P32" style:family="paragraph" style:parent-style-name="Heading_20_1">
      <style:text-properties officeooo:rsid="00403141" officeooo:paragraph-rsid="00403141"/>
    </style:style>
    <style:style style:name="P33" style:family="paragraph" style:parent-style-name="Text_20_body">
      <style:text-properties officeooo:rsid="00403141" officeooo:paragraph-rsid="00403141"/>
    </style:style>
    <style:style style:name="P34" style:family="paragraph" style:parent-style-name="Text_20_body">
      <style:paragraph-properties fo:text-align="center" style:justify-single-word="false"/>
      <style:text-properties officeooo:rsid="00403141" officeooo:paragraph-rsid="00403141"/>
    </style:style>
    <style:style style:name="P35" style:family="paragraph" style:parent-style-name="Heading_20_1">
      <style:text-properties officeooo:rsid="0043695d" officeooo:paragraph-rsid="0043695d"/>
    </style:style>
    <style:style style:name="P36" style:family="paragraph" style:parent-style-name="Text_20_body">
      <style:text-properties officeooo:rsid="0043695d" officeooo:paragraph-rsid="0043695d"/>
    </style:style>
    <style:style style:name="P37" style:family="paragraph" style:parent-style-name="Text_20_body">
      <style:paragraph-properties fo:text-align="center" style:justify-single-word="false"/>
      <style:text-properties fo:font-weight="normal" officeooo:rsid="0043695d" officeooo:paragraph-rsid="0043695d" style:font-weight-asian="normal" style:font-weight-complex="normal"/>
    </style:style>
    <style:style style:name="T1" style:family="text">
      <style:text-properties officeooo:rsid="002f2564"/>
    </style:style>
    <style:style style:name="T2" style:family="text">
      <style:text-properties officeooo:rsid="001f6534"/>
    </style:style>
    <style:style style:name="T3" style:family="text">
      <style:text-properties officeooo:rsid="0058cb88"/>
    </style:style>
    <style:style style:name="T4" style:family="text">
      <style:text-properties officeooo:rsid="002feec6"/>
    </style:style>
    <style:style style:name="T5" style:family="text">
      <style:text-properties officeooo:rsid="002900b4"/>
    </style:style>
    <style:style style:name="T6" style:family="text">
      <style:text-properties officeooo:rsid="0033238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6fec5" style:font-weight-asian="normal" style:font-weight-complex="normal"/>
    </style:style>
    <style:style style:name="T10" style:family="text">
      <style:text-properties fo:font-weight="normal" officeooo:rsid="00490f04" style:font-weight-asian="normal" style:font-weight-complex="normal"/>
    </style:style>
    <style:style style:name="T11" style:family="text">
      <style:text-properties fo:font-weight="bold" officeooo:rsid="00490f04" style:font-weight-asian="bold" style:font-weight-complex="bold"/>
    </style:style>
    <style:style style:name="T12" style:family="text">
      <style:text-properties fo:font-weight="normal" officeooo:rsid="004b0759" style:font-weight-asian="normal" style:font-weight-complex="normal"/>
    </style:style>
    <style:style style:name="T13" style:family="text">
      <style:text-properties fo:font-weight="normal" officeooo:rsid="00332384" style:font-weight-asian="normal" style:font-weight-complex="normal"/>
    </style:style>
    <style:style style:name="T14" style:family="text">
      <style:text-properties fo:font-style="normal" officeooo:rsid="00332384" style:font-style-asian="normal" style:font-style-complex="normal"/>
    </style:style>
    <style:style style:name="T15" style:family="text">
      <style:text-properties fo:font-style="normal" fo:font-weight="normal" officeooo:rsid="00332384" style:font-style-asian="normal" style:font-weight-asian="normal" style:font-style-complex="normal" style:font-weight-complex="normal"/>
    </style:style>
    <style:style style:name="T16" style:family="text">
      <style:text-properties officeooo:rsid="00298f40"/>
    </style:style>
    <style:style style:name="T17" style:family="text">
      <style:text-properties officeooo:rsid="00223e52"/>
    </style:style>
    <style:style style:name="T18" style:family="text">
      <style:text-properties fo:font-weight="normal" officeooo:rsid="00223e52" style:font-weight-asian="normal" style:font-weight-complex="normal"/>
    </style:style>
    <style:style style:name="T19" style:family="text">
      <style:text-properties fo:font-weight="bold" officeooo:rsid="00223e52" style:font-weight-asian="bold" style:font-weight-complex="bold"/>
    </style:style>
    <style:style style:name="T20" style:family="text">
      <style:text-properties fo:font-weight="normal" officeooo:rsid="0023ea43" style:font-weight-asian="normal" style:font-weight-complex="normal"/>
    </style:style>
    <style:style style:name="T21" style:family="text">
      <style:text-properties fo:font-weight="bold" officeooo:rsid="0023ea43" style:font-weight-asian="bold" style:font-weight-complex="bold"/>
    </style:style>
    <style:style style:name="T22" style:family="text">
      <style:text-properties officeooo:rsid="004e1731"/>
    </style:style>
    <style:style style:name="T23" style:family="text">
      <style:text-properties officeooo:rsid="0041f2f1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DdeLink__138_391587487"/><text:span text:style-name="T1">­</text:span><text:span text:style-name="T2">Waves</text:span><text:span text:style-name="T3">**</text:span></text:p>
      <text:p text:style-name="P1">(This <text:span text:style-name="T4">idea or </text:span>topic is <text:span text:style-name="T3">a major aspect</text:span> <text:span text:style-name="T3">of</text:span> the new <text:span text:style-name="T5">Physical Science: Physics course.</text:span>)</text:p>
      <text:p text:style-name="P2">January <text:span text:style-name="T2">29</text:span>, 2026 <text:span text:style-name="T6">(cont’d. April 13, 2026)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627_4069653955" office:name="­" text:style-name="Index_20_Link" text:visited-style-name="Index_20_Link">­<text:tab/>1</text:a></text:p>
          <text:p text:style-name="P3"><text:a xlink:type="simple" xlink:href="#__RefHeading___Toc2346_679008467" office:name="What Are Waves?" text:style-name="Index_20_Link" text:visited-style-name="Index_20_Link">What Are Waves?<text:tab/>2</text:a></text:p>
          <text:p text:style-name="P4"><text:a xlink:type="simple" xlink:href="#__RefHeading___Toc2348_679008467" office:name="Mechanical Waves" text:style-name="Index_20_Link" text:visited-style-name="Index_20_Link">Mechanical Waves<text:tab/>2</text:a></text:p>
          <text:p text:style-name="P4"><text:a xlink:type="simple" xlink:href="#__RefHeading___Toc2350_679008467" office:name="Electromagnetic Waves" text:style-name="Index_20_Link" text:visited-style-name="Index_20_Link">Electromagnetic Waves<text:tab/>2</text:a></text:p>
          <text:p text:style-name="P3"><text:a xlink:type="simple" xlink:href="#__RefHeading___Toc2352_679008467" office:name="Classifying Waves" text:style-name="Index_20_Link" text:visited-style-name="Index_20_Link">Classifying Waves<text:tab/>2</text:a></text:p>
          <text:p text:style-name="P4"><text:a xlink:type="simple" xlink:href="#__RefHeading___Toc2354_679008467" office:name="Periodic Waves" text:style-name="Index_20_Link" text:visited-style-name="Index_20_Link">Periodic Waves<text:tab/>2</text:a></text:p>
          <text:p text:style-name="P4"><text:a xlink:type="simple" xlink:href="#__RefHeading___Toc2356_679008467" office:name="Transverse Waves" text:style-name="Index_20_Link" text:visited-style-name="Index_20_Link">Transverse Waves<text:tab/>3</text:a></text:p>
          <text:p text:style-name="P4"><text:a xlink:type="simple" xlink:href="#__RefHeading___Toc2358_679008467" office:name="Longitudinal Waves" text:style-name="Index_20_Link" text:visited-style-name="Index_20_Link">Longitudinal Waves<text:tab/>3</text:a></text:p>
          <text:p text:style-name="P4"><text:a xlink:type="simple" xlink:href="#__RefHeading___Toc443_3961216758" office:name="Wave Vocabulary" text:style-name="Index_20_Link" text:visited-style-name="Index_20_Link">Wave Vocabulary<text:tab/>4</text:a></text:p>
          <text:p text:style-name="P3"><text:a xlink:type="simple" xlink:href="#__RefHeading___Toc445_3961216758" office:name="Measuring Waves" text:style-name="Index_20_Link" text:visited-style-name="Index_20_Link">Measuring Waves<text:tab/>4</text:a></text:p>
          <text:p text:style-name="P4"><text:a xlink:type="simple" xlink:href="#__RefHeading___Toc447_3961216758" office:name="Calculating the Velocity of a Wave" text:style-name="Index_20_Link" text:visited-style-name="Index_20_Link">Calculating the Velocity of a Wave<text:tab/>4</text:a></text:p>
          <text:p text:style-name="P5"><text:a xlink:type="simple" xlink:href="#__RefHeading___Toc449_3961216758" office:name="Given Frequency and Wavelength" text:style-name="Index_20_Link" text:visited-style-name="Index_20_Link">Given Frequency and Wavelength<text:tab/>4</text:a></text:p>
          <text:p text:style-name="P5"><text:a xlink:type="simple" xlink:href="#__RefHeading___Toc451_3961216758" office:name="Given Distance and Time" text:style-name="Index_20_Link" text:visited-style-name="Index_20_Link">Given Distance and Time<text:tab/>4</text:a></text:p>
          <text:p text:style-name="P5"><text:a xlink:type="simple" xlink:href="#__RefHeading___Toc453_3961216758" office:name="References" text:style-name="Index_20_Link" text:visited-style-name="Index_20_Link">References<text:tab/>4</text:a></text:p>
          <text:p text:style-name="P4"><text:a xlink:type="simple" xlink:href="#__RefHeading___Toc455_3961216758" office:name="Calculating the Period of a Wave" text:style-name="Index_20_Link" text:visited-style-name="Index_20_Link">Calculating the Period of a Wave<text:tab/>4</text:a></text:p>
          <text:p text:style-name="P3"><text:a xlink:type="simple" xlink:href="#__RefHeading___Toc629_4069653955" office:name="Drawing Waves in Two Dimensions" text:style-name="Index_20_Link" text:visited-style-name="Index_20_Link">Drawing Waves in Two Dimensions<text:tab/>5</text:a></text:p>
          <text:p text:style-name="P3"><text:a xlink:type="simple" xlink:href="#__RefHeading___Toc631_4069653955" office:name="Pulses" text:style-name="Index_20_Link" text:visited-style-name="Index_20_Link">Pulses<text:tab/>5</text:a></text:p>
        </text:index-body>
      </text:table-of-content>
      <text:h text:style-name="P6" text:outline-level="1"><text:bookmark-start text:name="__RefHeading___Toc627_4069653955"/>­<text:bookmark-end text:name="__RefHeading___Toc627_4069653955"/></text:h>
      <text:h text:style-name="P7" text:outline-level="1"><text:bookmark-start text:name="__RefHeading___Toc2346_679008467"/>What Are Waves?<text:bookmark-end text:name="__RefHeading___Toc2346_679008467"/></text:h>
      <text:p text:style-name="P8">A <text:span text:style-name="T7">wave</text:span><text:span text:style-name="T8"> is a moving disturbance that carries </text:span><text:span text:style-name="T7">energy</text:span><text:span text:style-name="T8"> rather than matter. </text:span><text:bookmark-start text:name="__DdeLink__429_4069653955"/><text:span text:style-name="T9">Waves are essentially energy transport phenomenons</text:span><text:bookmark-end text:name="__DdeLink__429_4069653955"/><text:span text:style-name="T9">. </text:span><text:span text:style-name="T10">A wave’s </text:span><text:span text:style-name="T11">amplitude</text:span><text:span text:style-name="T10"> squared is proportional to the amount of energy </text:span><text:span text:style-name="T12">in the system.</text:span></text:p>
      <text:h text:style-name="P9" text:outline-level="2"><text:bookmark-start text:name="__RefHeading___Toc2348_679008467"/>Mechanical Waves<text:bookmark-end text:name="__RefHeading___Toc2348_679008467"/></text:h>
      <text:p text:style-name="P10">Mechanical waves<text:span text:style-name="T8"> require a medium. Examples </text:span><text:span text:style-name="T13">of mechanical waves </text:span><text:span text:style-name="T8">include water, earthquakes, and sound.</text:span></text:p>
      <text:h text:style-name="P9" text:outline-level="2"><text:bookmark-start text:name="__RefHeading___Toc2350_679008467"/>Electromagnetic Waves<text:bookmark-end text:name="__RefHeading___Toc2350_679008467"/></text:h>
      <text:p text:style-name="P10">Electromagnetic waves<text:span text:style-name="T8"> (i.e., light) move through a vacuum. Examples </text:span><text:span text:style-name="T13">of electromagnetic waves</text:span><text:span text:style-name="T8"> include radio, light, microwaves, and x-rays.</text:span></text:p>
      <text:h text:style-name="Heading_20_1" text:outline-level="1"><text:bookmark-start text:name="__RefHeading___Toc2352_679008467"/>Classifying Waves<text:bookmark-end text:name="__RefHeading___Toc2352_679008467"/></text:h>
      <text:p text:style-name="P11">There are multiple categories of waves. Most waves in simplified physics are <text:span text:style-name="T7">periodic</text:span><text:span text:style-name="T8">, but, at the same time, they can also be either </text:span><text:span text:style-name="T7">transverse</text:span><text:span text:style-name="T8"> or </text:span><text:span text:style-name="T7">longitudinal</text:span><text:span text:style-name="T8">.</text:span></text:p>
      <text:h text:style-name="Heading_20_2" text:outline-level="2"><text:bookmark-start text:name="__RefHeading___Toc2354_679008467"/>Periodic Waves<text:bookmark-end text:name="__RefHeading___Toc2354_679008467"/></text:h>
      <text:p text:style-name="P12"><text:span text:style-name="T8">Periodic waves are waves that repeat over intervals of time or distance. </text:span><text:span text:style-name="T13">These waves repeat over intervals or </text:span><text:span text:style-name="T14">periods</text:span><text:span text:style-name="T15">.</text:span></text:p>
      <text:p text:style-name="P13"><draw:frame draw:style-name="fr1" draw:name="Frame2" text:anchor-type="paragraph" svg:width="4.5709in" style:rel-width="66%" svg:height="2.6752in" style:rel-height="scale-min" draw:z-index="14"><draw:text-box><text:p text:style-name="Figure"><draw:frame draw:style-name="fr2" draw:name="Image2" text:anchor-type="paragraph" svg:width="4.5709in" style:rel-width="100%" svg:height="2.4in" style:rel-height="scale" draw:z-index="15"><draw:image xlink:href="Pictures/10000001000001B2000000E4570BDF13.png" xlink:type="simple" xlink:show="embed" xlink:actuate="onLoad" draw:mime-type="image/png"/></draw:frame>Figure <text:sequence text:ref-name="refFigure0" text:name="Figure" text:formula="ooow:Figure+1" style:num-format="1">1</text:sequence>: A diagram of a sinusodial wave.</text:p></draw:text-box></draw:frame>Sinusodial waves in mathematics, for example, repeat over periods and have positive and negative half cycles that repeat indefinitely.</text:p>
      <text:h text:style-name="Heading_20_2" text:outline-level="2"><text:bookmark-start text:name="__RefHeading___Toc2356_679008467"/><text:soft-page-break/>Transvers<text:span text:style-name="T16">e </text:span><text:span text:style-name="T17">Waves</text:span><text:bookmark-end text:name="__RefHeading___Toc2356_679008467"/></text:h>
      <text:p text:style-name="P14"><text:span text:style-name="T8">A transverse wave is a wave </text:span><text:span text:style-name="T18">with a medium </text:span><text:span text:style-name="T19">p</text:span><text:span text:style-name="T7">erpendicular</text:span><text:span text:style-name="T8"> to the motion of the wave</text:span><text:bookmark-start text:name="__DdeLink__667_3397151326"/><text:span text:style-name="T8">.</text:span><text:bookmark-end text:name="__DdeLink__667_3397151326"/><text:span text:style-name="T8"> </text:span><text:span text:style-name="T18">The particles through which the wave passes vibrate at right angles to the direction in which the wave is moving. The diagram below demonstrates how a transverse wave and its medium interact.</text:span></text:p>
      <text:p text:style-name="P15"><draw:frame draw:style-name="fr3" draw:name="Frame1" text:anchor-type="as-char" svg:width="4.0854in" style:rel-width="59%" svg:height="3.2752in" style:rel-height="scale-min" draw:z-index="16"><draw:text-box><text:p text:style-name="Figure"><draw:frame draw:style-name="fr2" draw:name="Image1 Copy 1" text:anchor-type="paragraph" svg:width="4.0854in" style:rel-width="100%" svg:height="2.8083in" style:rel-height="scale" draw:z-index="17"><draw:image xlink:href="Pictures/100000010000036B0000025AC33BC7F5.png" xlink:type="simple" xlink:show="embed" xlink:actuate="onLoad" draw:mime-type="image/png"/></draw:frame>Figure <text:sequence text:ref-name="refFigure1" text:name="Figure" text:formula="ooow:Figure+1" style:num-format="1">2</text:sequence>: A part of an electromagnetic wave moving perpendicularly to the motion of its medium.</text:p></draw:text-box></draw:frame></text:p>
      <text:h text:style-name="P16" text:outline-level="2" text:is-list-header="true"><text:bookmark-start text:name="__RefHeading___Toc2358_679008467"/>Longitudinal Waves<text:bookmark-end text:name="__RefHeading___Toc2358_679008467"/></text:h>
      <text:p text:style-name="P17"><text:span text:style-name="T8">A longitudinal wave is a wave </text:span><text:span text:style-name="T20">with a medium </text:span><text:span text:style-name="T21">parallel</text:span><text:span text:style-name="T20"> to the motion of the wave.</text:span><text:bookmark-end text:name="__DdeLink__138_391587487"/></text:p>
      <text:p text:style-name="P18"><draw:frame draw:style-name="fr3" draw:name="Frame3" text:anchor-type="as-char" svg:width="5.748in" style:rel-width="83%" svg:height="3.472in" style:rel-height="scale-min" draw:z-index="26"><draw:text-box><text:p text:style-name="Figure"><draw:frame draw:style-name="fr2" draw:name="Image3 Copy 1" text:anchor-type="paragraph" svg:width="5.748in" style:rel-width="100%" svg:height="3.1972in" style:rel-height="scale" draw:z-index="27"><draw:image xlink:href="Pictures/100000010000044C00000264E7073CCD.png" xlink:type="simple" xlink:show="embed" xlink:actuate="onLoad" draw:mime-type="image/png"/></draw:frame>Figure <text:sequence text:ref-name="refFigure2" text:name="Figure" text:formula="ooow:Figure+1" style:num-format="1">3</text:sequence>: A diagram representing a longitudinal wave and its properties.</text:p></draw:text-box></draw:frame></text:p>
      <text:h text:style-name="P19" text:outline-level="2" text:is-list-header="true"><text:bookmark-start text:name="__RefHeading___Toc443_3961216758"/><text:soft-page-break/>Wave Vocabulary<text:bookmark-end text:name="__RefHeading___Toc443_3961216758"/></text:h>
      <text:list text:style-name="L1">
        <text:list-item>
          <text:p text:style-name="P20">Crest<text:span text:style-name="T8">: The highest point on the wave.</text:span></text:p>
        </text:list-item>
        <text:list-item>
          <text:p text:style-name="P20">Trough<text:span text:style-name="T8">: The lowest point on the wave.</text:span></text:p>
        </text:list-item>
        <text:list-item>
          <text:p text:style-name="P21">Amplitude<text:span text:style-name="T8">: The difference in height between the midline of the wave and its highest point.</text:span></text:p>
        </text:list-item>
        <text:list-item>
          <text:p text:style-name="P21">Wavelength (<draw:frame draw:style-name="fr4" draw:name="Object1" text:anchor-type="as-char" svg:y="-0.1492in" svg:width="0.0898in" svg:height="0.1854in" draw:z-index="0"><draw:object xlink:href="./Object 1" xlink:type="simple" xlink:show="embed" xlink:actuate="onLoad"/><draw:image xlink:href="./ObjectReplacements/Object 1" xlink:type="simple" xlink:show="embed" xlink:actuate="onLoad"/></draw:frame>)<text:span text:style-name="T8">: The distance between consecutive points in phase (i.e., the period of a periodic wave).</text:span></text:p>
        </text:list-item>
        <text:list-item>
          <text:p text:style-name="P21">Frequency (<draw:frame draw:style-name="fr4" draw:name="Object2" text:anchor-type="as-char" svg:y="-0.1492in" svg:width="0.0819in" svg:height="0.1854in" draw:z-index="1"><draw:object xlink:href="./Object 2" xlink:type="simple" xlink:show="embed" xlink:actuate="onLoad"/><draw:image xlink:href="./ObjectReplacements/Object 2" xlink:type="simple" xlink:show="embed" xlink:actuate="onLoad"/></draw:frame>)<text:span text:style-name="T8">: The number of vibrations per unit time.</text:span></text:p>
        </text:list-item>
        <text:list-item>
          <text:p text:style-name="P21">Period (<draw:frame draw:style-name="fr4" draw:name="Object3" text:anchor-type="as-char" svg:y="-0.1492in" svg:width="0.1118in" svg:height="0.1854in" draw:z-index="2"><draw:object xlink:href="./Object 3" xlink:type="simple" xlink:show="embed" xlink:actuate="onLoad"/><draw:image xlink:href="./ObjectReplacements/Object 3" xlink:type="simple" xlink:show="embed" xlink:actuate="onLoad"/></draw:frame>)<text:span text:style-name="T8">: The time it takes a wave to complete one cycle.</text:span></text:p>
        </text:list-item>
      </text:list>
      <text:h text:style-name="P22" text:outline-level="1"><text:bookmark-start text:name="__RefHeading___Toc445_3961216758"/>Measuring Waves<text:bookmark-end text:name="__RefHeading___Toc445_3961216758"/></text:h>
      <text:h text:style-name="P19" text:outline-level="2"><text:bookmark-start text:name="__RefHeading___Toc447_3961216758"/>Calculating the Velocity of a Wave<text:bookmark-end text:name="__RefHeading___Toc447_3961216758"/></text:h>
      <text:h text:style-name="P23" text:outline-level="3"><text:bookmark-start text:name="__RefHeading___Toc449_3961216758"/>Given Frequency and Wavelength<text:bookmark-end text:name="__RefHeading___Toc449_3961216758"/></text:h>
      <text:p text:style-name="P24">To calculate the velocity of a wave given its frequency and wavelength, use the formula:</text:p>
      <text:p text:style-name="P25"><draw:frame draw:style-name="fr4" draw:name="Object4" text:anchor-type="as-char" svg:y="-0.1492in" svg:width="0.4189in" svg:height="0.1854in" draw:z-index="3"><draw:object xlink:href="./Object 4" xlink:type="simple" xlink:show="embed" xlink:actuate="onLoad"/><draw:image xlink:href="./ObjectReplacements/Object 4" xlink:type="simple" xlink:show="embed" xlink:actuate="onLoad"/></draw:frame>,</text:p>
      <text:p text:style-name="P26">where <draw:frame draw:style-name="fr4" draw:name="Object5" text:anchor-type="as-char" svg:y="-0.1492in" svg:width="0.0898in" svg:height="0.1854in" draw:z-index="4"><draw:object xlink:href="./Object 5" xlink:type="simple" xlink:show="embed" xlink:actuate="onLoad"/><draw:image xlink:href="./ObjectReplacements/Object 5" xlink:type="simple" xlink:show="embed" xlink:actuate="onLoad"/></draw:frame><text:s/>is the velocity or speed of the wave, <draw:frame draw:style-name="fr4" draw:name="Object6" text:anchor-type="as-char" svg:y="-0.1492in" svg:width="0.0819in" svg:height="0.1854in" draw:z-index="5"><draw:object xlink:href="./Object 6" xlink:type="simple" xlink:show="embed" xlink:actuate="onLoad"/><draw:image xlink:href="./ObjectReplacements/Object 6" xlink:type="simple" xlink:show="embed" xlink:actuate="onLoad"/></draw:frame><text:s/>is its frequency <text:span text:style-name="T22">(measured in hertz, </text:span><text:span text:style-name="T22"><draw:frame draw:style-name="fr4" draw:name="Object17" text:anchor-type="as-char" svg:y="-0.1492in" svg:width="0.2035in" svg:height="0.1854in" draw:z-index="25"><draw:object xlink:href="./Object 17" xlink:type="simple" xlink:show="embed" xlink:actuate="onLoad"/><draw:image xlink:href="./ObjectReplacements/Object 17" xlink:type="simple" xlink:show="embed" xlink:actuate="onLoad"/></draw:frame></text:span><text:span text:style-name="T22">, or cycles per second, </text:span><text:span text:style-name="T22"><draw:frame draw:style-name="fr4" draw:name="Object19" text:anchor-type="as-char" svg:y="-0.1492in" svg:width="0.2228in" svg:height="0.1854in" draw:z-index="28"><draw:object xlink:href="./Object 19" xlink:type="simple" xlink:show="embed" xlink:actuate="onLoad"/><draw:image xlink:href="./ObjectReplacements/Object 19" xlink:type="simple" xlink:show="embed" xlink:actuate="onLoad"/></draw:frame></text:span><text:span text:style-name="T22">)</text:span>, and <draw:frame draw:style-name="fr4" draw:name="Object7" text:anchor-type="as-char" svg:y="-0.1492in" svg:width="0.0898in" svg:height="0.1854in" draw:z-index="6"><draw:object xlink:href="./Object 7" xlink:type="simple" xlink:show="embed" xlink:actuate="onLoad"/><draw:image xlink:href="./ObjectReplacements/Object 7" xlink:type="simple" xlink:show="embed" xlink:actuate="onLoad"/></draw:frame><text:s/>is its wavelength <text:span text:style-name="T22">(in meters, </text:span><text:span text:style-name="T22"><draw:frame draw:style-name="fr4" draw:name="Object18" text:anchor-type="as-char" svg:y="-0.1492in" svg:width="0.1409in" svg:height="0.1854in" draw:z-index="18"><draw:object xlink:href="./Object 18" xlink:type="simple" xlink:show="embed" xlink:actuate="onLoad"/><draw:image xlink:href="./ObjectReplacements/Object 18" xlink:type="simple" xlink:show="embed" xlink:actuate="onLoad"/></draw:frame></text:span><text:span text:style-name="T22">)</text:span>.</text:p>
      <text:h text:style-name="P23" text:outline-level="3"><text:bookmark-start text:name="__RefHeading___Toc451_3961216758"/>Given Distance and Time<text:bookmark-end text:name="__RefHeading___Toc451_3961216758"/></text:h>
      <text:p text:style-name="P27">To calculate the speed of a wave given its distance and time, <text:span text:style-name="T3">simply </text:span>use:</text:p>
      <text:p text:style-name="P28"><draw:frame draw:style-name="fr4" draw:name="Object11" text:anchor-type="as-char" svg:y="-0.2445in" svg:width="0.3602in" svg:height="0.3953in" draw:z-index="19"><draw:object xlink:href="./Object 11" xlink:type="simple" xlink:show="embed" xlink:actuate="onLoad"/><draw:image xlink:href="./ObjectReplacements/Object 11" xlink:type="simple" xlink:show="embed" xlink:actuate="onLoad"/></draw:frame>,</text:p>
      <text:p text:style-name="P29">where <draw:frame draw:style-name="fr4" draw:name="Object12" text:anchor-type="as-char" svg:y="-0.1492in" svg:width="0.0898in" svg:height="0.1854in" draw:z-index="20"><draw:object xlink:href="./Object 12" xlink:type="simple" xlink:show="embed" xlink:actuate="onLoad"/><draw:image xlink:href="./ObjectReplacements/Object 12" xlink:type="simple" xlink:show="embed" xlink:actuate="onLoad"/></draw:frame><text:s/>is the wave’s velocity, <draw:frame draw:style-name="fr4" draw:name="Object13" text:anchor-type="as-char" svg:y="-0.1492in" svg:width="0.0965in" svg:height="0.1854in" draw:z-index="21"><draw:object xlink:href="./Object 13" xlink:type="simple" xlink:show="embed" xlink:actuate="onLoad"/><draw:image xlink:href="./ObjectReplacements/Object 13" xlink:type="simple" xlink:show="embed" xlink:actuate="onLoad"/></draw:frame><text:s/>is its distance traveled, and <draw:frame draw:style-name="fr4" draw:name="Object14" text:anchor-type="as-char" svg:y="-0.1492in" svg:width="0.0602in" svg:height="0.1854in" draw:z-index="22"><draw:object xlink:href="./Object 14" xlink:type="simple" xlink:show="embed" xlink:actuate="onLoad"/><draw:image xlink:href="./ObjectReplacements/Object 14" xlink:type="simple" xlink:show="embed" xlink:actuate="onLoad"/></draw:frame><text:s/>is the time it traveled for.</text:p>
      <text:h text:style-name="P30" text:outline-level="3"><text:bookmark-start text:name="__RefHeading___Toc453_3961216758"/>References<text:bookmark-end text:name="__RefHeading___Toc453_3961216758"/></text:h>
      <text:p text:style-name="P31">For reference, the <text:span text:style-name="T7">speed of light</text:span><text:span text:style-name="T8"> is </text:span><text:span text:style-name="T8"><draw:frame draw:style-name="fr4" draw:name="Object15" text:anchor-type="as-char" svg:y="-0.1728in" svg:width="0.8756in" svg:height="0.2091in" draw:z-index="23"><draw:object xlink:href="./Object 15" xlink:type="simple" xlink:show="embed" xlink:actuate="onLoad"/><draw:image xlink:href="./ObjectReplacements/Object 15" xlink:type="simple" xlink:show="embed" xlink:actuate="onLoad"/></draw:frame></text:span><text:span text:style-name="T8">, while the </text:span><text:span text:style-name="T7">speed of sound</text:span><text:span text:style-name="T8"> is </text:span><text:span text:style-name="T8"><draw:frame draw:style-name="fr4" draw:name="Object16" text:anchor-type="as-char" svg:y="-0.1492in" svg:width="0.5508in" svg:height="0.1854in" draw:z-index="24"><draw:object xlink:href="./Object 16" xlink:type="simple" xlink:show="embed" xlink:actuate="onLoad"/><draw:image xlink:href="./ObjectReplacements/Object 16" xlink:type="simple" xlink:show="embed" xlink:actuate="onLoad"/></draw:frame></text:span><text:span text:style-name="T8">.</text:span></text:p>
      <text:h text:style-name="P19" text:outline-level="2"><text:bookmark-start text:name="__RefHeading___Toc455_3961216758"/>Calculating the Period of a Wave<text:bookmark-end text:name="__RefHeading___Toc455_3961216758"/></text:h>
      <text:p text:style-name="P24">To calculate the period of a wave given its frequency, simply take the reciprocal of the frequency. Hence:</text:p>
      <text:p text:style-name="P25"><draw:frame draw:style-name="fr4" draw:name="Object8" text:anchor-type="as-char" svg:y="-0.2445in" svg:width="0.3693in" svg:height="0.3953in" draw:z-index="7"><draw:object xlink:href="./Object 8" xlink:type="simple" xlink:show="embed" xlink:actuate="onLoad"/><draw:image xlink:href="./ObjectReplacements/Object 8" xlink:type="simple" xlink:show="embed" xlink:actuate="onLoad"/></draw:frame>,</text:p>
      <text:p text:style-name="P26">where <draw:frame draw:style-name="fr4" draw:name="Object9" text:anchor-type="as-char" svg:y="-0.1492in" svg:width="0.1118in" svg:height="0.1854in" draw:z-index="8"><draw:object xlink:href="./Object 9" xlink:type="simple" xlink:show="embed" xlink:actuate="onLoad"/><draw:image xlink:href="./ObjectReplacements/Object 9" xlink:type="simple" xlink:show="embed" xlink:actuate="onLoad"/></draw:frame><text:s/>is the period of the wave and <draw:frame draw:style-name="fr4" draw:name="Object10" text:anchor-type="as-char" svg:y="-0.1492in" svg:width="0.0819in" svg:height="0.1854in" draw:z-index="9"><draw:object xlink:href="./Object 10" xlink:type="simple" xlink:show="embed" xlink:actuate="onLoad"/><draw:image xlink:href="./ObjectReplacements/Object 10" xlink:type="simple" xlink:show="embed" xlink:actuate="onLoad"/></draw:frame><text:s/>is its frequency.</text:p>
      <text:h text:style-name="P32" text:outline-level="1"><text:bookmark-start text:name="__RefHeading___Toc629_4069653955"/><text:soft-page-break/>Drawing Waves in Two Dimensions<text:bookmark-end text:name="__RefHeading___Toc629_4069653955"/></text:h>
      <text:p text:style-name="P33">To draw a wave in two dimensions, you must represent specific elements using lines and symbols. <text:span text:style-name="T23">Consider the following diagram:</text:span></text:p>
      <text:p text:style-name="P34"><draw:frame draw:style-name="fr1" draw:name="Frame4" text:anchor-type="paragraph" svg:width="4.8472in" style:rel-width="70%" svg:height="4.0799in" style:rel-height="scale-min" draw:z-index="10"><draw:text-box><text:p text:style-name="Figure"><draw:frame draw:style-name="fr2" draw:name="Image4" text:anchor-type="paragraph" svg:width="4.8472in" style:rel-width="100%" svg:height="3.8047in" style:rel-height="scale" draw:z-index="11"><draw:image xlink:href="Pictures/1000000000000238000001BE70195C06.png" xlink:type="simple" xlink:show="embed" xlink:actuate="onLoad" draw:mime-type="image/png"/></draw:frame>Figure <text:sequence text:ref-name="refFigure3" text:name="Figure" text:formula="ooow:Figure+1" style:num-format="1">4</text:sequence>: A diagram of a transverse wave with elements labeled.</text:p></draw:text-box></draw:frame></text:p>
      <text:p text:style-name="P33"><text:span text:style-name="T8">In a two-dimensional drawing of the wave above, the red solid line represents the </text:span><text:span text:style-name="T7">wave front</text:span><text:span text:style-name="T8"> (crest), while the red dotted line represents the trough. The red circle represents the source of the wave.</text:span></text:p>
      <text:h text:style-name="P35" text:outline-level="1"><text:bookmark-start text:name="__RefHeading___Toc631_4069653955"/>Pulses<text:bookmark-end text:name="__RefHeading___Toc631_4069653955"/></text:h>
      <text:p text:style-name="P36">A <text:span text:style-name="T7">pulse</text:span><text:span text:style-name="T8"> is a single vibratory disturbance. A continuous, periodic wave is the combination of several pulses generated at regular intervals.</text:span></text:p>
      <text:p text:style-name="P37"><draw:frame draw:style-name="fr1" draw:name="Frame5" text:anchor-type="paragraph" svg:width="3.3929in" style:rel-width="49%" svg:height="2.3161in" style:rel-height="scale-min" draw:z-index="12"><draw:text-box><text:p text:style-name="Figure"><draw:frame draw:style-name="fr2" draw:name="Image5 Copy 1" text:anchor-type="paragraph" svg:width="3.3929in" style:rel-width="100%" svg:height="2.0409in" style:rel-height="scale" draw:z-index="13"><draw:image xlink:href="Pictures/10000001000002C9000001AD9A265ED2.png" xlink:type="simple" xlink:show="embed" xlink:actuate="onLoad" draw:mime-type="image/png"/></draw:frame>Figure <text:sequence text:ref-name="refFigure4" text:name="Figure" text:formula="ooow:Figure+1" style:num-format="1">5</text:sequence>: Interference of pulses.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9T14:41:32.782593689</meta:creation-date>
    <dc:date>2026-06-19T23:09:57.695346476</dc:date>
    <meta:editing-duration>PT2H52M7S</meta:editing-duration>
    <meta:editing-cycles>33</meta:editing-cycles>
    <meta:generator>LibreOffice/25.8.5.2$Linux_X86_64 LibreOffice_project/580$Build-2</meta:generator>
    <meta:document-statistic meta:table-count="0" meta:image-count="5" meta:object-count="19" meta:page-count="5" meta:paragraph-count="72" meta:word-count="648" meta:character-count="3805" meta:non-whitespace-character-count="3226"/>
  </office:meta>
</office:document-meta>
</file>

<file path=Object 1/content.xml><?xml version="1.0" encoding="utf-8"?>
<math xmlns="http://www.w3.org/1998/Math/MathML" display="block">
  <semantics>
    <mi>λ</mi>
    <annotation encoding="StarMath 5.0">%lambda</annotation>
  </semantics>
</math>
</file>

<file path=Object 10/content.xml><?xml version="1.0" encoding="utf-8"?>
<math xmlns="http://www.w3.org/1998/Math/MathML" display="block">
  <semantics>
    <mi>f</mi>
    <annotation encoding="StarMath 5.0">f</annotation>
  </semantics>
</math>
</file>

<file path=Object 11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frac { d } { t }</annotation>
  </semantics>
</math>
</file>

<file path=Object 12/content.xml><?xml version="1.0" encoding="utf-8"?>
<math xmlns="http://www.w3.org/1998/Math/MathML" display="block">
  <semantics>
    <mi>v</mi>
    <annotation encoding="StarMath 5.0">v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4/content.xml><?xml version="1.0" encoding="utf-8"?>
<math xmlns="http://www.w3.org/1998/Math/MathML" display="block">
  <semantics>
    <mi>t</mi>
    <annotation encoding="StarMath 5.0">t</annotation>
  </semantics>
</math>
</file>

<file path=Object 15/content.xml><?xml version="1.0" encoding="utf-8"?>
<math xmlns="http://www.w3.org/1998/Math/MathML" display="block">
  <semantics>
    <mrow>
      <mrow>
        <mn>3.0</mn>
        <mo stretchy="false">×</mo>
        <msup>
          <mn>10</mn>
          <mn>8</mn>
        </msup>
      </mrow>
      <mrow>
        <mtext>m</mtext>
        <mo stretchy="false">/</mo>
        <mtext>s</mtext>
      </mrow>
    </mrow>
    <annotation encoding="StarMath 5.0">3.0 times 10^8 "m" / "s"</annotation>
  </semantics>
</math>
</file>

<file path=Object 16/content.xml><?xml version="1.0" encoding="utf-8"?>
<math xmlns="http://www.w3.org/1998/Math/MathML" display="block">
  <semantics>
    <mrow>
      <mn>331</mn>
      <mrow>
        <mtext>m</mtext>
        <mo stretchy="false">/</mo>
        <mtext>s</mtext>
      </mrow>
    </mrow>
    <annotation encoding="StarMath 5.0">331 "m" / "s"</annotation>
  </semantics>
</math>
</file>

<file path=Object 17/content.xml><?xml version="1.0" encoding="utf-8"?>
<math xmlns="http://www.w3.org/1998/Math/MathML" display="block">
  <semantics>
    <mtext>Hz</mtext>
    <annotation encoding="StarMath 5.0">"Hz"</annotation>
  </semantics>
</math>
</file>

<file path=Object 18/content.xml><?xml version="1.0" encoding="utf-8"?>
<math xmlns="http://www.w3.org/1998/Math/MathML" display="block">
  <semantics>
    <mtext>m</mtext>
    <annotation encoding="StarMath 5.0">"m'</annotation>
  </semantics>
</math>
</file>

<file path=Object 19/content.xml><?xml version="1.0" encoding="utf-8"?>
<math xmlns="http://www.w3.org/1998/Math/MathML" display="block">
  <semantics>
    <mrow>
      <mtext>c</mtext>
      <mo stretchy="false">/</mo>
      <mtext>s</mtext>
    </mrow>
    <annotation encoding="StarMath 5.0">"c" / "s"</annotation>
  </semantics>
</math>
</file>

<file path=Object 2/content.xml><?xml version="1.0" encoding="utf-8"?>
<math xmlns="http://www.w3.org/1998/Math/MathML" display="block">
  <semantics>
    <mi>f</mi>
    <annotation encoding="StarMath 5.0">f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Object 4/content.xml><?xml version="1.0" encoding="utf-8"?>
<math xmlns="http://www.w3.org/1998/Math/MathML" display="block">
  <semantics>
    <mrow>
      <mrow>
        <mi>v</mi>
        <mo stretchy="false">=</mo>
        <mi>f</mi>
      </mrow>
      <mi>λ</mi>
    </mrow>
    <annotation encoding="StarMath 5.0">v = f %lambda</annotation>
  </semantics>
</math>
</file>

<file path=Object 5/content.xml><?xml version="1.0" encoding="utf-8"?>
<math xmlns="http://www.w3.org/1998/Math/MathML" display="block">
  <semantics>
    <mi>v</mi>
    <annotation encoding="StarMath 5.0">v</annotation>
  </semantics>
</math>
</file>

<file path=Object 6/content.xml><?xml version="1.0" encoding="utf-8"?>
<math xmlns="http://www.w3.org/1998/Math/MathML" display="block">
  <semantics>
    <mi>f</mi>
    <annotation encoding="StarMath 5.0">f</annotation>
  </semantics>
</math>
</file>

<file path=Object 7/content.xml><?xml version="1.0" encoding="utf-8"?>
<math xmlns="http://www.w3.org/1998/Math/MathML" display="block">
  <semantics>
    <mi>λ</mi>
    <annotation encoding="StarMath 5.0">%lambda</annotation>
  </semantics>
</math>
</file>

<file path=Object 8/content.xml><?xml version="1.0" encoding="utf-8"?>
<math xmlns="http://www.w3.org/1998/Math/MathML" display="block">
  <semantics>
    <mrow>
      <mi>T</mi>
      <mo stretchy="false">=</mo>
      <mfrac>
        <mn>1</mn>
        <mi>f</mi>
      </mfrac>
    </mrow>
    <annotation encoding="StarMath 5.0">T = frac { 1 } { f }</annotation>
  </semantics>
</math>
</file>

<file path=Object 9/content.xml><?xml version="1.0" encoding="utf-8"?>
<math xmlns="http://www.w3.org/1998/Math/MathML" display="block">
  <semantics>
    <mi>T</mi>
    <annotation encoding="StarMath 5.0">T</annotation>
  </semantics>
</math>
</file>
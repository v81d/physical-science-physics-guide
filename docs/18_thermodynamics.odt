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content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eeeeee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tyle="normal" officeooo:rsid="0015d3fa" officeooo:paragraph-rsid="0015d3fa" style:font-style-asian="normal" style:font-style-complex="normal"/>
    </style:style>
    <style:style style:name="P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5d3fa" officeooo:paragraph-rsid="0015d3fa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rsid="0019de40" officeooo:paragraph-rsid="0019de40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9de40" officeooo:paragraph-rsid="0019de40" style:font-weight-asian="normal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fo:font-weight="bold" officeooo:rsid="0019de40" officeooo:paragraph-rsid="0019de40" style:font-weight-asian="bold" style:font-weight-complex="bold"/>
    </style:style>
    <style:style style:name="P9" style:family="paragraph" style:parent-style-name="Text_20_body" style:list-style-name="L1">
      <style:paragraph-properties fo:text-align="start" style:justify-single-word="false"/>
      <style:text-properties fo:font-weight="bold" officeooo:rsid="001e316b" officeooo:paragraph-rsid="001e316b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rsid="001ea805" officeooo:paragraph-rsid="001ea805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204098" officeooo:paragraph-rsid="00204098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204098" officeooo:paragraph-rsid="00204098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0204098" officeooo:paragraph-rsid="00204098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204098" officeooo:paragraph-rsid="00204098" style:font-weight-asian="normal" style:font-weight-complex="normal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officeooo:paragraph-rsid="00204098"/>
    </style:style>
    <style:style style:name="P17" style:family="paragraph" style:parent-style-name="Text_20_body">
      <style:paragraph-properties fo:text-align="start" style:justify-single-word="false"/>
      <style:text-properties officeooo:rsid="002d7580" officeooo:paragraph-rsid="002d7580"/>
    </style:style>
    <style:style style:name="P18" style:family="paragraph" style:parent-style-name="Text_20_body">
      <style:paragraph-properties fo:text-align="center" style:justify-single-word="false"/>
      <style:text-properties officeooo:paragraph-rsid="00204098"/>
    </style:style>
    <style:style style:name="P19" style:family="paragraph" style:parent-style-name="Text_20_body">
      <style:paragraph-properties fo:text-align="start" style:justify-single-word="false"/>
      <style:text-properties officeooo:rsid="00204098" officeooo:paragraph-rsid="00204098"/>
    </style:style>
    <style:style style:name="P20" style:family="paragraph" style:parent-style-name="Text_20_body">
      <style:paragraph-properties fo:text-align="start" style:justify-single-word="false"/>
      <style:text-properties officeooo:rsid="0020ebbc" officeooo:paragraph-rsid="0020ebbc"/>
    </style:style>
    <style:style style:name="P21" style:family="paragraph" style:parent-style-name="Text_20_body" style:list-style-name="L2">
      <style:paragraph-properties fo:text-align="start" style:justify-single-word="false"/>
      <style:text-properties fo:font-weight="bold" officeooo:rsid="0020ebbc" officeooo:paragraph-rsid="0020ebbc" style:font-weight-asian="bold" style:font-weight-complex="bold"/>
    </style:style>
    <style:style style:name="P22" style:family="paragraph" style:parent-style-name="Text_20_body" style:list-style-name="L2">
      <style:paragraph-properties fo:text-align="start" style:justify-single-word="false"/>
      <style:text-properties fo:font-weight="bold" officeooo:rsid="0020ebbc" officeooo:paragraph-rsid="0060cc61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20ebbc" officeooo:paragraph-rsid="0020ebbc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officeooo:rsid="00329aa3" officeooo:paragraph-rsid="0065afd2"/>
    </style:style>
    <style:style style:name="P25" style:family="paragraph" style:parent-style-name="Text_20_body">
      <style:paragraph-properties fo:text-align="start" style:justify-single-word="false"/>
      <style:text-properties officeooo:rsid="0034066d" officeooo:paragraph-rsid="0034066d"/>
    </style:style>
    <style:style style:name="P26" style:family="paragraph" style:parent-style-name="Text_20_body" style:list-style-name="L3">
      <style:paragraph-properties fo:text-align="start" style:justify-single-word="false"/>
      <style:text-properties fo:font-weight="bold" officeooo:rsid="0034a337" officeooo:paragraph-rsid="0034a337" style:font-weight-asian="bold" style:font-weight-complex="bold"/>
    </style:style>
    <style:style style:name="P27" style:family="paragraph" style:parent-style-name="Text_20_body" style:list-style-name="L3">
      <style:paragraph-properties fo:text-align="start" style:justify-single-word="false"/>
      <style:text-properties fo:font-weight="bold" officeooo:rsid="0034066d" officeooo:paragraph-rsid="0034066d" style:font-weight-asian="bold" style:font-weight-complex="bold"/>
    </style:style>
    <style:style style:name="P28" style:family="paragraph" style:parent-style-name="Text_20_body" style:list-style-name="L3">
      <style:paragraph-properties fo:text-align="start" style:justify-single-word="false"/>
      <style:text-properties officeooo:paragraph-rsid="0034066d"/>
    </style:style>
    <style:style style:name="P29" style:family="paragraph" style:parent-style-name="Text_20_body">
      <style:paragraph-properties fo:text-align="start" style:justify-single-word="false"/>
      <style:text-properties officeooo:paragraph-rsid="00417c28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417c28" officeooo:paragraph-rsid="00417c28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officeooo:rsid="00449c06" officeooo:paragraph-rsid="00449c06"/>
    </style:style>
    <style:style style:name="P32" style:family="paragraph" style:parent-style-name="Text_20_body">
      <style:paragraph-properties fo:text-align="center" style:justify-single-word="false"/>
      <style:text-properties fo:font-weight="normal" officeooo:rsid="00449c06" officeooo:paragraph-rsid="00449c06" style:font-weight-asian="normal" style:font-weight-complex="normal"/>
    </style:style>
    <style:style style:name="P33" style:family="paragraph" style:parent-style-name="Text_20_body" style:list-style-name="L4">
      <style:paragraph-properties fo:text-align="start" style:justify-single-word="false"/>
      <style:text-properties officeooo:rsid="00204098" officeooo:paragraph-rsid="00204098"/>
    </style:style>
    <style:style style:name="P34" style:family="paragraph" style:parent-style-name="Text_20_body" style:list-style-name="L4">
      <style:paragraph-properties fo:text-align="center" style:justify-single-word="false"/>
      <style:text-properties officeooo:rsid="00204098" officeooo:paragraph-rsid="00204098"/>
    </style:style>
    <style:style style:name="P35" style:family="paragraph" style:parent-style-name="Text_20_body" style:list-style-name="L4">
      <style:paragraph-properties fo:text-align="start" style:justify-single-word="false"/>
      <style:text-properties officeooo:rsid="00307a89" officeooo:paragraph-rsid="00307a89"/>
    </style:style>
    <style:style style:name="P36" style:family="paragraph" style:parent-style-name="Text_20_body" style:list-style-name="L4">
      <style:paragraph-properties fo:text-align="center" style:justify-single-word="false"/>
      <style:text-properties officeooo:rsid="00307a89" officeooo:paragraph-rsid="00307a89"/>
    </style:style>
    <style:style style:name="T1" style:family="text">
      <style:text-properties officeooo:rsid="002f2564"/>
    </style:style>
    <style:style style:name="T2" style:family="text">
      <style:text-properties officeooo:rsid="0061c88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de40"/>
    </style:style>
    <style:style style:name="T5" style:family="text">
      <style:text-properties officeooo:rsid="001e316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316b" style:font-weight-asian="normal" style:font-weight-complex="normal"/>
    </style:style>
    <style:style style:name="T8" style:family="text">
      <style:text-properties fo:font-weight="bold" officeooo:rsid="00204098" style:font-weight-asian="bold" style:font-weight-complex="bold"/>
    </style:style>
    <style:style style:name="T9" style:family="text">
      <style:text-properties officeooo:rsid="00204098"/>
    </style:style>
    <style:style style:name="T10" style:family="text">
      <style:text-properties officeooo:rsid="00239f32"/>
    </style:style>
    <style:style style:name="T11" style:family="text">
      <style:text-properties fo:font-weight="normal" officeooo:rsid="0060cc61" style:font-weight-asian="normal" style:font-weight-complex="normal"/>
    </style:style>
    <style:style style:name="T12" style:family="text">
      <style:text-properties fo:font-style="italic" fo:font-weight="normal" officeooo:rsid="0060cc6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feec6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900b4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officeooo:rsid="0030c318" style:font-style-asian="normal" style:font-weight-asian="normal" style:font-style-complex="normal" style:font-weight-complex="normal"/>
    </style:style>
    <style:style style:name="T16" style:family="text">
      <style:text-properties fo:font-style="italic" fo:font-weight="normal" officeooo:rsid="0030c318" style:font-style-asian="italic" style:font-weight-asian="normal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feec6" style:font-style-asian="italic" style:font-style-complex="italic"/>
    </style:style>
    <style:style style:name="T19" style:family="text">
      <style:text-properties fo:font-style="italic" officeooo:rsid="002900b4" style:font-style-asian="italic" style:font-style-complex="italic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officeooo:rsid="0034a337" style:font-weight-asian="normal" style:font-weight-complex="normal"/>
    </style:style>
    <style:style style:name="T23" style:family="text">
      <style:text-properties officeooo:rsid="003b8a5c"/>
    </style:style>
    <style:style style:name="T24" style:family="text">
      <style:text-properties fo:font-weight="normal" officeooo:rsid="003ea7ce" style:font-weight-asian="normal" style:font-weight-complex="normal"/>
    </style:style>
    <style:style style:name="T25" style:family="text">
      <style:text-properties fo:font-weight="bold" officeooo:rsid="0034066d" style:font-weight-asian="bold" style:font-weight-complex="bold"/>
    </style:style>
    <style:style style:name="T26" style:family="text">
      <style:text-properties fo:font-weight="normal" officeooo:rsid="0034066d" style:font-weight-asian="normal" style:font-weight-complex="normal"/>
    </style:style>
    <style:style style:name="T27" style:family="text">
      <style:text-properties fo:font-weight="normal" officeooo:rsid="00387ea9" style:font-weight-asian="normal" style:font-weight-complex="normal"/>
    </style:style>
    <style:style style:name="T28" style:family="text">
      <style:text-properties fo:font-weight="bold" officeooo:rsid="00417c28" style:font-weight-asian="bold" style:font-weight-complex="bold"/>
    </style:style>
    <style:style style:name="T29" style:family="text">
      <style:text-properties fo:font-weight="normal" officeooo:rsid="00417c28" style:font-weight-asian="normal" style:font-weight-complex="normal"/>
    </style:style>
    <style:style style:name="T30" style:family="text">
      <style:text-properties fo:font-style="normal" officeooo:rsid="00307a89" style:font-style-asian="normal" style:font-style-complex="normal"/>
    </style:style>
    <style:style style:name="T31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­</text:span>Thermodynamics</text:p>
      <text:p text:style-name="P1">January 15, 2026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2042_679008467" office:name="Introduction to Thermodynamics" text:style-name="Index_20_Link" text:visited-style-name="Index_20_Link">Introduction to Thermodynamics<text:tab/>2</text:a></text:p>
          <text:p text:style-name="P3"><text:a xlink:type="simple" xlink:href="#__RefHeading___Toc2044_679008467" office:name="Concept Note" text:style-name="Index_20_Link" text:visited-style-name="Index_20_Link">Concept Note<text:tab/>2</text:a></text:p>
          <text:p text:style-name="P2"><text:a xlink:type="simple" xlink:href="#__RefHeading___Toc2046_679008467" office:name="Thermodynamics in Everyday Life" text:style-name="Index_20_Link" text:visited-style-name="Index_20_Link">Thermodynamics in Everyday Life<text:tab/>2</text:a></text:p>
          <text:p text:style-name="P2"><text:a xlink:type="simple" xlink:href="#__RefHeading___Toc2048_679008467" office:name="Essential Concepts" text:style-name="Index_20_Link" text:visited-style-name="Index_20_Link">Essential Concepts<text:tab/>2</text:a></text:p>
          <text:p text:style-name="P3"><text:a xlink:type="simple" xlink:href="#__RefHeading___Toc2050_679008467" office:name="Energy Flow" text:style-name="Index_20_Link" text:visited-style-name="Index_20_Link">Energy Flow<text:tab/>2</text:a></text:p>
          <text:p text:style-name="P3"><text:a xlink:type="simple" xlink:href="#__RefHeading___Toc2052_679008467" office:name="Calculation" text:style-name="Index_20_Link" text:visited-style-name="Index_20_Link">Calculation<text:tab/>2</text:a></text:p>
          <text:p text:style-name="P3"><text:a xlink:type="simple" xlink:href="#__RefHeading___Toc2054_679008467" office:name="Energy Limits" text:style-name="Index_20_Link" text:visited-style-name="Index_20_Link">Energy Limits<text:tab/>2</text:a></text:p>
          <text:p text:style-name="P2"><text:a xlink:type="simple" xlink:href="#__RefHeading___Toc2056_679008467" office:name="Thermal Energy vs. Temperature" text:style-name="Index_20_Link" text:visited-style-name="Index_20_Link">Thermal Energy vs. Temperature<text:tab/>3</text:a></text:p>
          <text:p text:style-name="P2"><text:a xlink:type="simple" xlink:href="#__RefHeading___Toc2058_679008467" office:name="Specific Heat Capacity" text:style-name="Index_20_Link" text:visited-style-name="Index_20_Link">Specific Heat Capacity<text:tab/>3</text:a></text:p>
          <text:p text:style-name="P2"><text:a xlink:type="simple" xlink:href="#__RefHeading___Toc2060_679008467" office:name="Measuring Heat Transfer" text:style-name="Index_20_Link" text:visited-style-name="Index_20_Link">Measuring Heat Transfer<text:tab/>3</text:a></text:p>
          <text:p text:style-name="P2"><text:a xlink:type="simple" xlink:href="#__RefHeading___Toc2062_679008467" office:name="Calorimeter Setup &amp; Data Interpretation*" text:style-name="Index_20_Link" text:visited-style-name="Index_20_Link">Calorimeter Setup &amp; Data Interpretation*<text:tab/>4</text:a></text:p>
          <text:p text:style-name="P2"><text:a xlink:type="simple" xlink:href="#__RefHeading___Toc2064_679008467" office:name="The Laws of Thermodynamics" text:style-name="Index_20_Link" text:visited-style-name="Index_20_Link">The Laws of Thermodynamics<text:tab/>4</text:a></text:p>
          <text:p text:style-name="P3"><text:a xlink:type="simple" xlink:href="#__RefHeading___Toc2066_679008467" office:name="Entropy and The Second Law" text:style-name="Index_20_Link" text:visited-style-name="Index_20_Link">Entropy and The Second Law<text:tab/>4</text:a></text:p>
          <text:p text:style-name="P2"><text:a xlink:type="simple" xlink:href="#__RefHeading___Toc2068_679008467" office:name="Measuring Efficiency" text:style-name="Index_20_Link" text:visited-style-name="Index_20_Link">Measuring Efficiency<text:tab/>4</text:a></text:p>
          <text:p text:style-name="P2"><text:a xlink:type="simple" xlink:href="#__RefHeading___Toc2070_679008467" office:name="Examples &amp; Applications" text:style-name="Index_20_Link" text:visited-style-name="Index_20_Link">Examples &amp; Applications<text:tab/>5</text:a></text:p>
        </text:index-body>
      </text:table-of-content>
      <text:h text:style-name="Heading_20_1" text:outline-level="1" text:is-list-header="true"/>
      <text:h text:style-name="P4" text:outline-level="1"><text:bookmark-start text:name="__RefHeading___Toc2042_679008467"/><text:span text:style-name="T2">Introduction to T</text:span>hermodynamics<text:bookmark-end text:name="__RefHeading___Toc2042_679008467"/></text:h>
      <text:p text:style-name="P5"><text:span text:style-name="T3">Thermodynamics</text:span> is the study of energy flow in systems, focusing on how heat energy is transferred, transformed, and conserved in various processes and applications that form systems.</text:p>
      <text:p text:style-name="P5">Energy is always conserved, but its ability to do useful work is limited. Even the most advanced engines cannot convert all input energy into useful work. Some <text:span text:style-name="T4">of the </text:span>energy is transferred <text:span text:style-name="T5">as</text:span> <text:span text:style-name="T3">excess heat</text:span>.</text:p>
      <text:h text:style-name="Heading_20_2" text:outline-level="2"><text:bookmark-start text:name="__RefHeading___Toc2044_679008467"/>Concept Note<text:bookmark-end text:name="__RefHeading___Toc2044_679008467"/></text:h>
      <text:p text:style-name="P6">A <text:span text:style-name="T3">system</text:span><text:span text:style-name="T6"> refers to the part of the universe being studied (e.g., an engine, a human, Earth’s atmosphere, etc.). Everything outside the system can exchange energy and matter with it.</text:span></text:p>
      <text:h text:style-name="Heading_20_1" text:outline-level="1"><text:bookmark-start text:name="__RefHeading___Toc2046_679008467"/>Thermodynamics in Everyday Life<text:bookmark-end text:name="__RefHeading___Toc2046_679008467"/></text:h>
      <text:p text:style-name="P7">Thermodynamics power many modern systems. These principles are prominent examples of energy transformations in everyday systems and practical applications:</text:p>
      <text:list text:style-name="L1">
        <text:list-item>
          <text:p text:style-name="P8">The Human Body<text:span text:style-name="T6">: Chemical energy in food is converted into mechanical work and thermal energy as it is digested. </text:span><text:span text:style-name="T7">Excess heat is transferred to the surroundings through radiation, convection, and evaporation.</text:span></text:p>
        </text:list-item>
        <text:list-item>
          <text:p text:style-name="P9">Engines<text:span text:style-name="T6">: Thermal energy is converted into mechanical work while waste heat is transferred to the surroundings.</text:span></text:p>
        </text:list-item>
        <text:list-item>
          <text:p text:style-name="P9">Power Plants<text:span text:style-name="T6">: Fuel is burned, transferring energy to water, resulting in mechanical work being done in a generator, while transferring waste heat to the surroundings.</text:span></text:p>
        </text:list-item>
      </text:list>
      <text:h text:style-name="Heading_20_1" text:outline-level="1"><text:bookmark-start text:name="__RefHeading___Toc2048_679008467"/>Essential Concepts<text:bookmark-end text:name="__RefHeading___Toc2048_679008467"/></text:h>
      <text:h text:style-name="Heading_20_2" text:outline-level="2"><text:bookmark-start text:name="__RefHeading___Toc2050_679008467"/>Energy Flow<text:bookmark-end text:name="__RefHeading___Toc2050_679008467"/></text:h>
      <text:p text:style-name="P10">Energy flows in thermal processes through various means, affecting how systems interact and ultimately determining the efficiency of energy conversions in everyday life.</text:p>
      <text:h text:style-name="Heading_20_2" text:outline-level="2"><text:bookmark-start text:name="__RefHeading___Toc2052_679008467"/>Calculat<text:span text:style-name="T2">ion</text:span><text:bookmark-end text:name="__RefHeading___Toc2052_679008467"/></text:h>
      <text:p text:style-name="P10">Heat transfer is calculated using the formula <draw:frame draw:style-name="fr1" draw:name="Object1" text:anchor-type="as-char" svg:y="-0.1492in" svg:width="0.7299in" svg:height="0.1854in" draw:z-index="0"><draw:object xlink:href="./Object 1" xlink:type="simple" xlink:show="embed" xlink:actuate="onLoad"/><draw:image xlink:href="./ObjectReplacements/Object 1" xlink:type="simple" xlink:show="embed" xlink:actuate="onLoad"/></draw:frame><text:s/>to analyze changes in temperature and energy in thermal systems.</text:p>
      <text:h text:style-name="Heading_20_2" text:outline-level="2"><text:bookmark-start text:name="__RefHeading___Toc2054_679008467"/>Energy Limits<text:bookmark-end text:name="__RefHeading___Toc2054_679008467"/></text:h>
      <text:p text:style-name="P10">Understanding the limits of ideal energy conversions demonstrates the significance of entropy and why real-world processes often result in energy losses.</text:p>
      <text:h text:style-name="Heading_20_1" text:outline-level="1"><text:bookmark-start text:name="__RefHeading___Toc2056_679008467"/><text:soft-page-break/>Thermal Energy vs. Temperature<text:bookmark-end text:name="__RefHeading___Toc2056_679008467"/></text:h>
      <text:p text:style-name="P11">Temperature<text:span text:style-name="T6"> is an intensive property (independent of other properties) related to the </text:span>average kinetic energy<text:span text:style-name="T6"> of particles. </text:span>Thermal energy<text:span text:style-name="T6"> (or heat), conversely, is an extensive property depending on both temperature and the number of particles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Feature</text:p>
          </table:table-cell>
          <table:table-cell table:style-name="Table1.A1" office:value-type="string">
            <text:p text:style-name="P12">Heat</text:p>
          </table:table-cell>
          <table:table-cell table:style-name="Table1.C1" office:value-type="string">
            <text:p text:style-name="P12">Temperature</text:p>
          </table:table-cell>
        </table:table-row>
        <table:table-row>
          <table:table-cell table:style-name="Table1.A2" office:value-type="string">
            <text:p text:style-name="P12">Definition</text:p>
          </table:table-cell>
          <table:table-cell table:style-name="Table1.A2" office:value-type="string">
            <text:p text:style-name="P13">Energy transferred between objects.</text:p>
          </table:table-cell>
          <table:table-cell table:style-name="Table1.C2" office:value-type="string">
            <text:p text:style-name="P13">Measure of average kinetic energy of particles.</text:p>
          </table:table-cell>
        </table:table-row>
        <table:table-row>
          <table:table-cell table:style-name="Table1.A2" office:value-type="string">
            <text:p text:style-name="P12">Units<text:span text:style-name="T6"/></text:p>
          </table:table-cell>
          <table:table-cell table:style-name="Table1.A2" office:value-type="string">
            <text:p text:style-name="P13">Joules (<draw:frame draw:style-name="fr1" draw:name="Object2" text:anchor-type="as-char" svg:y="-0.1492in" svg:width="0.0756in" svg:height="0.1854in" draw:z-index="1"><draw:object xlink:href="./Object 2" xlink:type="simple" xlink:show="embed" xlink:actuate="onLoad"/><draw:image xlink:href="./ObjectReplacements/Object 2" xlink:type="simple" xlink:show="embed" xlink:actuate="onLoad"/></draw:frame>)</text:p>
          </table:table-cell>
          <table:table-cell table:style-name="Table1.C2" office:value-type="string">
            <text:p text:style-name="P13">Celsius (<draw:frame draw:style-name="fr1" draw:name="Object3" text:anchor-type="as-char" svg:y="-0.1492in" svg:width="0.2028in" svg:height="0.1854in" draw:z-index="2"><draw:object xlink:href="./Object 3" xlink:type="simple" xlink:show="embed" xlink:actuate="onLoad"/><draw:image xlink:href="./ObjectReplacements/Object 3" xlink:type="simple" xlink:show="embed" xlink:actuate="onLoad"/></draw:frame>), Fahrenheit (<draw:frame draw:style-name="fr1" draw:name="Object4" text:anchor-type="as-char" svg:y="-0.1492in" svg:width="0.1898in" svg:height="0.1854in" draw:z-index="3"><draw:object xlink:href="./Object 4" xlink:type="simple" xlink:show="embed" xlink:actuate="onLoad"/><draw:image xlink:href="./ObjectReplacements/Object 4" xlink:type="simple" xlink:show="embed" xlink:actuate="onLoad"/></draw:frame>), Kelvin (<draw:frame draw:style-name="fr1" draw:name="Object5" text:anchor-type="as-char" svg:y="-0.1492in" svg:width="0.1319in" svg:height="0.1854in" draw:z-index="4"><draw:object xlink:href="./Object 5" xlink:type="simple" xlink:show="embed" xlink:actuate="onLoad"/><draw:image xlink:href="./ObjectReplacements/Object 5" xlink:type="simple" xlink:show="embed" xlink:actuate="onLoad"/></draw:frame>)</text:p>
          </table:table-cell>
        </table:table-row>
        <table:table-row>
          <table:table-cell table:style-name="Table1.A2" office:value-type="string">
            <text:p text:style-name="P12">Dependency</text:p>
          </table:table-cell>
          <table:table-cell table:style-name="Table1.A2" office:value-type="string">
            <text:p text:style-name="P13">Depends on mass and temperature change.</text:p>
          </table:table-cell>
          <table:table-cell table:style-name="Table1.C2" office:value-type="string">
            <text:p text:style-name="P13">Independent of mass.</text:p>
          </table:table-cell>
        </table:table-row>
        <table:table-row>
          <table:table-cell table:style-name="Table1.A2" office:value-type="string">
            <text:p text:style-name="P12">Type of Quantity</text:p>
          </table:table-cell>
          <table:table-cell table:style-name="Table1.A2" office:value-type="string">
            <text:p text:style-name="P13">Extensive (depends on amount).</text:p>
          </table:table-cell>
          <table:table-cell table:style-name="Table1.C2" office:value-type="string">
            <text:p text:style-name="P14">Intensive (independent of amount).</text:p>
          </table:table-cell>
        </table:table-row>
        <table:table-row>
          <table:table-cell table:style-name="Table1.A2" office:value-type="string">
            <text:p text:style-name="P12">Flow</text:p>
          </table:table-cell>
          <table:table-cell table:style-name="Table1.A2" office:value-type="string">
            <text:p text:style-name="P13">Flows from hotter to cooler object.</text:p>
          </table:table-cell>
          <table:table-cell table:style-name="Table1.C2" office:value-type="string">
            <text:p text:style-name="P13">Does not flow.</text:p>
          </table:table-cell>
        </table:table-row>
      </table:table>
      <text:h text:style-name="P15" text:outline-level="1"><text:bookmark-start text:name="__RefHeading___Toc2058_679008467"/>Specific Heat Capacity<text:bookmark-end text:name="__RefHeading___Toc2058_679008467"/></text:h>
      <text:p text:style-name="P16"><text:span text:style-name="T8">Specific heat capacity</text:span><text:span text:style-name="T9"> is the amount of energy the temperature of </text:span><text:span text:style-name="T9"><draw:frame draw:style-name="fr1" draw:name="Object6" text:anchor-type="as-char" svg:y="-0.1492in" svg:width="0.2783in" svg:height="0.1854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9"><text:s/>of a substance by </text:span><text:span text:style-name="T9"><draw:frame draw:style-name="fr1" draw:name="Object7" text:anchor-type="as-char" svg:y="-0.1492in" svg:width="0.3028in" svg:height="0.185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9"><text:s/>(</text:span><text:span text:style-name="T9"><draw:frame draw:style-name="fr1" draw:name="Object8" text:anchor-type="as-char" svg:y="-0.1492in" svg:width="0.2319in" svg:height="0.185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). It is measured in </text:span><text:bookmark-start text:name="__DdeLink__744_2426631043"/><text:span text:style-name="T9"><draw:frame draw:style-name="fr1" draw:name="Object9" text:anchor-type="as-char" svg:y="-0.1492in" svg:width="0.5835in" svg:height="0.1854in" draw:z-index="8"><draw:object xlink:href="./Object 9" xlink:type="simple" xlink:show="embed" xlink:actuate="onLoad"/><draw:image xlink:href="./ObjectReplacements/Object 9" xlink:type="simple" xlink:show="embed" xlink:actuate="onLoad"/></draw:frame></text:span><text:bookmark-end text:name="__DdeLink__744_2426631043"/><text:span text:style-name="T9"><text:s/>or </text:span><text:span text:style-name="T9"><draw:frame draw:style-name="fr1" draw:name="Object10" text:anchor-type="as-char" svg:y="-0.1492in" svg:width="0.5126in" svg:height="0.185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9">.</text:span></text:p>
      <text:p text:style-name="P17">Consider the formula:</text:p>
      <text:p text:style-name="P18"><draw:frame draw:style-name="fr1" draw:name="Object11" text:anchor-type="as-char" svg:y="-0.1492in" svg:width="0.7299in" svg:height="0.1854in" draw:z-index="10"><draw:object xlink:href="./Object 11" xlink:type="simple" xlink:show="embed" xlink:actuate="onLoad"/><draw:image xlink:href="./ObjectReplacements/Object 11" xlink:type="simple" xlink:show="embed" xlink:actuate="onLoad"/></draw:frame>,</text:p>
      <text:p text:style-name="P19">where <draw:frame draw:style-name="fr1" draw:name="Object12" text:anchor-type="as-char" svg:y="-0.1492in" svg:width="0.1264in" svg:height="0.1854in" draw:z-index="11"><draw:object xlink:href="./Object 12" xlink:type="simple" xlink:show="embed" xlink:actuate="onLoad"/><draw:image xlink:href="./ObjectReplacements/Object 12" xlink:type="simple" xlink:show="embed" xlink:actuate="onLoad"/></draw:frame><text:s/><text:span text:style-name="T10">is the thermal energy in joules (</text:span><text:span text:style-name="T10"><draw:frame draw:style-name="fr1" draw:name="Object17" text:anchor-type="as-char" svg:y="-0.1492in" svg:width="0.0756in" svg:height="0.1854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), </text:span><text:span text:style-name="T10"><draw:frame draw:style-name="fr1" draw:name="Object18" text:anchor-type="as-char" svg:y="-0.1492in" svg:width="0.1256in" svg:height="0.1854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0"><text:s/>is the mass in grams (</text:span><text:span text:style-name="T10"><draw:frame draw:style-name="fr1" draw:name="Object19" text:anchor-type="as-char" svg:y="-0.1492in" svg:width="0.0909in" svg:height="0.1854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0">), and </text:span><text:span text:style-name="T10"><draw:frame draw:style-name="fr1" draw:name="Object20" text:anchor-type="as-char" svg:y="-0.1492in" svg:width="0.2409in" svg:height="0.1854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<text:s/>is the change in temperature (</text:span><text:span text:style-name="T10"><draw:frame draw:style-name="fr1" draw:name="Object21" text:anchor-type="as-char" svg:y="-0.1492in" svg:width="0.2028in" svg:height="0.1854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0"> or </text:span><text:span text:style-name="T10"><draw:frame draw:style-name="fr1" draw:name="Object22" text:anchor-type="as-char" svg:y="-0.1492in" svg:width="0.1319in" svg:height="0.1854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).</text:span></text:p>
      <text:p text:style-name="P19">Materials with high specific heat resist temperature change, while materials with low specific heat change temperature quickly.</text:p>
      <text:p text:style-name="P19">Specific heat capacity is crucial in understanding how different materials absorb heat. It determines how much energy is needed to raise a substance’s temperature, impacting heat transfer calculations in thermal systems.</text:p>
      <text:h text:style-name="Heading_20_1" text:outline-level="1"><text:bookmark-start text:name="__RefHeading___Toc2060_679008467"/>Measuring Heat Transfer<text:bookmark-end text:name="__RefHeading___Toc2060_679008467"/></text:h>
      <text:p text:style-name="P20">Heat transfer occurs through three mechanisms:</text:p>
      <text:list text:style-name="L2">
        <text:list-item>
          <text:p text:style-name="P21">Conduction<text:span text:style-name="T6">: Energy transfer through direct contact.</text:span></text:p>
        </text:list-item>
        <text:list-item>
          <text:p text:style-name="P22">Convection<text:span text:style-name="T6">:</text:span><text:span text:style-name="T11">* </text:span><text:span text:style-name="T12">(This </text:span><text:span text:style-name="T13">idea or </text:span><text:span text:style-name="T12">topic is excluded in the new </text:span><text:span text:style-name="T14">Physical Science: Physics course.</text:span><text:span text:style-name="T12">)</text:span><text:span text:style-name="T6"> Energy transfer through fluid motion. </text:span><text:span text:style-name="T15">(</text:span><text:span text:style-name="T16">“Fluid” refers to any substance that has no fixed shape and is able to flow. Fluids are typically gases or liquids.</text:span><text:span text:style-name="T15">)</text:span></text:p>
        </text:list-item>
        <text:list-item>
          <text:p text:style-name="P21">Radiation<text:span text:style-name="T6">: Energy transfer via electromagnetic waves.</text:span></text:p>
        </text:list-item>
      </text:list>
      <text:p text:style-name="P23"><text:soft-page-break/>These mechanisms explain how energy moves within and between systems.</text:p>
      <text:h text:style-name="Heading_20_1" text:outline-level="1"><text:bookmark-start text:name="__RefHeading___Toc2062_679008467"/>Calorimeter Setup &amp; Data Interpretation<text:span text:style-name="T2">*</text:span><text:bookmark-end text:name="__RefHeading___Toc2062_679008467"/></text:h>
      <text:p text:style-name="P24"><text:span text:style-name="T17">(This </text:span><text:span text:style-name="T18">idea or </text:span><text:span text:style-name="T17">topic is excluded in the new </text:span><text:span text:style-name="T19">Physical Science: Physics course.</text:span><text:span text:style-name="T17">)</text:span></text:p>
      <text:p text:style-name="P24">A <text:span text:style-name="T3">calorimeter</text:span><text:span text:style-name="T6"> measures heat transfer by isolating a system. One key principle to remember is that energy lost by one substance equals the energy gained by another. However, a limitation of calorimeters is that they are not perfectly </text:span><text:span text:style-name="T20">insulated</text:span><text:span text:style-name="T21"> (isolated), leading to experimental error.</text:span></text:p>
      <text:h text:style-name="Heading_20_1" text:outline-level="1"><text:bookmark-start text:name="__RefHeading___Toc2064_679008467"/>The Laws of Thermodynamics<text:bookmark-end text:name="__RefHeading___Toc2064_679008467"/></text:h>
      <text:p text:style-name="P25">The <text:span text:style-name="T3">laws of thermodynamics</text:span><text:span text:style-name="T6"> define the scientific laws that characterize thermodynamic systems in equilibrium. The </text:span><text:span text:style-name="T22">four</text:span><text:span text:style-name="T6"> primary laws of thermodynamics are:</text:span></text:p>
      <text:list text:style-name="L3">
        <text:list-item>
          <text:p text:style-name="P26">Zeroth Law<text:span text:style-name="T6">: If two systems are in thermodynamic equilibrium with a third system, they are also in thermodynamic equilibrium with each other.</text:span></text:p>
        </text:list-item>
        <text:list-item>
          <text:p text:style-name="P27">First Law<text:span text:style-name="T6">: Energy cannot be created nor destroyed, only transferred or transformed.</text:span></text:p>
        </text:list-item>
        <text:list-item>
          <text:p text:style-name="P27">Seco<text:span text:style-name="T23">nd La</text:span>w<text:span text:style-name="T6">: No process is perfectly efficient; some energy always becomes unusable thermal energy, </text:span><text:span text:style-name="T24">leading to an increase in entropy and determining the direction of spontaneous processes.</text:span></text:p>
        </text:list-item>
        <text:list-item>
          <text:p text:style-name="P28"><text:span text:style-name="T25">Third Law</text:span><text:span text:style-name="T26">: As temperature approache</text:span><text:span text:style-name="T27">­</text:span><text:span text:style-name="T26">s absolute zero, entropy approaches a minimum value.</text:span></text:p>
        </text:list-item>
      </text:list>
      <text:h text:style-name="Heading_20_2" text:outline-level="2"><text:bookmark-start text:name="__RefHeading___Toc2066_679008467"/>Entropy <text:span text:style-name="T2">and</text:span> The Second Law<text:bookmark-end text:name="__RefHeading___Toc2066_679008467"/></text:h>
      <text:p text:style-name="P29"><text:span text:style-name="T28">Entropy</text:span><text:span text:style-name="T29"> in thermodynamics is a measure of how much disorder or randomness there is in a system. It is also a way to describe how energy </text:span><text:span text:style-name="T28">spreads out</text:span><text:span text:style-name="T29"> or becomes less useful for doing work.</text:span></text:p>
      <text:p text:style-name="P30">In thermodynamics, the second law states that in any natural process, the total entropy of a system and its surroundings always increases or stays the same; it never decreases. That is why, for example, heat always flows from a warmer body to a colder body, not the other way around.</text:p>
      <text:h text:style-name="Heading_20_1" text:outline-level="1"><text:bookmark-start text:name="__RefHeading___Toc2068_679008467"/><text:span text:style-name="T2">Measuring </text:span>Efficiency<text:bookmark-end text:name="__RefHeading___Toc2068_679008467"/></text:h>
      <text:p text:style-name="P31">In thermodynamics, <text:span text:style-name="T3">efficiency</text:span><text:span text:style-name="T6"> is a measure of how well a system (like an engine or power plant) converts input energy into useful output work. It is determined using the formula:</text:span></text:p>
      <text:p text:style-name="P32"><draw:frame draw:style-name="fr1" draw:name="Object28" text:anchor-type="as-char" svg:y="-0.3228in" svg:width="1.8339in" svg:height="0.5945in" draw:z-index="25"><draw:object xlink:href="./Object 28" xlink:type="simple" xlink:show="embed" xlink:actuate="onLoad"/><draw:image xlink:href="./ObjectReplacements/Object 28" xlink:type="simple" xlink:show="embed" xlink:actuate="onLoad"/></draw:frame>.</text:p>
      <text:h text:style-name="Heading_20_1" text:outline-level="1"><text:bookmark-start text:name="__RefHeading___Toc2070_679008467"/><text:soft-page-break/>Examples &amp; Applications<text:bookmark-end text:name="__RefHeading___Toc2070_679008467"/></text:h>
      <text:list text:style-name="L4">
        <text:list-item>
          <text:p text:style-name="P33">If <draw:frame draw:style-name="fr1" draw:name="Object13" text:anchor-type="as-char" svg:y="-0.1492in" svg:width="0.4008in" svg:height="0.1854in" draw:z-index="12"><draw:object xlink:href="./Object 13" xlink:type="simple" xlink:show="embed" xlink:actuate="onLoad"/><draw:image xlink:href="./ObjectReplacements/Object 13" xlink:type="simple" xlink:show="embed" xlink:actuate="onLoad"/></draw:frame><text:s/>of water is heated from <draw:frame draw:style-name="fr1" draw:name="Object14" text:anchor-type="as-char" svg:y="-0.1492in" svg:width="0.5154in" svg:height="0.1854in" draw:z-index="13"><draw:object xlink:href="./Object 14" xlink:type="simple" xlink:show="embed" xlink:actuate="onLoad"/><draw:image xlink:href="./ObjectReplacements/Object 14" xlink:type="simple" xlink:show="embed" xlink:actuate="onLoad"/></draw:frame><text:s/>to <draw:frame draw:style-name="fr1" draw:name="Object15" text:anchor-type="as-char" svg:y="-0.1492in" svg:width="0.5138in" svg:height="0.1854in" draw:z-index="14"><draw:object xlink:href="./Object 15" xlink:type="simple" xlink:show="embed" xlink:actuate="onLoad"/><draw:image xlink:href="./ObjectReplacements/Object 15" xlink:type="simple" xlink:show="embed" xlink:actuate="onLoad"/></draw:frame>, how much heat is absorbed? <text:span text:style-name="T30">(The specific heat capacity of water is </text:span><text:span text:style-name="T30"><draw:frame draw:style-name="fr1" draw:name="Object26" text:anchor-type="as-char" svg:y="-0.1492in" svg:width="0.9457in" svg:height="0.1854in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30">.)</text:span></text:p>
          <text:p text:style-name="P34"><draw:frame draw:style-name="fr1" draw:name="Object16" text:anchor-type="as-char" svg:y="-0.3228in" svg:width="3.3508in" svg:height="0.5874in" draw:z-index="15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35">How much energy is needed to raise the temperature of <draw:frame draw:style-name="fr1" draw:name="Object23" text:anchor-type="as-char" svg:y="-0.1492in" svg:width="0.3992in" svg:height="0.1854in" draw:z-index="22"><draw:object xlink:href="./Object 23" xlink:type="simple" xlink:show="embed" xlink:actuate="onLoad"/><draw:image xlink:href="./ObjectReplacements/Object 23" xlink:type="simple" xlink:show="embed" xlink:actuate="onLoad"/></draw:frame><text:s/>of aluminum by <draw:frame draw:style-name="fr1" draw:name="Object24" text:anchor-type="as-char" svg:y="-0.1492in" svg:width="0.5138in" svg:height="0.1854in" draw:z-index="23"><draw:object xlink:href="./Object 24" xlink:type="simple" xlink:show="embed" xlink:actuate="onLoad"/><draw:image xlink:href="./ObjectReplacements/Object 24" xlink:type="simple" xlink:show="embed" xlink:actuate="onLoad"/></draw:frame>?<text:span text:style-name="T31"> (The specific heat capacity of aluminum is </text:span><text:span text:style-name="T31"><draw:frame draw:style-name="fr1" draw:name="Object27" text:anchor-type="as-char" svg:y="-0.1492in" svg:width="0.8563in" svg:height="0.1854in" draw:z-index="27"><draw:object xlink:href="./Object 27" xlink:type="simple" xlink:show="embed" xlink:actuate="onLoad"/><draw:image xlink:href="./ObjectReplacements/Object 27" xlink:type="simple" xlink:show="embed" xlink:actuate="onLoad"/></draw:frame></text:span><text:span text:style-name="T31">.)</text:span></text:p>
          <text:p text:style-name="P36"><draw:frame draw:style-name="fr1" draw:name="Object25" text:anchor-type="as-char" svg:y="-0.3228in" svg:width="2.6437in" svg:height="0.5874in" draw:z-index="24"><draw:object xlink:href="./Object 25" xlink:type="simple" xlink:show="embed" xlink:actuate="onLoad"/><draw:image xlink:href="./ObjectReplacements/Object 25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weight="normal" officeooo:rsid="0019de40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4:19:31.735984213</meta:creation-date>
    <dc:date>2026-06-19T23:09:53.482104678</dc:date>
    <meta:editing-duration>PT5H15M29S</meta:editing-duration>
    <meta:editing-cycles>86</meta:editing-cycles>
    <meta:generator>LibreOffice/25.8.5.2$Linux_X86_64 LibreOffice_project/580$Build-2</meta:generator>
    <meta:document-statistic meta:table-count="1" meta:image-count="0" meta:object-count="28" meta:page-count="5" meta:paragraph-count="88" meta:word-count="934" meta:character-count="5949" meta:non-whitespace-character-count="5104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 mathvariant="italic">mc</mi>
      </mrow>
      <mi mathvariant="normal">Δ</mi>
      <mi>T</mi>
    </mrow>
    <annotation encoding="StarMath 5.0">Q = mc %DELTA T</annotation>
  </semantics>
</math>
</file>

<file path=Object 10/content.xml><?xml version="1.0" encoding="utf-8"?>
<math xmlns="http://www.w3.org/1998/Math/MathML" display="block">
  <semantics>
    <mrow>
      <mtext>J</mtext>
      <mo stretchy="false">/</mo>
      <mtext>kg</mtext>
      <mo stretchy="false">⋅</mo>
      <mtext>K</mtext>
    </mrow>
    <annotation encoding="StarMath 5.0">"J" / "kg" cdot "K"</annotation>
  </semantics>
</math>
</file>

<file path=Object 11/content.xml><?xml version="1.0" encoding="utf-8"?>
<math xmlns="http://www.w3.org/1998/Math/MathML" display="block">
  <semantics>
    <mrow>
      <mrow>
        <mi>Q</mi>
        <mo stretchy="false">=</mo>
        <mi mathvariant="italic">mc</mi>
      </mrow>
      <mi mathvariant="normal">Δ</mi>
      <mi>T</mi>
    </mrow>
    <annotation encoding="StarMath 5.0">Q = mc %DELTA T</annotation>
  </semantics>
</math>
</file>

<file path=Object 12/content.xml><?xml version="1.0" encoding="utf-8"?>
<math xmlns="http://www.w3.org/1998/Math/MathML" display="block">
  <semantics>
    <mi>Q</mi>
    <annotation encoding="StarMath 5.0">Q</annotation>
  </semantics>
</math>
</file>

<file path=Object 13/content.xml><?xml version="1.0" encoding="utf-8"?>
<math xmlns="http://www.w3.org/1998/Math/MathML" display="block">
  <semantics>
    <mrow>
      <mn>250.</mn>
      <mtext>g</mtext>
    </mrow>
    <annotation encoding="StarMath 5.0">250. "g"</annotation>
  </semantics>
</math>
</file>

<file path=Object 14/content.xml><?xml version="1.0" encoding="utf-8"?>
<math xmlns="http://www.w3.org/1998/Math/MathML" display="block">
  <semantics>
    <mrow>
      <mn>20.0</mn>
      <mi>°</mi>
      <mtext>C</mtext>
    </mrow>
    <annotation encoding="StarMath 5.0">20.0 °"C"</annotation>
  </semantics>
</math>
</file>

<file path=Object 15/content.xml><?xml version="1.0" encoding="utf-8"?>
<math xmlns="http://www.w3.org/1998/Math/MathML" display="block">
  <semantics>
    <mrow>
      <mn>50.0</mn>
      <mi>°</mi>
      <mtext>C</mtext>
    </mrow>
    <annotation encoding="StarMath 5.0">50.0 °"C"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i mathvariant="italic">mc</mi>
            </mrow>
            <mi mathvariant="normal">Δ</mi>
            <mi>T</mi>
          </mrow>
        </mtd>
      </mtr>
      <mtr>
        <mtd>
          <mrow>
            <mrow>
              <mi>Q</mi>
              <mo stretchy="false">=</mo>
              <mrow>
                <mo fence="true" form="prefix" stretchy="false">(</mo>
                <mrow>
                  <mrow>
                    <mn>0.250</mn>
                    <mtext>kg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4184</mn>
                  <mrow>
                    <mtext>J</mtext>
                    <mo stretchy="false">/</mo>
                    <mtext>kg</mtext>
                    <mo stretchy="false">⋅</mo>
                    <mi>°</mi>
                  </mrow>
                  <mtext>C</mtext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50.0</mn>
                  <mi>°</mi>
                  <mrow>
                    <mtext>C</mtext>
                    <mo stretchy="false">−</mo>
                    <mn>20.0</mn>
                  </mrow>
                  <mi>°</mi>
                  <mtext>C</mtext>
                </mrow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≈</mo>
              <mn>31400</mn>
            </mrow>
            <mtext>J</mtext>
          </mrow>
        </mtd>
      </mtr>
    </mtable>
    <annotation encoding="StarMath 5.0">Q = mc %DELTA T newline
Q = ( 0.250 "kg" ) ( 4184 "J" / "kg" cdot °"C" ) ( 50.0 °"C" - 20.0 °"C" ) newline
Q approx 31400 "J"</annotation>
  </semantics>
</math>
</file>

<file path=Object 17/content.xml><?xml version="1.0" encoding="utf-8"?>
<math xmlns="http://www.w3.org/1998/Math/MathML" display="block">
  <semantics>
    <mtext>J</mtext>
    <annotation encoding="StarMath 5.0">"J"</annotation>
  </semantics>
</math>
</file>

<file path=Object 18/content.xml><?xml version="1.0" encoding="utf-8"?>
<math xmlns="http://www.w3.org/1998/Math/MathML" display="block">
  <semantics>
    <mi>m</mi>
    <annotation encoding="StarMath 5.0">m</annotation>
  </semantics>
</math>
</file>

<file path=Object 19/content.xml><?xml version="1.0" encoding="utf-8"?>
<math xmlns="http://www.w3.org/1998/Math/MathML" display="block">
  <semantics>
    <mtext>g</mtext>
    <annotation encoding="StarMath 5.0">"g"</annotation>
  </semantics>
</math>
</file>

<file path=Object 2/content.xml><?xml version="1.0" encoding="utf-8"?>
<math xmlns="http://www.w3.org/1998/Math/MathML" display="block">
  <semantics>
    <mtext>J</mtext>
    <annotation encoding="StarMath 5.0">"J"</annotation>
  </semantics>
</math>
</file>

<file path=Object 20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21/content.xml><?xml version="1.0" encoding="utf-8"?>
<math xmlns="http://www.w3.org/1998/Math/MathML" display="block">
  <semantics>
    <mrow>
      <mi>°</mi>
      <mtext>C</mtext>
    </mrow>
    <annotation encoding="StarMath 5.0">°"C"</annotation>
  </semantics>
</math>
</file>

<file path=Object 22/content.xml><?xml version="1.0" encoding="utf-8"?>
<math xmlns="http://www.w3.org/1998/Math/MathML" display="block">
  <semantics>
    <mtext>K</mtext>
    <annotation encoding="StarMath 5.0">"K"</annotation>
  </semantics>
</math>
</file>

<file path=Object 23/content.xml><?xml version="1.0" encoding="utf-8"?>
<math xmlns="http://www.w3.org/1998/Math/MathML" display="block">
  <semantics>
    <mrow>
      <mn>100.</mn>
      <mtext>g</mtext>
    </mrow>
    <annotation encoding="StarMath 5.0">100. "g"</annotation>
  </semantics>
</math>
</file>

<file path=Object 24/content.xml><?xml version="1.0" encoding="utf-8"?>
<math xmlns="http://www.w3.org/1998/Math/MathML" display="block">
  <semantics>
    <mrow>
      <mn>15.0</mn>
      <mi>°</mi>
      <mtext>C</mtext>
    </mrow>
    <annotation encoding="StarMath 5.0">15.0 °"C"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i mathvariant="italic">mc</mi>
            </mrow>
            <mi mathvariant="normal">Δ</mi>
            <mi>T</mi>
          </mrow>
        </mtd>
      </mtr>
      <mtr>
        <mtd>
          <mrow>
            <mrow>
              <mi>Q</mi>
              <mo stretchy="false">=</mo>
              <mrow>
                <mo fence="true" form="prefix" stretchy="false">(</mo>
                <mrow>
                  <mrow>
                    <mn>0.100</mn>
                    <mtext>kg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900.</mn>
                  <mrow>
                    <mtext>J</mtext>
                    <mo stretchy="false">/</mo>
                    <mtext>kg</mtext>
                    <mo stretchy="false">⋅</mo>
                    <mi>°</mi>
                  </mrow>
                  <mtext>C</mtext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5.0</mn>
                  <mi>°</mi>
                  <mtext>C</mtext>
                </mrow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n>1350</mn>
            </mrow>
            <mtext>J</mtext>
          </mrow>
        </mtd>
      </mtr>
    </mtable>
    <annotation encoding="StarMath 5.0">Q = mc %DELTA T newline
Q = ( 0.100 "kg" ) ( 900. "J" / "kg" cdot °"C" ) ( 15.0 °"C" ) newline
Q = 1350 "J"</annotation>
  </semantics>
</math>
</file>

<file path=Object 26/content.xml><?xml version="1.0" encoding="utf-8"?>
<math xmlns="http://www.w3.org/1998/Math/MathML" display="block">
  <semantics>
    <mrow>
      <mn>4184</mn>
      <mrow>
        <mtext>J</mtext>
        <mo stretchy="false">/</mo>
        <mtext>kg</mtext>
        <mo stretchy="false">⋅</mo>
        <mi>°</mi>
      </mrow>
      <mtext>C</mtext>
    </mrow>
    <annotation encoding="StarMath 5.0">4184 "J" / "kg" cdot °"C"</annotation>
  </semantics>
</math>
</file>

<file path=Object 27/content.xml><?xml version="1.0" encoding="utf-8"?>
<math xmlns="http://www.w3.org/1998/Math/MathML" display="block">
  <semantics>
    <mrow>
      <mn>900</mn>
      <mrow>
        <mtext>J</mtext>
        <mo stretchy="false">/</mo>
        <mtext>kg</mtext>
        <mo stretchy="false">⋅</mo>
        <mi>°</mi>
      </mrow>
      <mtext>C</mtext>
    </mrow>
    <annotation encoding="StarMath 5.0">900 "J" / "kg" cdot °"C"</annotation>
  </semantics>
</math>
</file>

<file path=Object 28/content.xml><?xml version="1.0" encoding="utf-8"?>
<math xmlns="http://www.w3.org/1998/Math/MathML" display="block">
  <semantics>
    <mrow>
      <mtext>%</mtext>
      <mrow>
        <mtext>efficiency</mtext>
        <mo stretchy="false">=</mo>
        <mrow>
          <mfrac>
            <mtext>output</mtext>
            <mtext>input</mtext>
          </mfrac>
          <mo stretchy="false">×</mo>
          <mn>100</mn>
        </mrow>
      </mrow>
    </mrow>
    <annotation encoding="StarMath 5.0">% "efficiency" = { frac { alignc "output" } { alignc "input" } } times 100 newline</annotation>
  </semantics>
</math>
</file>

<file path=Object 3/content.xml><?xml version="1.0" encoding="utf-8"?>
<math xmlns="http://www.w3.org/1998/Math/MathML" display="block">
  <semantics>
    <mrow>
      <mi>°</mi>
      <mtext>C</mtext>
    </mrow>
    <annotation encoding="StarMath 5.0">°"C"</annotation>
  </semantics>
</math>
</file>

<file path=Object 4/content.xml><?xml version="1.0" encoding="utf-8"?>
<math xmlns="http://www.w3.org/1998/Math/MathML" display="block">
  <semantics>
    <mrow>
      <mi>°</mi>
      <mtext>F</mtext>
    </mrow>
    <annotation encoding="StarMath 5.0">°"F"</annotation>
  </semantics>
</math>
</file>

<file path=Object 5/content.xml><?xml version="1.0" encoding="utf-8"?>
<math xmlns="http://www.w3.org/1998/Math/MathML" display="block">
  <semantics>
    <mtext>K</mtext>
    <annotation encoding="StarMath 5.0">"K"</annotation>
  </semantics>
</math>
</file>

<file path=Object 6/content.xml><?xml version="1.0" encoding="utf-8"?>
<math xmlns="http://www.w3.org/1998/Math/MathML" display="block">
  <semantics>
    <mrow>
      <mn>1</mn>
      <mtext>kg</mtext>
    </mrow>
    <annotation encoding="StarMath 5.0">1 "kg"</annotation>
  </semantics>
</math>
</file>

<file path=Object 7/content.xml><?xml version="1.0" encoding="utf-8"?>
<math xmlns="http://www.w3.org/1998/Math/MathML" display="block">
  <semantics>
    <mrow>
      <mn>1</mn>
      <mi>°</mi>
      <mtext>C</mtext>
    </mrow>
    <annotation encoding="StarMath 5.0">1 °"C"</annotation>
  </semantics>
</math>
</file>

<file path=Object 8/content.xml><?xml version="1.0" encoding="utf-8"?>
<math xmlns="http://www.w3.org/1998/Math/MathML" display="block">
  <semantics>
    <mrow>
      <mn>1</mn>
      <mtext>K</mtext>
    </mrow>
    <annotation encoding="StarMath 5.0">1 "K"</annotation>
  </semantics>
</math>
</file>

<file path=Object 9/content.xml><?xml version="1.0" encoding="utf-8"?>
<math xmlns="http://www.w3.org/1998/Math/MathML" display="block">
  <semantics>
    <mrow>
      <mrow>
        <mtext>J</mtext>
        <mo stretchy="false">/</mo>
        <mtext>kg</mtext>
        <mo stretchy="false">⋅</mo>
        <mi>°</mi>
      </mrow>
      <mtext>C</mtext>
    </mrow>
    <annotation encoding="StarMath 5.0">"J" / "kg" cdot °"C"</annotation>
  </semantics>
</math>
</file>
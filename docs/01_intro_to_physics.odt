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text-align="center" style:justify-single-word="false"/>
      <style:text-properties fo:font-style="normal" officeooo:rsid="00179fee" officeooo:paragraph-rsid="00179fee" style:font-style-asian="normal" style:font-style-complex="normal"/>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Text_20_body">
      <style:paragraph-properties fo:text-align="start" style:justify-single-word="false"/>
      <style:text-properties officeooo:paragraph-rsid="00179fee"/>
    </style:style>
    <style:style style:name="P5" style:family="paragraph" style:parent-style-name="Heading_20_1">
      <style:paragraph-properties fo:break-before="page"/>
    </style:style>
    <style:style style:name="P6" style:family="paragraph" style:parent-style-name="Text_20_body">
      <style:paragraph-properties fo:text-align="start" style:justify-single-word="false"/>
      <style:text-properties fo:font-weight="bold" officeooo:rsid="00179fee" officeooo:paragraph-rsid="00179fee" style:font-weight-asian="bold" style:font-weight-complex="bold"/>
    </style:style>
    <style:style style:name="P7" style:family="paragraph" style:parent-style-name="Heading_20_1">
      <style:text-properties officeooo:rsid="00224acd" officeooo:paragraph-rsid="00224acd"/>
    </style:style>
    <style:style style:name="P8" style:family="paragraph" style:parent-style-name="Text_20_body">
      <style:paragraph-properties fo:text-align="start" style:justify-single-word="false"/>
      <style:text-properties officeooo:rsid="002274fd" officeooo:paragraph-rsid="002274fd"/>
    </style:style>
    <style:style style:name="P9" style:family="paragraph" style:parent-style-name="Text_20_body">
      <style:paragraph-properties fo:text-align="start" style:justify-single-word="false"/>
      <style:text-properties officeooo:rsid="00179fee" officeooo:paragraph-rsid="00179fee"/>
    </style:style>
    <style:style style:name="P10" style:family="paragraph" style:parent-style-name="Heading_20_1">
      <style:text-properties officeooo:rsid="0025a841" officeooo:paragraph-rsid="0025a841"/>
    </style:style>
    <style:style style:name="P11" style:family="paragraph" style:parent-style-name="Text_20_body">
      <style:paragraph-properties fo:text-align="start" style:justify-single-word="false"/>
      <style:text-properties officeooo:rsid="0025a841" officeooo:paragraph-rsid="0025a841"/>
    </style:style>
    <style:style style:name="P12" style:family="paragraph" style:parent-style-name="Heading_20_2">
      <style:text-properties officeooo:rsid="0025a841" officeooo:paragraph-rsid="0025a841"/>
    </style:style>
    <style:style style:name="P13" style:family="paragraph" style:parent-style-name="Text_20_body">
      <style:text-properties officeooo:rsid="0025a841" officeooo:paragraph-rsid="0025a841"/>
    </style:style>
    <style:style style:name="P14" style:family="paragraph" style:parent-style-name="Quotations">
      <style:text-properties officeooo:rsid="0025a841" officeooo:paragraph-rsid="0025a841"/>
    </style:style>
    <style:style style:name="P15" style:family="paragraph" style:parent-style-name="Quotations">
      <style:paragraph-properties fo:margin-left="0in" fo:text-align="start" style:justify-single-word="false" fo:text-indent="0in" style:auto-text-indent="false"/>
      <style:text-properties officeooo:rsid="0025a841" officeooo:paragraph-rsid="0025a841"/>
    </style:style>
    <style:style style:name="P16" style:family="paragraph" style:parent-style-name="Text_20_body" style:list-style-name="L1">
      <style:text-properties fo:font-weight="normal" officeooo:rsid="0025a841" officeooo:paragraph-rsid="0025a841" style:font-weight-asian="normal" style:font-weight-complex="normal"/>
    </style:style>
    <style:style style:name="P17" style:family="paragraph" style:parent-style-name="Text_20_body">
      <style:text-properties fo:font-weight="normal" officeooo:rsid="0025a841" officeooo:paragraph-rsid="0025a841" style:font-weight-asian="normal" style:font-weight-complex="normal"/>
    </style:style>
    <style:style style:name="P18" style:family="paragraph" style:parent-style-name="Heading_20_2">
      <style:text-properties officeooo:rsid="002775b1" officeooo:paragraph-rsid="002775b1"/>
    </style:style>
    <style:style style:name="P19" style:family="paragraph" style:parent-style-name="Text_20_body">
      <style:text-properties officeooo:rsid="002775b1" officeooo:paragraph-rsid="002775b1"/>
    </style:style>
    <style:style style:name="P20" style:family="paragraph" style:parent-style-name="Quotations">
      <style:text-properties officeooo:rsid="002775b1" officeooo:paragraph-rsid="002775b1"/>
    </style:style>
    <style:style style:name="P21" style:family="paragraph" style:parent-style-name="Heading_20_1">
      <style:text-properties officeooo:rsid="00290d8d" officeooo:paragraph-rsid="00290d8d"/>
    </style:style>
    <style:style style:name="P22" style:family="paragraph" style:parent-style-name="Text_20_body" style:list-style-name="L2">
      <style:text-properties officeooo:rsid="00290d8d" officeooo:paragraph-rsid="00290d8d"/>
    </style:style>
    <style:style style:name="P23" style:family="paragraph" style:parent-style-name="Text_20_body" style:list-style-name="L2">
      <style:paragraph-properties fo:text-align="center" style:justify-single-word="false"/>
      <style:text-properties officeooo:rsid="00290d8d" officeooo:paragraph-rsid="00290d8d"/>
    </style:style>
    <style:style style:name="P24" style:family="paragraph" style:parent-style-name="Text_20_body" style:list-style-name="L2">
      <style:paragraph-properties fo:text-align="start" style:justify-single-word="false"/>
      <style:text-properties officeooo:rsid="00290d8d" officeooo:paragraph-rsid="00290d8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officeooo:rsid="00242c0f" style:font-weight-asian="normal" style:font-weight-complex="normal"/>
    </style:style>
    <style:style style:name="T4" style:family="text">
      <style:text-properties fo:font-weight="bold" officeooo:rsid="00242c0f"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DdeLink__226_2881674447"/>Introduction to Physics</text:p>
      <text:p text:style-name="P1">September 9,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59_679008467" office:name="What is Science?" text:style-name="Index_20_Link" text:visited-style-name="Index_20_Link">What is Science?<text:tab/>2</text:a></text:p>
          <text:p text:style-name="P3"><text:a xlink:type="simple" xlink:href="#__RefHeading___Toc361_679008467" office:name="What is Physics?" text:style-name="Index_20_Link" text:visited-style-name="Index_20_Link">What is Physics?<text:tab/>2</text:a></text:p>
          <text:p text:style-name="P2"><text:a xlink:type="simple" xlink:href="#__RefHeading___Toc185_2270438998" office:name="Experiments" text:style-name="Index_20_Link" text:visited-style-name="Index_20_Link">Experiments<text:tab/>2</text:a></text:p>
          <text:p text:style-name="P3"><text:a xlink:type="simple" xlink:href="#__RefHeading___Toc363_679008467" office:name="A Good Experiment" text:style-name="Index_20_Link" text:visited-style-name="Index_20_Link">A Good Experiment<text:tab/>2</text:a></text:p>
          <text:p text:style-name="P3"><text:a xlink:type="simple" xlink:href="#__RefHeading___Toc365_679008467" office:name="A Good Explanation" text:style-name="Index_20_Link" text:visited-style-name="Index_20_Link">A Good Explanation<text:tab/>2</text:a></text:p>
          <text:p text:style-name="P2"><text:a xlink:type="simple" xlink:href="#__RefHeading___Toc187_2270438998" office:name="Writing a Scientific Analysis" text:style-name="Index_20_Link" text:visited-style-name="Index_20_Link">Writing a Scientific Analysis<text:tab/>2</text:a></text:p>
          <text:p text:style-name="P3"><text:a xlink:type="simple" xlink:href="#__RefHeading___Toc189_2270438998" office:name="The Claim" text:style-name="Index_20_Link" text:visited-style-name="Index_20_Link">The Claim<text:tab/>2</text:a></text:p>
          <text:p text:style-name="P3"><text:a xlink:type="simple" xlink:href="#__RefHeading___Toc191_2270438998" office:name="The Evidence" text:style-name="Index_20_Link" text:visited-style-name="Index_20_Link">The Evidence<text:tab/>3</text:a></text:p>
          <text:p text:style-name="P3"><text:a xlink:type="simple" xlink:href="#__RefHeading___Toc193_2270438998" office:name="The Reasoning" text:style-name="Index_20_Link" text:visited-style-name="Index_20_Link">The Reasoning<text:tab/>3</text:a></text:p>
          <text:p text:style-name="P2"><text:a xlink:type="simple" xlink:href="#__RefHeading___Toc195_2270438998" office:name="Examples and Applications" text:style-name="Index_20_Link" text:visited-style-name="Index_20_Link">Examples and Applications<text:tab/>3</text:a></text:p>
        </text:index-body>
      </text:table-of-content>
      <text:p text:style-name="P4"/>
      <text:h text:style-name="P5" text:outline-level="1"><text:bookmark-start text:name="__RefHeading___Toc359_679008467"/>What is Science?<text:bookmark-end text:name="__RefHeading___Toc359_679008467"/></text:h>
      <text:p text:style-name="P6">Science<text:span text:style-name="T1"> is a systematic endeavor to build knowledge about the behavior of the physical and natural world using observation and experiment.</text:span></text:p>
      <text:h text:style-name="Heading_20_2" text:outline-level="2"><text:bookmark-start text:name="__RefHeading___Toc361_679008467"/>What is Physics?<text:bookmark-end text:name="__RefHeading___Toc361_679008467"/></text:h>
      <text:p text:style-name="P4"><text:span text:style-name="T2">Physics</text:span> is a branch of science that studies matter, motion, energy, and the fundamental laws governing the interactions of the universe, expressed with mathematical precision and explored through experiment and theory.<text:bookmark-end text:name="__DdeLink__226_2881674447"/></text:p>
      <text:h text:style-name="P7" text:outline-level="1"><text:bookmark-start text:name="__RefHeading___Toc185_2270438998"/>Experiments<text:bookmark-end text:name="__RefHeading___Toc185_2270438998"/></text:h>
      <text:p text:style-name="P8">An <text:span text:style-name="T2">experiment</text:span><text:span text:style-name="T1"> is a procedure carried out to support or refute a </text:span><text:span text:style-name="T2">hypothesis</text:span><text:span text:style-name="T1">. </text:span><text:span text:style-name="T3">It can also be used to test existing</text:span><text:span text:style-name="T4"> theories</text:span><text:span text:style-name="T3"> to support or disprove them.</text:span><text:span text:style-name="T2"> </text:span></text:p>
      <text:h text:style-name="Heading_20_2" text:outline-level="2"><text:bookmark-start text:name="__RefHeading___Toc363_679008467"/>A Good Experiment<text:bookmark-end text:name="__RefHeading___Toc363_679008467"/></text:h>
      <text:p text:style-name="P9">A <text:span text:style-name="T2">good experiment</text:span> should be rooted in a variety of data based on <text:span text:style-name="T2">existing knowledge</text:span>. It should be <text:span text:style-name="T2">reproducible</text:span> under the same conditions so that the theory or hypothesis can be tested multiple times in different instances.</text:p>
      <text:h text:style-name="Heading_20_2" text:outline-level="2"><text:bookmark-start text:name="__RefHeading___Toc365_679008467"/>A Good Explanation<text:bookmark-end text:name="__RefHeading___Toc365_679008467"/></text:h>
      <text:p text:style-name="P4">A <text:span text:style-name="T2">good explanation</text:span> should be thorough in nature and address all <text:span text:style-name="T2">reasonable counterclaims</text:span> and <text:span text:style-name="T2">conflicting arguments</text:span>. The explanation should <text:span text:style-name="T2">reference the data</text:span> to construct the analysis and verify the claim.</text:p>
      <text:h text:style-name="P10" text:outline-level="1"><text:bookmark-start text:name="__RefHeading___Toc187_2270438998"/>Writing a Scientific Analysis<text:bookmark-end text:name="__RefHeading___Toc187_2270438998"/></text:h>
      <text:p text:style-name="P11">The main way to write a scientific analysis, especially to prove or disprove a claim, is by using the <text:span text:style-name="T2">CER</text:span><text:span text:style-name="T1"> (Claim, Evidence, Reasoning) framework.</text:span></text:p>
      <text:h text:style-name="P12" text:outline-level="2"><text:bookmark-start text:name="__RefHeading___Toc189_2270438998"/>The Claim<text:bookmark-end text:name="__RefHeading___Toc189_2270438998"/></text:h>
      <text:p text:style-name="P13">The <text:span text:style-name="T2">claim</text:span><text:span text:style-name="T1"> is the argument, position, or central idea of the analysis. To write a good claim, you must identify the question and briefly explain your stance in a one-sentence response. For example, if you were asked, “Why does a balloon stick to a wall after being rubbed on hair?” you could say:</text:span></text:p>
      <text:p text:style-name="P14">A balloon sticks to a wall because it becomes electrically charged after being rubbed on hair.</text:p>
      <text:p text:style-name="P15">Be sure to keep your claim concise and straightforward. Your evidence and reasoning come later.</text:p>
      <text:h text:style-name="P12" text:outline-level="2"><text:bookmark-start text:name="__RefHeading___Toc191_2270438998"/><text:soft-page-break/>The Evidence<text:bookmark-end text:name="__RefHeading___Toc191_2270438998"/></text:h>
      <text:p text:style-name="P13">The <text:span text:style-name="T2">evidence</text:span><text:span text:style-name="T1"> can consist of observations, measurements, calculation, and information gained from experiments. It should be relevant and support the claim. It is usually between two and three sentences long after the claim. Some types of evidence you could use are:</text:span></text:p>
      <text:list text:style-name="L1">
        <text:list-item>
          <text:p text:style-name="P16">Quotations from a research paper or a reliable article</text:p>
        </text:list-item>
        <text:list-item>
          <text:p text:style-name="P16">Precise data or measurements from an experiment</text:p>
        </text:list-item>
        <text:list-item>
          <text:p text:style-name="P16">Observations of natural processes</text:p>
        </text:list-item>
      </text:list>
      <text:p text:style-name="P17">To expand on the previous claim answering the question, “Why does a balloon stick to a wall after being rubbed on hair?” you could add:</text:p>
      <text:p text:style-name="P14">When the balloon is rubbed on hair, electrons move from the hair to the balloon, giving the balloon a negative charge. The wall remains neutral because it did not interact with anything, so the negatively charged balloon attracts the positively charged particles in the wall, causing the balloon to stick.</text:p>
      <text:h text:style-name="P18" text:outline-level="2"><text:bookmark-start text:name="__RefHeading___Toc193_2270438998"/>The Reasoning<text:bookmark-end text:name="__RefHeading___Toc193_2270438998"/></text:h>
      <text:p text:style-name="P19">To construct a good <text:span text:style-name="T2">line of reasoning</text:span><text:span text:style-name="T1">, consider how your evidence supports your claim. Think about how it connects to your claim and how it proves your argument. For instance:</text:span></text:p>
      <text:p text:style-name="P20">Opposite charges attract according to the principles of electrostatics. The transfer of electrons creates an imbalance of charge on the balloon and induces an opposite charge on the wall’s surface, producing an electrostatic force that holds the balloon in place.</text:p>
      <text:h text:style-name="P21" text:outline-level="1"><text:bookmark-start text:name="__RefHeading___Toc195_2270438998"/>Examples and Applications<text:bookmark-end text:name="__RefHeading___Toc195_2270438998"/></text:h>
      <text:list text:style-name="L2">
        <text:list-item>
          <text:p text:style-name="P22">Why do animals migrate during certain times of the year? Support your claim with evidence and reasoning.</text:p>
          <text:p text:style-name="P23">Animals migrate during certain times of the year to find food and survive. For example, birds fly south in the winter when it is too cold and there is less food. Many fish swim to warmer winters during certain seasons to lay eggs and find food. Animals move to places where conditions are better for living. When food is scarce or the weather is harsh, migrating helps them stay alive and reproduce successfully.</text:p>
        </text:list-item>
        <text:list-item>
          <text:p text:style-name="P24">Why do rivers flow downhill? Support your claim with evidence and reasoning.</text:p>
          <text:p text:style-name="P23">Rivers flow downhill because Earth’s gravity pulls objects and molecules downward toward its center. According to Isaac Newton’s principles of force and gravity, gravity acts as a force and can thus cause an acceleration on objects within its influence. For example, when an apple detatches from a tree, it naturally falls to the ground. The same logic applies for rivers and bodies of water near the surface of Earth. Earth’s gravity exerts a force on rivers, thus causing it to accelerate downward toward Earth’s surfac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5T21:10:44.520773600</meta:creation-date>
    <dc:date>2026-06-19T18:47:59.622048039</dc:date>
    <meta:editing-duration>PT10M6S</meta:editing-duration>
    <meta:editing-cycles>13</meta:editing-cycles>
    <meta:generator>LibreOffice/25.8.5.2$Linux_X86_64 LibreOffice_project/580$Build-2</meta:generator>
    <meta:document-statistic meta:table-count="0" meta:image-count="0" meta:object-count="0" meta:page-count="3" meta:paragraph-count="44" meta:word-count="723" meta:character-count="4368" meta:non-whitespace-character-count="3693"/>
  </office:meta>
</office:document-meta>
</file>
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8000002F11DE308B9.png" manifest:media-type="image/png"/>
  <manifest:file-entry manifest:full-path="Pictures/100000010000011B0000004740BF7528.png" manifest:media-type="image/png"/>
  <manifest:file-entry manifest:full-path="Pictures/1000000100000A00000007805D028DE9.png" manifest:media-type="image/png"/>
  <manifest:file-entry manifest:full-path="Pictures/10000000000001EF00000148956026A2.png" manifest:media-type="image/png"/>
  <manifest:file-entry manifest:full-path="Pictures/10000001000001150000006D0F08D328.png" manifest:media-type="image/png"/>
  <manifest:file-entry manifest:full-path="Pictures/1000000000000133000000C79CC670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officeooo:rsid="00518786" officeooo:paragraph-rsid="00518786"/>
    </style:style>
    <style:style style:name="P2" style:family="paragraph" style:parent-style-name="Text_20_body">
      <style:paragraph-properties fo:text-align="center" style:justify-single-word="false"/>
      <style:text-properties fo:font-style="normal" officeooo:rsid="0015d3fa" officeooo:paragraph-rsid="001f6534" style:font-style-asian="normal" style:font-style-complex="normal"/>
    </style:style>
    <style:style style:name="P3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5" style:family="paragraph" style:parent-style-name="Heading_20_1" style:list-style-name="">
      <style:text-properties officeooo:rsid="004c7a21" officeooo:paragraph-rsid="004c7a21"/>
    </style:style>
    <style:style style:name="P6" style:family="paragraph" style:parent-style-name="Heading_20_1">
      <style:paragraph-properties fo:break-before="page"/>
      <style:text-properties officeooo:rsid="00518786" officeooo:paragraph-rsid="00518786"/>
    </style:style>
    <style:style style:name="P7" style:family="paragraph" style:parent-style-name="Text_20_body">
      <style:paragraph-properties fo:text-align="start" style:justify-single-word="false"/>
      <style:text-properties officeooo:rsid="00518786" officeooo:paragraph-rsid="00518786"/>
    </style:style>
    <style:style style:name="P8" style:family="paragraph" style:parent-style-name="Text_20_body">
      <style:paragraph-properties fo:text-align="center" style:justify-single-word="false"/>
      <style:text-properties fo:font-weight="normal" officeooo:rsid="00518786" officeooo:paragraph-rsid="00518786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518786" officeooo:paragraph-rsid="00518786" style:font-weight-asian="normal" style:font-weight-complex="normal"/>
    </style:style>
    <style:style style:name="P10" style:family="paragraph" style:parent-style-name="Heading_20_1">
      <style:text-properties officeooo:rsid="00586de0" officeooo:paragraph-rsid="00586de0"/>
    </style:style>
    <style:style style:name="P11" style:family="paragraph" style:parent-style-name="Text_20_body">
      <style:text-properties officeooo:rsid="00586de0" officeooo:paragraph-rsid="00586de0"/>
    </style:style>
    <style:style style:name="P12" style:family="paragraph" style:parent-style-name="Heading_20_2">
      <style:text-properties officeooo:rsid="0063add9" officeooo:paragraph-rsid="0063add9"/>
    </style:style>
    <style:style style:name="P13" style:family="paragraph" style:parent-style-name="Text_20_body">
      <style:text-properties officeooo:rsid="00586de0" officeooo:paragraph-rsid="0063add9"/>
    </style:style>
    <style:style style:name="P14" style:family="paragraph" style:parent-style-name="Text_20_body">
      <style:paragraph-properties fo:text-align="center" style:justify-single-word="false"/>
      <style:text-properties fo:font-weight="normal" officeooo:rsid="0062c426" officeooo:paragraph-rsid="0063add9" style:font-weight-asian="normal" style:font-weight-complex="normal"/>
    </style:style>
    <style:style style:name="P15" style:family="paragraph" style:parent-style-name="Text_20_body">
      <style:text-properties fo:font-weight="normal" officeooo:rsid="005bac9f" officeooo:paragraph-rsid="0063add9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weight="normal" officeooo:rsid="005bac9f" officeooo:paragraph-rsid="0063add9" style:font-weight-asian="normal" style:font-weight-complex="normal"/>
    </style:style>
    <style:style style:name="P17" style:family="paragraph" style:parent-style-name="Heading_20_1">
      <style:text-properties officeooo:rsid="00652fe6" officeooo:paragraph-rsid="00652fe6"/>
    </style:style>
    <style:style style:name="P18" style:family="paragraph" style:parent-style-name="Text_20_body">
      <style:text-properties fo:font-weight="bold" officeooo:rsid="00652fe6" officeooo:paragraph-rsid="00652fe6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weight="normal" officeooo:rsid="006993bc" officeooo:paragraph-rsid="00652fe6" style:font-weight-asian="normal" style:font-weight-complex="normal"/>
    </style:style>
    <style:style style:name="P20" style:family="paragraph" style:parent-style-name="Text_20_body">
      <style:text-properties fo:font-weight="normal" officeooo:rsid="00652fe6" officeooo:paragraph-rsid="00652fe6" style:font-weight-asian="normal" style:font-weight-complex="normal"/>
    </style:style>
    <style:style style:name="T1" style:family="text">
      <style:text-properties officeooo:rsid="00332384"/>
    </style:style>
    <style:style style:name="T2" style:family="text">
      <style:text-properties officeooo:rsid="00518786"/>
    </style:style>
    <style:style style:name="T3" style:family="text">
      <style:text-properties officeooo:rsid="006dfdd0"/>
    </style:style>
    <style:style style:name="T4" style:family="text">
      <style:text-properties fo:font-weight="normal" officeooo:rsid="004b0759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6047f9"/>
    </style:style>
    <style:style style:name="T8" style:family="text">
      <style:text-properties officeooo:rsid="0053d6d4"/>
    </style:style>
    <style:style style:name="T9" style:family="text">
      <style:text-properties fo:font-weight="normal" officeooo:rsid="0059b99e" style:font-weight-asian="normal" style:font-weight-complex="normal"/>
    </style:style>
    <style:style style:name="T10" style:family="text">
      <style:text-properties fo:font-weight="normal" officeooo:rsid="005bac9f" style:font-weight-asian="normal" style:font-weight-complex="normal"/>
    </style:style>
    <style:style style:name="T11" style:family="text">
      <style:text-properties fo:font-weight="bold" officeooo:rsid="005bac9f" style:font-weight-asian="bold" style:font-weight-complex="bold"/>
    </style:style>
    <style:style style:name="T12" style:family="text">
      <style:text-properties fo:font-weight="normal" officeooo:rsid="0062c426" style:font-weight-asian="normal" style:font-weight-complex="normal"/>
    </style:style>
    <style:style style:name="T13" style:family="text">
      <style:text-properties officeooo:rsid="0062c426"/>
    </style:style>
    <style:style style:name="T14" style:family="text">
      <style:text-properties fo:font-weight="normal" officeooo:rsid="00685216" style:font-weight-asian="normal" style:font-weight-complex="normal"/>
    </style:style>
    <style:style style:name="T15" style:family="text">
      <style:text-properties fo:font-weight="normal" officeooo:rsid="006993bc" style:font-weight-asian="normal" style:font-weight-complex="normal"/>
    </style:style>
    <style:style style:name="T16" style:family="text">
      <style:text-properties officeooo:rsid="006993b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se and Interference<text:bookmark-start text:name="__DdeLink__138_391587487"/><text:bookmark-start text:name="__DdeLink__502_3041763869"/></text:p>
      <text:p text:style-name="P2"><text:span text:style-name="T1">April 1</text:span><text:span text:style-name="T2">5</text:span><text:span text:style-name="T1">, 2026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627_4069653955" office:name="­" text:style-name="Index_20_Link" text:visited-style-name="Index_20_Link">­<text:tab/>1</text:a></text:p>
          <text:p text:style-name="P3"><text:a xlink:type="simple" xlink:href="#__RefHeading___Toc2346_679008467" office:name="What Is Phase?" text:style-name="Index_20_Link" text:visited-style-name="Index_20_Link">What Is Phase?<text:tab/>2</text:a></text:p>
          <text:p text:style-name="P3"><text:a xlink:type="simple" xlink:href="#__RefHeading___Toc151_694870971" office:name="What Is Interference?" text:style-name="Index_20_Link" text:visited-style-name="Index_20_Link">What Is Interference?<text:tab/>3</text:a></text:p>
          <text:p text:style-name="P4"><text:a xlink:type="simple" xlink:href="#__RefHeading___Toc633_2870247131" office:name="Superposition" text:style-name="Index_20_Link" text:visited-style-name="Index_20_Link">Superposition<text:tab/>3</text:a></text:p>
          <text:p text:style-name="P4"><text:a xlink:type="simple" xlink:href="#__RefHeading___Toc635_2870247131" office:name="Constructive Interference" text:style-name="Index_20_Link" text:visited-style-name="Index_20_Link">Constructive Interference<text:tab/>3</text:a></text:p>
          <text:p text:style-name="P4"><text:a xlink:type="simple" xlink:href="#__RefHeading___Toc637_2870247131" office:name="Destructive Interference" text:style-name="Index_20_Link" text:visited-style-name="Index_20_Link">Destructive Interference<text:tab/>3</text:a></text:p>
          <text:p text:style-name="P3"><text:a xlink:type="simple" xlink:href="#__RefHeading___Toc639_2870247131" office:name="Standing Waves" text:style-name="Index_20_Link" text:visited-style-name="Index_20_Link">Standing Waves<text:tab/>4</text:a></text:p>
        </text:index-body>
      </text:table-of-content>
      <text:h text:style-name="P5" text:outline-level="1"><text:bookmark-start text:name="__RefHeading___Toc627_4069653955"/>­<text:bookmark-end text:name="__RefHeading___Toc627_4069653955"/></text:h>
      <text:h text:style-name="P6" text:outline-level="1"><text:bookmark-start text:name="__RefHeading___Toc2346_679008467"/>What <text:span text:style-name="T3">I</text:span>s Phase?<text:bookmark-end text:name="__RefHeading___Toc2346_679008467"/></text:h>
      <text:p text:style-name="P7"><text:bookmark-end text:name="__DdeLink__502_3041763869"/><text:bookmark-end text:name="__DdeLink__138_391587487"/><text:span text:style-name="T4">W</text:span><text:span text:style-name="T5">hen two points are in </text:span><text:span text:style-name="T6">phase</text:span><text:span text:style-name="T5">, they are located on the same level of the wave. In other words, the number of cycles between the two points is a whole number. Phase refers to the relative position of a point on a wave with respect to another point on the same wave.</text:span></text:p>
      <text:p text:style-name="P8"><draw:frame draw:style-name="fr1" draw:name="Frame1" text:anchor-type="as-char" svg:width="4.7091in" style:rel-width="68%" svg:height="3.902in" style:rel-height="scale-min" draw:z-index="1"><draw:text-box><text:p text:style-name="Figure"><draw:frame draw:style-name="fr2" draw:name="Image1" text:anchor-type="paragraph" svg:width="4.7091in" style:rel-width="100%" svg:height="3.052in" style:rel-height="scale" draw:z-index="2"><draw:image xlink:href="Pictures/1000000000000133000000C79CC6704D.png" xlink:type="simple" xlink:show="embed" xlink:actuate="onLoad" draw:mime-type="image/png"/></draw:frame>Figure <text:sequence text:ref-name="refFigure0" text:name="Figure" text:formula="ooow:Figure+1" style:num-format="1">1</text:sequence>: The yellow wave and the blue wave are out of phase by 90 degrees because the point on the trough of the yellow wave is shifted 90 degrees (or one-fourth of a cycle/wavelength) away from the point on the principal axis of the blue wave.</text:p></draw:text-box></draw:frame></text:p>
      <text:p text:style-name="P9">The <text:span text:style-name="T7">following diagram</text:span> is an example of points that are in phase <text:span text:style-name="T8">and out of phase </text:span>on the same wave.</text:p>
      <text:p text:style-name="P8"><draw:frame draw:style-name="fr1" draw:name="Frame6" text:anchor-type="as-char" svg:width="3.5319in" style:rel-width="51%" svg:height="3.572in" style:rel-height="scale-min" draw:z-index="3"><draw:text-box><text:p text:style-name="Figure"><draw:frame draw:style-name="fr2" draw:name="Image2" text:anchor-type="paragraph" svg:width="3.5319in" style:rel-width="100%" svg:height="2.339in" style:rel-height="scale" draw:z-index="4"><draw:image xlink:href="Pictures/10000000000001EF00000148956026A2.png" xlink:type="simple" xlink:show="embed" xlink:actuate="onLoad" draw:mime-type="image/png"/></draw:frame>Figure <text:sequence text:ref-name="refFigure5" text:name="Figure" text:formula="ooow:Figure+1" style:num-format="1">2</text:sequence>: Points A, E, and I; B, F, and J; and C, G, and K are in phase with each other, respectively. On the other hand, points C and E are out of phase by 180 degrees (one-half of a wavelength), while points G and H are out of phase by 90 degrees (one-fourth of a wavelength).</text:p></draw:text-box></draw:frame></text:p>
      <text:h text:style-name="P10" text:outline-level="1"><text:bookmark-start text:name="__RefHeading___Toc151_694870971"/><text:soft-page-break/>What <text:span text:style-name="T3">I</text:span>s Interference?<text:bookmark-end text:name="__RefHeading___Toc151_694870971"/></text:h>
      <text:p text:style-name="P11">In waves, <text:span text:style-name="T6">interference</text:span><text:span text:style-name="T5"> refers to adding or subtracting the amplitude</text:span><text:span text:style-name="T9">s</text:span><text:span text:style-name="T5"> of two coherent waves.</text:span></text:p>
      <text:h text:style-name="P12" text:outline-level="2"><text:bookmark-start text:name="__RefHeading___Toc633_2870247131"/>Superposition<text:bookmark-end text:name="__RefHeading___Toc633_2870247131"/></text:h>
      <text:p text:style-name="P13"><text:span text:style-name="T6">Superposition</text:span><text:span text:style-name="T5"> occurs when two or more waves travel through a medium simultaneously. The </text:span><text:span text:style-name="T6">superposition principle</text:span><text:span text:style-name="T5"> states that the resultant displacement at any point is the sum of the individual waves. Interference is hence the effect of superposition; it can be either constructive or destructive.</text:span></text:p>
      <text:h text:style-name="P12" text:outline-level="2"><text:bookmark-start text:name="__RefHeading___Toc635_2870247131"/>Constructive Interference<text:bookmark-end text:name="__RefHeading___Toc635_2870247131"/></text:h>
      <text:p text:style-name="P13"><text:span text:style-name="T10">The diagram below represents </text:span><text:span text:style-name="T11">constructive interference</text:span><text:span text:style-name="T10">. </text:span><text:span text:style-name="T12">When two pulses undergo constructive interference, they add to produce a greater amplitude.</text:span></text:p>
      <text:p text:style-name="P14"><draw:frame draw:style-name="fr1" draw:name="Frame2" text:anchor-type="as-char" svg:width="3.7398in" style:rel-width="54%" svg:height="1.4047in" style:rel-height="scale-min" draw:z-index="5"><draw:text-box><text:p text:style-name="Figure"><draw:frame draw:style-name="fr2" draw:name="Image3" text:anchor-type="paragraph" svg:width="3.7398in" style:rel-width="100%" svg:height="0.9382in" style:rel-height="scale" draw:z-index="6"><draw:image xlink:href="Pictures/100000010000011B0000004740BF7528.png" xlink:type="simple" xlink:show="embed" xlink:actuate="onLoad" draw:mime-type="image/png"/></draw:frame>Figure <text:sequence text:ref-name="refFigure1" text:name="Figure" text:formula="ooow:Figure+1" style:num-format="1">3</text:sequence>: The amplitudes of the pulse combine and form a new, larger pulse.</text:p></draw:text-box></draw:frame></text:p>
      <text:h text:style-name="Heading_20_2" text:outline-level="2"><text:bookmark-start text:name="__RefHeading___Toc637_2870247131"/>Destructive Interference<text:bookmark-end text:name="__RefHeading___Toc637_2870247131"/></text:h>
      <text:p text:style-name="P15"><text:bookmark-start text:name="__DdeLink__160_2870247131"/>The figure below represents <text:span text:style-name="T6">destructive interference</text:span>. The term “destructive” is partially misleading; when the waves overlap, the effect of one of the pulses on the displacement of a particle of the medium is canceled by the effect of the other pulse. <text:span text:style-name="T13">When two pulses undergo destructive interference, they subtract to produce a smaller amplitude.</text:span><text:bookmark-end text:name="__DdeLink__160_2870247131"/></text:p>
      <text:p text:style-name="P16"><draw:frame draw:style-name="fr1" draw:name="Frame3" text:anchor-type="as-char" svg:width="4.0165in" style:rel-width="58%" svg:height="2.0465in" style:rel-height="scale-min" draw:z-index="7"><draw:text-box><text:p text:style-name="Figure"><draw:frame draw:style-name="fr2" draw:name="Image5 Copy 1" text:anchor-type="paragraph" svg:width="4.0165in" style:rel-width="100%" svg:height="1.5799in" style:rel-height="scale" draw:z-index="8"><draw:image xlink:href="Pictures/10000001000001150000006D0F08D328.png" xlink:type="simple" xlink:show="embed" xlink:actuate="onLoad" draw:mime-type="image/png"/></draw:frame>Figure <text:sequence text:ref-name="refFigure2" text:name="Figure" text:formula="ooow:Figure+1" style:num-format="1">4</text:sequence>: The amplitudes of two approaching pulses combining, representing destructive interference.</text:p></draw:text-box></draw:frame></text:p>
      <text:h text:style-name="P17" text:outline-level="1"><text:bookmark-start text:name="__RefHeading___Toc639_2870247131"/>Standing Waves<text:bookmark-end text:name="__RefHeading___Toc639_2870247131"/></text:h>
      <text:p text:style-name="P18"><text:span text:style-name="T5">A </text:span>standing wave<text:span text:style-name="T5">, also known as a stationary wave, is a pattern of wave crests and troughs that remain stationary in a medium. </text:span><text:span text:style-name="T14">A standing wave is a combination of two waves moving in opposite directions, each with the same amplitude and frequency. It occurs when waves are superimposed, leading to </text:span><text:soft-page-break/><text:span text:style-name="T14">interference. </text:span><text:span text:style-name="T15">Unlike </text:span><text:span text:style-name="T16">traveling waves</text:span><text:span text:style-name="T15">, which, as implied, travels through a medium in a certain direction, standing waves vibrate in place.</text:span></text:p>
      <text:p text:style-name="P19"><draw:frame draw:style-name="fr1" draw:name="Frame4" text:anchor-type="as-char" svg:width="5.0555in" style:rel-width="73%" svg:height="3.1236in" style:rel-height="scale-min" draw:z-index="9"><draw:text-box><text:p text:style-name="Figure"><draw:frame draw:style-name="fr2" draw:name="Image4" text:anchor-type="paragraph" svg:width="5.0555in" style:rel-width="100%" svg:height="2.8484in" style:rel-height="scale" draw:z-index="10"><draw:image xlink:href="Pictures/1000000100000538000002F11DE308B9.png" xlink:type="simple" xlink:show="embed" xlink:actuate="onLoad" draw:mime-type="image/png"/></draw:frame>Figure <text:sequence text:ref-name="refFigure3" text:name="Figure" text:formula="ooow:Figure+1" style:num-format="1">5</text:sequence>: A diagram representing standing waves and their properties.</text:p></draw:text-box></draw:frame></text:p>
      <text:p text:style-name="P20"><text:span text:style-name="T6">Nodes</text:span> are the stationary parts of a standing wave. <text:span text:style-name="T6">Antinodes</text:span> are the crest and trough of the wave.</text:p>
      <text:p text:style-name="P20">When waves on a rope hit a fixed end, they are reflected and inverted. These reflected waves then combine with incoming incident waves. At certain frequencies the resulting superposition yields a standing wave, which has nodes, which never move at all, and antinodes, which have an amplitude twice as big as the original wave.</text:p>
      <text:p text:style-name="P20">A rope of given length can support support standing waves of many different frequencies called <text:span text:style-name="T6">harmonics</text:span>, which are named based on the number of antinodes.</text:p>
      <text:p text:style-name="P20"><draw:frame draw:style-name="fr3" draw:name="Image6" text:anchor-type="char" svg:width="6.9252in" svg:height="5.1937in" draw:z-index="0"><draw:image xlink:href="Pictures/1000000100000A00000007805D028DE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weight="normal" officeooo:rsid="0063add9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14:41:32.782593689</meta:creation-date>
    <dc:date>2026-06-09T20:50:05.673055630</dc:date>
    <meta:editing-duration>PT5H9M47S</meta:editing-duration>
    <meta:editing-cycles>48</meta:editing-cycles>
    <meta:generator>LibreOffice/25.8.5.2$Linux_X86_64 LibreOffice_project/580$Build-2</meta:generator>
    <meta:document-statistic meta:table-count="0" meta:image-count="6" meta:object-count="0" meta:page-count="5" meta:paragraph-count="37" meta:word-count="772" meta:character-count="4605" meta:non-whitespace-character-count="3870"/>
  </office:meta>
</office:document-meta>
</file>
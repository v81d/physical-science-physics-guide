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Pictures/10000001000001C70000016AB51DB8CD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5be103" officeooo:paragraph-rsid="005be103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1dc2ea"/>
    </style:style>
    <style:style style:name="P6" style:family="paragraph" style:parent-style-name="Heading_20_1">
      <style:paragraph-properties fo:break-before="page"/>
      <style:text-properties officeooo:rsid="005be103" officeooo:paragraph-rsid="005be103"/>
    </style:style>
    <style:style style:name="P7" style:family="paragraph" style:parent-style-name="Text_20_body">
      <style:text-properties fo:font-weight="bold" officeooo:rsid="005be103" officeooo:paragraph-rsid="005be103" style:font-weight-asian="bold" style:font-weight-complex="bold"/>
    </style:style>
    <style:style style:name="P8" style:family="paragraph" style:parent-style-name="Text_20_body">
      <style:text-properties fo:font-weight="normal" officeooo:rsid="005be103" officeooo:paragraph-rsid="005be103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5be103" officeooo:paragraph-rsid="005be103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5be103" officeooo:paragraph-rsid="005be103" style:font-weight-asian="normal" style:font-weight-complex="normal"/>
    </style:style>
    <style:style style:name="P11" style:family="paragraph" style:parent-style-name="Heading_20_1">
      <style:text-properties officeooo:rsid="005be103" officeooo:paragraph-rsid="005be103"/>
    </style:style>
    <style:style style:name="P12" style:family="paragraph" style:parent-style-name="Text_20_body">
      <style:text-properties officeooo:rsid="005be103" officeooo:paragraph-rsid="005be103"/>
    </style:style>
    <style:style style:name="P13" style:family="paragraph" style:parent-style-name="Heading_20_2">
      <style:text-properties officeooo:rsid="005be103" officeooo:paragraph-rsid="005be103"/>
    </style:style>
    <style:style style:name="P14" style:family="paragraph" style:parent-style-name="Heading_20_1">
      <style:text-properties officeooo:rsid="00573d29" officeooo:paragraph-rsid="00573d29"/>
    </style:style>
    <style:style style:name="P15" style:family="paragraph" style:parent-style-name="Text_20_body" style:list-style-name="L1">
      <style:text-properties officeooo:rsid="005d6e0f" officeooo:paragraph-rsid="005d6e0f"/>
    </style:style>
    <style:style style:name="P16" style:family="paragraph" style:parent-style-name="Text_20_body" style:list-style-name="L1">
      <style:paragraph-properties fo:text-align="center" style:justify-single-word="false"/>
      <style:text-properties officeooo:rsid="005d6e0f" officeooo:paragraph-rsid="005d6e0f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5d6e0f" officeooo:paragraph-rsid="005d6e0f"/>
    </style:style>
    <style:style style:name="T1" style:family="text">
      <style:text-properties officeooo:rsid="0035f633"/>
    </style:style>
    <style:style style:name="T2" style:family="text">
      <style:text-properties officeooo:rsid="0047f7c9"/>
    </style:style>
    <style:style style:name="T3" style:family="text">
      <style:text-properties officeooo:rsid="005be10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5d6e0f"/>
    </style:style>
    <style:style style:name="T7" style:family="text">
      <style:text-properties officeooo:rsid="005dc07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al Gravitation<text:bookmark-start text:name="__DdeLink__138_391587487"/><text:bookmark-start text:name="__DdeLink__502_3041763869"/></text:p>
      <text:p text:style-name="P2"><text:span text:style-name="T1">November </text:span><text:span text:style-name="T2">1</text:span><text:span text:style-name="T3">8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2468_1628348750" office:name="Newton’s Law of Universal Gravitation" text:style-name="Index_20_Link" text:visited-style-name="Index_20_Link">Newton’s Law of Universal Gravitation<text:tab/>2</text:a></text:p>
          <text:p text:style-name="P3"><text:a xlink:type="simple" xlink:href="#__RefHeading___Toc2470_1628348750" office:name="Gravitational Fields" text:style-name="Index_20_Link" text:visited-style-name="Index_20_Link">Gravitational Fields<text:tab/>2</text:a></text:p>
          <text:p text:style-name="P4"><text:a xlink:type="simple" xlink:href="#__RefHeading___Toc2472_1628348750" office:name="Force of Gravity in Orbit" text:style-name="Index_20_Link" text:visited-style-name="Index_20_Link">Force of Gravity in Orbit<text:tab/>2</text:a></text:p>
          <text:p text:style-name="P3"><text:a xlink:type="simple" xlink:href="#__RefHeading___Toc2411_1628348750" office:name="Examples and Applications" text:style-name="Index_20_Link" text:visited-style-name="Index_20_Link">Examples and Applications<text:tab/>3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 text:is-list-header="true"><text:bookmark-end text:name="__DdeLink__502_3041763869"/><text:bookmark-end text:name="__DdeLink__138_391587487"/><text:bookmark-start text:name="__RefHeading___Toc2468_1628348750"/>Newton’s Law of Universal Gravitation<text:bookmark-end text:name="__RefHeading___Toc2468_1628348750"/></text:h>
      <text:p text:style-name="P7">Newton’s law of universal gravitation<text:span text:style-name="T4"> states that the gravitation force of every particle attracts every other particle in the universe with a force that is </text:span>proportional to the product of their masses<text:span text:style-name="T4"> and </text:span>inversely proportional to the square of the distance between their centers<text:span text:style-name="T4">.</text:span></text:p>
      <text:p text:style-name="P8">It is defined using the formula:</text:p>
      <text:p text:style-name="P9"><draw:frame draw:style-name="fr1" draw:name="Object1" text:anchor-type="as-char" svg:y="-0.2693in" svg:width="0.8665in" svg:height="0.4437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10">where <draw:frame draw:style-name="fr1" draw:name="Object2" text:anchor-type="as-char" svg:y="-0.1492in" svg:width="0.1799in" svg:height="0.2102in" draw:z-index="1"><draw:object xlink:href="./Object 2" xlink:type="simple" xlink:show="embed" xlink:actuate="onLoad"/><draw:image xlink:href="./ObjectReplacements/Object 2" xlink:type="simple" xlink:show="embed" xlink:actuate="onLoad"/></draw:frame><text:s/>is the gravitational force, <draw:frame draw:style-name="fr1" draw:name="Object15" text:anchor-type="as-char" svg:y="-0.1492in" svg:width="0.1264in" svg:height="0.1854in" draw:z-index="2"><draw:object xlink:href="./Object 15" xlink:type="simple" xlink:show="embed" xlink:actuate="onLoad"/><draw:image xlink:href="./ObjectReplacements/Object 15" xlink:type="simple" xlink:show="embed" xlink:actuate="onLoad"/></draw:frame><text:s/>is the universal gravitational constant, <draw:frame draw:style-name="fr1" draw:name="Object17" text:anchor-type="as-char" svg:y="-0.1492in" svg:width="0.1756in" svg:height="0.2102in" draw:z-index="3"><draw:object xlink:href="./Object 17" xlink:type="simple" xlink:show="embed" xlink:actuate="onLoad"/><draw:image xlink:href="./ObjectReplacements/Object 17" xlink:type="simple" xlink:show="embed" xlink:actuate="onLoad"/></draw:frame><text:s/>and <draw:frame draw:style-name="fr1" draw:name="Object18" text:anchor-type="as-char" svg:y="-0.1492in" svg:width="0.1772in" svg:height="0.2102in" draw:z-index="4"><draw:object xlink:href="./Object 18" xlink:type="simple" xlink:show="embed" xlink:actuate="onLoad"/><draw:image xlink:href="./ObjectReplacements/Object 18" xlink:type="simple" xlink:show="embed" xlink:actuate="onLoad"/></draw:frame><text:s/>are the masses of the two objects, and <draw:frame draw:style-name="fr1" draw:name="Object19" text:anchor-type="as-char" svg:y="-0.1492in" svg:width="0.0772in" svg:height="0.1854in" draw:z-index="5"><draw:object xlink:href="./Object 19" xlink:type="simple" xlink:show="embed" xlink:actuate="onLoad"/><draw:image xlink:href="./ObjectReplacements/Object 19" xlink:type="simple" xlink:show="embed" xlink:actuate="onLoad"/></draw:frame><text:s/>is the distance between the centers of the two objects.</text:p>
      <text:p text:style-name="P10">Even if their masses are different, the forces the two objects exert on each other are <text:span text:style-name="T5">equal</text:span>. In our universe, the gravitational constant, <draw:frame draw:style-name="fr1" draw:name="Object20" text:anchor-type="as-char" svg:y="-0.1492in" svg:width="0.1264in" svg:height="0.1854in" draw:z-index="7"><draw:object xlink:href="./Object 20" xlink:type="simple" xlink:show="embed" xlink:actuate="onLoad"/><draw:image xlink:href="./ObjectReplacements/Object 20" xlink:type="simple" xlink:show="embed" xlink:actuate="onLoad"/></draw:frame>, is approximately <draw:frame draw:style-name="fr1" draw:name="Object16" text:anchor-type="as-char" svg:y="-0.1728in" svg:width="1.4764in" svg:height="0.2091in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h text:style-name="P11" text:outline-level="1"><text:bookmark-start text:name="__RefHeading___Toc2470_1628348750"/>Gravitational Fields<text:bookmark-end text:name="__RefHeading___Toc2470_1628348750"/></text:h>
      <text:p text:style-name="P12">The farther an object is from an object exerting a gravitational force, the smaller the effect the gravity has on that object. Gravitational force always points toward the <text:span text:style-name="T5">center of an object</text:span><text:span text:style-name="T4">.</text:span></text:p>
      <text:h text:style-name="P13" text:outline-level="2"><text:bookmark-start text:name="__RefHeading___Toc2472_1628348750"/>Force of Gravity in Orbit<text:bookmark-end text:name="__RefHeading___Toc2472_1628348750"/></text:h>
      <text:p text:style-name="P12">When an object is orbiting a celestial body in a <text:span text:style-name="T5">circular motion</text:span><text:span text:style-name="T4">, the force of gravity points toward the center of the celestial body.</text:span></text:p>
      <text:p text:style-name="P8">The straight line <text:span text:style-name="T5">tangent to the trajectory of orbit</text:span> at the point of the object is the expected path of the object, but the force of gravity alters this path and causes it to constantly <text:span text:style-name="T6">change </text:span>as the object revolves around the body. Thus, the object is technically <text:span text:style-name="T5">accelerating</text:span> because the direction of its velocity is constantly changing.</text:p>
      <text:p text:style-name="P9"><text:soft-page-break/><draw:frame draw:style-name="fr2" draw:name="Frame1" text:anchor-type="as-char" svg:width="3.1925in" draw:z-index="8"><draw:text-box fo:min-height="2.5398in"><text:p text:style-name="Figure"><draw:frame draw:style-name="fr3" draw:name="Image1" text:anchor-type="paragraph" svg:width="3.1925in" style:rel-width="100%" svg:height="2.5398in" style:rel-height="scale" draw:z-index="9"><draw:image xlink:href="Pictures/10000001000001C70000016AB51DB8CD.png" xlink:type="simple" xlink:show="embed" xlink:actuate="onLoad" draw:mime-type="image/png"/></draw:frame>Figure <text:sequence text:ref-name="refFigure0" text:name="Figure" text:formula="ooow:Figure+1" style:num-format="1">1</text:sequence>: The orbital velocity and the gravitational force acting on a satellite above Earth.</text:p></draw:text-box></draw:frame></text:p>
      <text:h text:style-name="P14" text:outline-level="1"><text:bookmark-start text:name="__RefHeading___Toc2411_1628348750"/>Examples and Applications<text:bookmark-end text:name="__RefHeading___Toc2411_1628348750"/></text:h>
      <text:list text:style-name="L1">
        <text:list-item>
          <text:p text:style-name="P15">Calculate the gravitational force between two students, each of mass <draw:frame draw:style-name="fr1" draw:name="Object3" text:anchor-type="as-char" svg:y="-0.1492in" svg:width="0.4047in" svg:height="0.1854in" draw:z-index="10"><draw:object xlink:href="./Object 3" xlink:type="simple" xlink:show="embed" xlink:actuate="onLoad"/><draw:image xlink:href="./ObjectReplacements/Object 3" xlink:type="simple" xlink:show="embed" xlink:actuate="onLoad"/></draw:frame>, separated by a distance of <draw:frame draw:style-name="fr1" draw:name="Object4" text:anchor-type="as-char" svg:y="-0.1492in" svg:width="0.4543in" svg:height="0.1854in" draw:z-index="11"><draw:object xlink:href="./Object 4" xlink:type="simple" xlink:show="embed" xlink:actuate="onLoad"/><draw:image xlink:href="./ObjectReplacements/Object 4" xlink:type="simple" xlink:show="embed" xlink:actuate="onLoad"/></draw:frame>.</text:p>
          <text:p text:style-name="P16"><draw:frame draw:style-name="fr1" draw:name="Object5" text:anchor-type="as-char" svg:y="-0.4799in" svg:width="2.9992in" svg:height="0.9272in" draw:z-index="12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7">An electron (<draw:frame draw:style-name="fr1" draw:name="Object6" text:anchor-type="as-char" svg:y="-0.1728in" svg:width="1.1638in" svg:height="0.2091in" draw:z-index="13"><draw:object xlink:href="./Object 6" xlink:type="simple" xlink:show="embed" xlink:actuate="onLoad"/><draw:image xlink:href="./ObjectReplacements/Object 6" xlink:type="simple" xlink:show="embed" xlink:actuate="onLoad"/></draw:frame>) and a proton (<draw:frame draw:style-name="fr1" draw:name="Object7" text:anchor-type="as-char" svg:y="-0.1728in" svg:width="1.1681in" svg:height="0.2091in" draw:z-index="14"><draw:object xlink:href="./Object 7" xlink:type="simple" xlink:show="embed" xlink:actuate="onLoad"/><draw:image xlink:href="./ObjectReplacements/Object 7" xlink:type="simple" xlink:show="embed" xlink:actuate="onLoad"/></draw:frame>) in a hydrogen atom exert a force of approximately <draw:frame draw:style-name="fr1" draw:name="Object8" text:anchor-type="as-char" svg:y="-0.1728in" svg:width="0.8535in" svg:height="0.2091in" draw:z-index="15"><draw:object xlink:href="./Object 8" xlink:type="simple" xlink:show="embed" xlink:actuate="onLoad"/><draw:image xlink:href="./ObjectReplacements/Object 8" xlink:type="simple" xlink:show="embed" xlink:actuate="onLoad"/></draw:frame><text:s/>on each other. Compute the distance by which the<text:span text:style-name="T7">ir centers</text:span> are separated.</text:p>
          <text:p text:style-name="P16"><draw:frame draw:style-name="fr1" draw:name="Object9" text:anchor-type="as-char" svg:y="-0.6984in" svg:width="4.6846in" svg:height="1.3398in" draw:z-index="16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08T21:15:10.906978522</dc:date>
    <meta:editing-duration>PT2H18M51S</meta:editing-duration>
    <meta:editing-cycles>29</meta:editing-cycles>
    <meta:generator>LibreOffice/25.8.5.2$Linux_X86_64 LibreOffice_project/580$Build-2</meta:generator>
    <meta:document-statistic meta:table-count="0" meta:image-count="1" meta:object-count="15" meta:page-count="3" meta:paragraph-count="27" meta:word-count="387" meta:character-count="2285" meta:non-whitespace-character-count="1920"/>
  </office:meta>
</office:document-meta>
</file>

<file path=Object 1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_g = frac { G m_1 m_2 } { r^2 }</annotation>
  </semantics>
</math>
</file>

<file path=Object 15/content.xml><?xml version="1.0" encoding="utf-8"?>
<math xmlns="http://www.w3.org/1998/Math/MathML" display="block">
  <semantics>
    <mi>G</mi>
    <annotation encoding="StarMath 5.0">G</annotation>
  </semantics>
</math>
</file>

<file path=Object 16/content.xml><?xml version="1.0" encoding="utf-8"?>
<math xmlns="http://www.w3.org/1998/Math/MathML" display="block">
  <semantics>
    <mrow>
      <mrow>
        <mn>6.67</mn>
        <mo stretchy="false">×</mo>
        <msup>
          <mn>10</mn>
          <mrow>
            <mo stretchy="false">−</mo>
            <mn>11</mn>
          </mrow>
        </msup>
      </mrow>
      <mrow>
        <mtext>N</mtext>
        <mo stretchy="false">⋅</mo>
        <msup>
          <mtext>m</mtext>
          <mn>2</mn>
        </msup>
        <mo stretchy="false">/</mo>
        <msup>
          <mtext>kg</mtext>
          <mn>2</mn>
        </msup>
      </mrow>
    </mrow>
    <annotation encoding="StarMath 5.0">6.67 times 10^-11 "N" cdot "m"^2 / "kg"^2</annotation>
  </semantics>
</math>
</file>

<file path=Object 17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8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19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sub>
      <mi>F</mi>
      <mi>g</mi>
    </msub>
    <annotation encoding="StarMath 5.0">F_g</annotation>
  </semantics>
</math>
</file>

<file path=Object 20/content.xml><?xml version="1.0" encoding="utf-8"?>
<math xmlns="http://www.w3.org/1998/Math/MathML" display="block">
  <semantics>
    <mi>G</mi>
    <annotation encoding="StarMath 5.0">G</annotation>
  </semantics>
</math>
</file>

<file path=Object 3/content.xml><?xml version="1.0" encoding="utf-8"?>
<math xmlns="http://www.w3.org/1998/Math/MathML" display="block">
  <semantics>
    <mrow>
      <mn>60.</mn>
      <mtext>kg</mtext>
    </mrow>
    <annotation encoding="StarMath 5.0">60. "kg"</annotation>
  </semantics>
</math>
</file>

<file path=Object 4/content.xml><?xml version="1.0" encoding="utf-8"?>
<math xmlns="http://www.w3.org/1998/Math/MathML" display="block">
  <semantics>
    <mrow>
      <mn>0.50</mn>
      <mtext>m</mtext>
    </mrow>
    <annotation encoding="StarMath 5.0">0.50 "m"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F</mi>
              <mi>g</mi>
            </msub>
            <mo stretchy="false">=</mo>
            <mfrac>
              <mrow>
                <mi>G</mi>
                <msub>
                  <mi>m</mi>
                  <mn>1</mn>
                </msub>
                <msub>
                  <mi>m</mi>
                  <mn>2</mn>
                </msub>
              </mrow>
              <msup>
                <mi>r</mi>
                <mn>2</mn>
              </msup>
            </mfrac>
          </mrow>
        </mtd>
      </mtr>
      <mtr>
        <mtd>
          <mrow>
            <mrow>
              <msub>
                <mi>F</mi>
                <mi>g</mi>
              </msub>
              <mo stretchy="false">=</mo>
              <mrow>
                <mo fence="true" form="prefix" stretchy="false">(</mo>
                <mrow>
                  <mrow>
                    <mrow>
                      <mn>6.67</mn>
                      <mo stretchy="false">×</mo>
                      <msup>
                        <mn>10</mn>
                        <mrow>
                          <mo stretchy="false">−</mo>
                          <mn>11</mn>
                        </mrow>
                      </msup>
                    </mrow>
                    <mrow>
                      <mtext>N</mtext>
                      <mo stretchy="false">⋅</mo>
                      <msup>
                        <mtext>m</mtext>
                        <mn>2</mn>
                      </msup>
                      <mo stretchy="false">/</mo>
                      <msup>
                        <mtext>kg</mtext>
                        <mn>2</mn>
                      </msup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60.</mn>
                  <mtext>kg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60.</mn>
                  <mtext>kg</mtext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i>g</mi>
              </msub>
              <mo stretchy="false">≈</mo>
              <mrow>
                <mn>9.6</mn>
                <mo stretchy="false">×</mo>
                <msup>
                  <mn>10</mn>
                  <mrow>
                    <mo stretchy="false">−</mo>
                    <mn>7</mn>
                  </mrow>
                </msup>
              </mrow>
            </mrow>
            <mtext>N</mtext>
          </mrow>
        </mtd>
      </mtr>
    </mtable>
    <annotation encoding="StarMath 5.0">F_g = frac { G m_1 m_2 } { r^2 } newline
F_g = ( 6.67 times 10^-11 "N" cdot "m"^2 / "kg"^2 ) ( 60. "kg" ) ( 60. "kg" ) newline
F_g approx 9.6 times 10^-7 "N"</annotation>
  </semantics>
</math>
</file>

<file path=Object 6/content.xml><?xml version="1.0" encoding="utf-8"?>
<math xmlns="http://www.w3.org/1998/Math/MathML" display="block">
  <semantics>
    <mrow>
      <mrow>
        <mi>m</mi>
        <mo stretchy="false">≈</mo>
        <mrow>
          <mn>9.1</mn>
          <mo stretchy="false">×</mo>
          <msup>
            <mn>10</mn>
            <mrow>
              <mo stretchy="false">−</mo>
              <mn>31</mn>
            </mrow>
          </msup>
        </mrow>
      </mrow>
      <mtext>kg</mtext>
    </mrow>
    <annotation encoding="StarMath 5.0">m approx 9.1 times 10^-31 "kg"</annotation>
  </semantics>
</math>
</file>

<file path=Object 7/content.xml><?xml version="1.0" encoding="utf-8"?>
<math xmlns="http://www.w3.org/1998/Math/MathML" display="block">
  <semantics>
    <mrow>
      <mrow>
        <mi>m</mi>
        <mo stretchy="false">≈</mo>
        <mrow>
          <mn>1.7</mn>
          <mo stretchy="false">×</mo>
          <msup>
            <mn>10</mn>
            <mrow>
              <mo stretchy="false">−</mo>
              <mn>27</mn>
            </mrow>
          </msup>
        </mrow>
      </mrow>
      <mtext>kg</mtext>
    </mrow>
    <annotation encoding="StarMath 5.0">m approx 1.7 times 10^-27 "kg"</annotation>
  </semantics>
</math>
</file>

<file path=Object 8/content.xml><?xml version="1.0" encoding="utf-8"?>
<math xmlns="http://www.w3.org/1998/Math/MathML" display="block">
  <semantics>
    <mrow>
      <mrow>
        <mn>4.1</mn>
        <mo stretchy="false">×</mo>
        <msup>
          <mn>10</mn>
          <mrow>
            <mo stretchy="false">−</mo>
            <mn>47</mn>
          </mrow>
        </msup>
      </mrow>
      <mtext>N</mtext>
    </mrow>
    <annotation encoding="StarMath 5.0">4.1 times 10^-47 "N"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F</mi>
              <mi>g</mi>
            </msub>
            <mo stretchy="false">=</mo>
            <mfrac>
              <mrow>
                <mi>G</mi>
                <msub>
                  <mi>m</mi>
                  <mn>1</mn>
                </msub>
                <msub>
                  <mi>m</mi>
                  <mn>2</mn>
                </msub>
              </mrow>
              <msup>
                <mi>r</mi>
                <mn>2</mn>
              </msup>
            </mfrac>
          </mrow>
        </mtd>
      </mtr>
      <mtr>
        <mtd>
          <mrow>
            <mrow>
              <mn>4.1</mn>
              <mo stretchy="false">×</mo>
              <msup>
                <mn>10</mn>
                <mrow>
                  <mo stretchy="false">−</mo>
                  <mn>47</mn>
                </mrow>
              </msup>
            </mrow>
            <mrow>
              <mtext>N</mtext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n>6.67</mn>
                          <mo stretchy="false">×</mo>
                          <msup>
                            <mn>10</mn>
                            <mrow>
                              <mo stretchy="false">−</mo>
                              <mn>11</mn>
                            </mrow>
                          </msup>
                        </mrow>
                        <mrow>
                          <mtext>N</mtext>
                          <mo stretchy="false">⋅</mo>
                          <msup>
                            <mtext>m</mtext>
                            <mn>2</mn>
                          </msup>
                          <mo stretchy="false">/</mo>
                          <msup>
                            <mtext>kg</mtext>
                            <mn>2</mn>
                          </msup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n>9.1</mn>
                          <mo stretchy="false">×</mo>
                          <msup>
                            <mn>10</mn>
                            <mrow>
                              <mo stretchy="false">−</mo>
                              <mn>31</mn>
                            </mrow>
                          </msup>
                        </mrow>
                        <mtext>kg</mtext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n>1.7</mn>
                          <mo stretchy="false">×</mo>
                          <msup>
                            <mn>10</mn>
                            <mrow>
                              <mo stretchy="false">−</mo>
                              <mn>27</mn>
                            </mrow>
                          </msup>
                        </mrow>
                        <mtext>kg</mtext>
                      </mrow>
                    </mrow>
                    <mo fence="true" form="postfix" stretchy="false">)</mo>
                  </mrow>
                </mrow>
                <msup>
                  <mi>r</mi>
                  <mn>2</mn>
                </msup>
              </mfrac>
            </mrow>
          </mrow>
        </mtd>
      </mtr>
      <mtr>
        <mtd>
          <mrow>
            <mrow>
              <msup>
                <mi>r</mi>
                <mn>2</mn>
              </msup>
              <mo stretchy="false">≈</mo>
              <mrow>
                <mrow>
                  <mo stretchy="false">−</mo>
                  <mn>2.5</mn>
                </mrow>
                <mo stretchy="false">×</mo>
                <msup>
                  <mn>10</mn>
                  <mrow>
                    <mo stretchy="false">−</mo>
                    <mn>21</mn>
                  </mrow>
                </msup>
              </mrow>
            </mrow>
            <msup>
              <mtext>m</mtext>
              <mn>2</mn>
            </msup>
          </mrow>
        </mtd>
      </mtr>
      <mtr>
        <mtd>
          <mrow>
            <mrow>
              <mi>r</mi>
              <mo stretchy="false">≈</mo>
              <mrow>
                <mn>5.0</mn>
                <mo stretchy="false">×</mo>
                <msup>
                  <mn>10</mn>
                  <mrow>
                    <mo stretchy="false">−</mo>
                    <mn>11</mn>
                  </mrow>
                </msup>
              </mrow>
            </mrow>
            <mtext>m</mtext>
          </mrow>
        </mtd>
      </mtr>
    </mtable>
    <annotation encoding="StarMath 5.0">F_g = frac { G m_1 m_2 } { r^2 } newline
4.1 times 10^-47 "N" = frac { ( 6.67 times 10^-11 "N" cdot "m"^2 / "kg"^2 ) ( 9.1 times 10^-31 "kg" ) ( 1.7 times 10^-27 "kg" ) } { r^2 } newline
r^2 approx -2.5 times 10^-21 "m"^2 newline
r approx 5.0 times 10^-11 "m"</annotation>
  </semantics>
</math>
</file>
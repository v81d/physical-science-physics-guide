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Pictures/1000000000000314000000A4AF8A80A9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87ee5f" officeooo:paragraph-rsid="0087ee5f"/>
    </style:style>
    <style:style style:name="P2" style:family="paragraph" style:parent-style-name="Text_20_body">
      <style:paragraph-properties fo:text-align="center" style:justify-single-word="false"/>
      <style:text-properties fo:font-style="italic" officeooo:paragraph-rsid="00a026d1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015d3fa" officeooo:paragraph-rsid="001f6534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officeooo:rsid="004c7a21" officeooo:paragraph-rsid="004c7a21"/>
    </style:style>
    <style:style style:name="P7" style:family="paragraph" style:parent-style-name="Heading_20_1">
      <style:paragraph-properties fo:break-before="page"/>
      <style:text-properties officeooo:rsid="0087ee5f" officeooo:paragraph-rsid="0087ee5f"/>
    </style:style>
    <style:style style:name="P8" style:family="paragraph" style:parent-style-name="Text_20_body">
      <style:text-properties officeooo:rsid="0087ee5f" officeooo:paragraph-rsid="0087ee5f"/>
    </style:style>
    <style:style style:name="P9" style:family="paragraph" style:parent-style-name="Text_20_body">
      <style:text-properties fo:font-weight="bold" officeooo:rsid="0087ee5f" officeooo:paragraph-rsid="0087ee5f" style:font-weight-asian="bold" style:font-weight-complex="bold"/>
    </style:style>
    <style:style style:name="P10" style:family="paragraph" style:parent-style-name="Heading_20_2">
      <style:text-properties officeooo:rsid="0089a0e4" officeooo:paragraph-rsid="0089a0e4"/>
    </style:style>
    <style:style style:name="P11" style:family="paragraph" style:parent-style-name="Text_20_body">
      <style:text-properties officeooo:rsid="0087ee5f" officeooo:paragraph-rsid="0089a0e4"/>
    </style:style>
    <style:style style:name="P12" style:family="paragraph" style:parent-style-name="Text_20_body">
      <style:text-properties fo:font-weight="bold" officeooo:rsid="0089a0e4" officeooo:paragraph-rsid="0089a0e4" style:font-weight-asian="bold" style:font-weight-complex="bold"/>
    </style:style>
    <style:style style:name="P13" style:family="paragraph" style:parent-style-name="Heading_20_2">
      <style:text-properties officeooo:rsid="008b6354" officeooo:paragraph-rsid="008b6354"/>
    </style:style>
    <style:style style:name="P14" style:family="paragraph" style:parent-style-name="Text_20_body">
      <style:text-properties fo:font-weight="bold" officeooo:rsid="008b6354" officeooo:paragraph-rsid="008b6354" style:font-weight-asian="bold" style:font-weight-complex="bold"/>
    </style:style>
    <style:style style:name="P15" style:family="paragraph" style:parent-style-name="Heading_20_1">
      <style:text-properties officeooo:rsid="008e1459" officeooo:paragraph-rsid="008e1459"/>
    </style:style>
    <style:style style:name="P16" style:family="paragraph" style:parent-style-name="Text_20_body">
      <style:text-properties officeooo:paragraph-rsid="008e1459"/>
    </style:style>
    <style:style style:name="P17" style:family="paragraph" style:parent-style-name="Heading_20_2">
      <style:text-properties officeooo:rsid="009390e3" officeooo:paragraph-rsid="009390e3"/>
    </style:style>
    <style:style style:name="P18" style:family="paragraph" style:parent-style-name="Text_20_body">
      <style:text-properties fo:font-weight="normal" officeooo:rsid="00926f5a" officeooo:paragraph-rsid="00926f5a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weight="normal" officeooo:rsid="00926f5a" officeooo:paragraph-rsid="00926f5a" style:font-weight-asian="normal" style:font-weight-complex="normal"/>
    </style:style>
    <style:style style:name="P20" style:family="paragraph" style:parent-style-name="Heading_20_2">
      <style:text-properties officeooo:rsid="00944c5f" officeooo:paragraph-rsid="00944c5f"/>
    </style:style>
    <style:style style:name="P21" style:family="paragraph" style:parent-style-name="Text_20_body">
      <style:text-properties officeooo:rsid="00944c5f" officeooo:paragraph-rsid="0095ea4d"/>
    </style:style>
    <style:style style:name="P22" style:family="paragraph" style:parent-style-name="Heading_20_1">
      <style:text-properties officeooo:rsid="0095ea4d" officeooo:paragraph-rsid="0095ea4d"/>
    </style:style>
    <style:style style:name="P23" style:family="paragraph" style:parent-style-name="Text_20_body" style:list-style-name="L1">
      <style:text-properties officeooo:rsid="0095ea4d" officeooo:paragraph-rsid="0095ea4d"/>
    </style:style>
    <style:style style:name="P24" style:family="paragraph" style:parent-style-name="Text_20_body" style:list-style-name="L1">
      <style:paragraph-properties fo:text-align="center" style:justify-single-word="false"/>
      <style:text-properties officeooo:rsid="0095ea4d" officeooo:paragraph-rsid="0095ea4d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95ea4d" officeooo:paragraph-rsid="0095ea4d"/>
    </style:style>
    <style:style style:name="T1" style:family="text">
      <style:text-properties officeooo:rsid="00a026d1"/>
    </style:style>
    <style:style style:name="T2" style:family="text">
      <style:text-properties officeooo:rsid="002feec6"/>
    </style:style>
    <style:style style:name="T3" style:family="text">
      <style:text-properties officeooo:rsid="002900b4"/>
    </style:style>
    <style:style style:name="T4" style:family="text">
      <style:text-properties officeooo:rsid="00332384"/>
    </style:style>
    <style:style style:name="T5" style:family="text">
      <style:text-properties officeooo:rsid="0071f4bd"/>
    </style:style>
    <style:style style:name="T6" style:family="text">
      <style:text-properties officeooo:rsid="0087ee5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9a0e4" style:font-weight-asian="normal" style:font-weight-complex="normal"/>
    </style:style>
    <style:style style:name="T10" style:family="text">
      <style:text-properties fo:font-weight="bold" officeooo:rsid="008e1459" style:font-weight-asian="bold" style:font-weight-complex="bold"/>
    </style:style>
    <style:style style:name="T11" style:family="text">
      <style:text-properties fo:font-weight="normal" officeooo:rsid="008e1459" style:font-weight-asian="normal" style:font-weight-complex="normal"/>
    </style:style>
    <style:style style:name="T12" style:family="text">
      <style:text-properties fo:font-weight="normal" officeooo:rsid="00907f74" style:font-weight-asian="normal" style:font-weight-complex="normal"/>
    </style:style>
    <style:style style:name="T13" style:family="text">
      <style:text-properties officeooo:rsid="0095ea4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Electromagnetic Spectrum<text:span text:style-name="T1">**</text:span></text:p>
      <text:p text:style-name="P2">(This <text:span text:style-name="T2">idea or </text:span>topic is <text:span text:style-name="T1">a major aspect of </text:span>the new <text:span text:style-name="T3">Physical Science: Physics course.</text:span>)<text:bookmark-start text:name="__DdeLink__138_391587487"/><text:bookmark-start text:name="__DdeLink__502_3041763869"/></text:p>
      <text:p text:style-name="P3"><text:span text:style-name="T4">April </text:span><text:span text:style-name="T5">2</text:span><text:span text:style-name="T6">9</text:span><text:span text:style-name="T4">, 202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2346_679008467" office:name="The Electromagnetic Spectrum" text:style-name="Index_20_Link" text:visited-style-name="Index_20_Link">The Electromagnetic Spectrum<text:tab/>2</text:a></text:p>
          <text:p text:style-name="P5"><text:a xlink:type="simple" xlink:href="#__RefHeading___Toc383_2190179613" office:name="Radio Waves" text:style-name="Index_20_Link" text:visited-style-name="Index_20_Link">Radio Waves<text:tab/>2</text:a></text:p>
          <text:p text:style-name="P5"><text:a xlink:type="simple" xlink:href="#__RefHeading___Toc385_2190179613" office:name="Microwaves" text:style-name="Index_20_Link" text:visited-style-name="Index_20_Link">Microwaves<text:tab/>2</text:a></text:p>
          <text:p text:style-name="P5"><text:a xlink:type="simple" xlink:href="#__RefHeading___Toc387_2190179613" office:name="Infrared Waves" text:style-name="Index_20_Link" text:visited-style-name="Index_20_Link">Infrared Waves<text:tab/>2</text:a></text:p>
          <text:p text:style-name="P5"><text:a xlink:type="simple" xlink:href="#__RefHeading___Toc389_2190179613" office:name="Ultraviolet (UV) Light" text:style-name="Index_20_Link" text:visited-style-name="Index_20_Link">Ultraviolet (UV) Light<text:tab/>2</text:a></text:p>
          <text:p text:style-name="P5"><text:a xlink:type="simple" xlink:href="#__RefHeading___Toc391_2190179613" office:name="X-Rays" text:style-name="Index_20_Link" text:visited-style-name="Index_20_Link">X-Rays<text:tab/>2</text:a></text:p>
          <text:p text:style-name="P5"><text:a xlink:type="simple" xlink:href="#__RefHeading___Toc393_2190179613" office:name="Gamma Rays" text:style-name="Index_20_Link" text:visited-style-name="Index_20_Link">Gamma Rays<text:tab/>2</text:a></text:p>
          <text:p text:style-name="P4"><text:a xlink:type="simple" xlink:href="#__RefHeading___Toc203_318428376" office:name="The Color of Light" text:style-name="Index_20_Link" text:visited-style-name="Index_20_Link">The Color of Light<text:tab/>3</text:a></text:p>
          <text:p text:style-name="P5"><text:a xlink:type="simple" xlink:href="#__RefHeading___Toc205_318428376" office:name="Primary Colors" text:style-name="Index_20_Link" text:visited-style-name="Index_20_Link">Primary Colors<text:tab/>3</text:a></text:p>
          <text:p text:style-name="P5"><text:a xlink:type="simple" xlink:href="#__RefHeading___Toc207_318428376" office:name="Dispersion" text:style-name="Index_20_Link" text:visited-style-name="Index_20_Link">Dispersion<text:tab/>3</text:a></text:p>
          <text:p text:style-name="P4"><text:a xlink:type="simple" xlink:href="#__RefHeading___Toc209_318428376" office:name="Examples and Applications" text:style-name="Index_20_Link" text:visited-style-name="Index_20_Link">Examples and Applications<text:tab/>3</text:a></text:p>
        </text:index-body>
      </text:table-of-content>
      <text:h text:style-name="P6" text:outline-level="1"><text:bookmark-start text:name="__RefHeading___Toc627_4069653955"/>­<text:bookmark-end text:name="__RefHeading___Toc627_4069653955"/></text:h>
      <text:h text:style-name="P7" text:outline-level="1"><text:bookmark-end text:name="__DdeLink__138_391587487"/><text:bookmark-end text:name="__DdeLink__502_3041763869"/><text:bookmark-start text:name="__RefHeading___Toc2346_679008467"/>The Electromagnetic Spectrum<text:bookmark-end text:name="__RefHeading___Toc2346_679008467"/></text:h>
      <text:p text:style-name="P8"><text:span text:style-name="T7">Electromagnetic waves</text:span><text:span text:style-name="T8">, unlike mechanical waves, can</text:span> travel through a vacuum. <text:span text:style-name="T7">Light waves </text:span><text:span text:style-name="T8">are electromagnetic waves that are produced by accelerating charged particles. The </text:span><text:span text:style-name="T7">electromagnetic spectrum</text:span><text:span text:style-name="T8"> is the complete range of frequencies and wavelengths traveling at the speed of light.</text:span><text:bookmark text:name="__DdeLink__369_2190179613"/></text:p>
      <text:p text:style-name="P9">Visible light<text:span text:style-name="T8"> is only a small portion of light. It consists of approximately one percent of the entire spectrum. It includes all wavelengths that can be captured by the human eye.</text:span></text:p>
      <text:h text:style-name="P10" text:outline-level="2"><text:bookmark-start text:name="__RefHeading___Toc383_2190179613"/>Radio Waves<text:bookmark-end text:name="__RefHeading___Toc383_2190179613"/></text:h>
      <text:p text:style-name="P11"><text:span text:style-name="T7">Radio waves</text:span><text:span text:style-name="T8">, </text:span><text:span text:style-name="T9">which are part of the electromagnetic spectrum, </text:span><text:span text:style-name="T8">are used for communication systems, are produced by charged accelerating in a wire.</text:span></text:p>
      <text:h text:style-name="P10" text:outline-level="2"><text:bookmark-start text:name="__RefHeading___Toc385_2190179613"/>Microwaves<text:bookmark-end text:name="__RefHeading___Toc385_2190179613"/></text:h>
      <text:p text:style-name="P12">Microwaves<text:span text:style-name="T8"> are used in radar systems in air traffic control for transmitting long-distance telephone communications in outer space. It is also very commonly used to cook food. The frequencies of microwaves used in a microwave oven is the same as the natural frequency of water, allowing it to vibrate water molecules and thus heat food.</text:span></text:p>
      <text:h text:style-name="P10" text:outline-level="2"><text:bookmark-start text:name="__RefHeading___Toc387_2190179613"/>Infrared Waves<text:bookmark-end text:name="__RefHeading___Toc387_2190179613"/></text:h>
      <text:p text:style-name="P12">Infrared waves<text:span text:style-name="T8"> appear as heat when absorbed by objects. Practical applications of infrared light include heat lamps and photograph (heat sensing).</text:span></text:p>
      <text:h text:style-name="P13" text:outline-level="2"><text:bookmark-start text:name="__RefHeading___Toc389_2190179613"/>Ultraviolet (UV) Light<text:bookmark-end text:name="__RefHeading___Toc389_2190179613"/></text:h>
      <text:p text:style-name="P14">Ultraviolet light<text:span text:style-name="T8"> exists in sunlight; it causes sunburn and hurts your eyes. The </text:span>ozone layer<text:span text:style-name="T8"> of the atmosphere filters most of the harmful frequencies.</text:span></text:p>
      <text:h text:style-name="P13" text:outline-level="2"><text:bookmark-start text:name="__RefHeading___Toc391_2190179613"/>X-Rays<text:bookmark-end text:name="__RefHeading___Toc391_2190179613"/></text:h>
      <text:p text:style-name="P14">X-rays<text:span text:style-name="T8"> are commonly used as diagnostic tools by physicians. Living tissues and organisms can be destroyed by X-rays, so overexposure can be detrimental.</text:span></text:p>
      <text:h text:style-name="P13" text:outline-level="2"><text:bookmark-start text:name="__RefHeading___Toc393_2190179613"/>Gamma Rays<text:bookmark-end text:name="__RefHeading___Toc393_2190179613"/></text:h>
      <text:p text:style-name="P14">Gamma rays<text:span text:style-name="T8"> are emitted by radioactive nuclei. This electromagnetic radiation is harmful to living tissues.</text:span></text:p>
      <text:h text:style-name="P15" text:outline-level="1"><text:bookmark-start text:name="__RefHeading___Toc203_318428376"/><text:soft-page-break/>The Color of Light<text:bookmark-end text:name="__RefHeading___Toc203_318428376"/></text:h>
      <text:p text:style-name="P16"><text:span text:style-name="T10">White light</text:span><text:span text:style-name="T11"> is the combination of all the colors of the visible light spectrum. Color is seen by materials </text:span><text:span text:style-name="T12">reflecting certain wavelengths of light and absorbing others</text:span><text:span text:style-name="T11">. For example, an object could be blue if it </text:span><text:span text:style-name="T10">reflects blue light</text:span><text:span text:style-name="T11">, or it could be black if it </text:span><text:span text:style-name="T10">absorbs all light</text:span><text:span text:style-name="T11">.</text:span></text:p>
      <text:h text:style-name="P17" text:outline-level="2"><text:bookmark-start text:name="__RefHeading___Toc205_318428376"/>Primary Colors<text:bookmark-end text:name="__RefHeading___Toc205_318428376"/></text:h>
      <text:p text:style-name="P18">Any three colors (or frequencies) of light that produce white light when combined with the correct intensity are called <text:span text:style-name="T7">primary colors of light</text:span>. There are a variety of sets of primary colors. The most common set of primary colors is red, green, and blue.</text:p>
      <text:p text:style-name="P19"><draw:frame draw:style-name="fr1" draw:name="Frame1" text:anchor-type="as-char" svg:width="6.9252in" style:rel-width="100%" svg:height="1.7161in" style:rel-height="scale-min" draw:z-index="1"><draw:text-box><text:p text:style-name="Figure"><draw:frame draw:style-name="fr2" draw:name="Image1" text:anchor-type="paragraph" svg:width="6.9252in" style:rel-width="100%" svg:height="1.4409in" style:rel-height="scale" draw:z-index="11"><draw:image xlink:href="Pictures/1000000000000314000000A4AF8A80A9.png" xlink:type="simple" xlink:show="embed" xlink:actuate="onLoad" draw:mime-type="image/png"/></draw:frame>Figure <text:sequence text:ref-name="refFigure0" text:name="Figure" text:formula="ooow:Figure+1" style:num-format="1">1</text:sequence>: Primary colors red, green, and blue mixed together.</text:p></draw:text-box></draw:frame></text:p>
      <text:h text:style-name="P20" text:outline-level="2"><text:bookmark-start text:name="__RefHeading___Toc207_318428376"/>Dispersion<text:bookmark-end text:name="__RefHeading___Toc207_318428376"/></text:h>
      <text:p text:style-name="P21"><text:span text:style-name="T7">Dispersion </text:span><text:span text:style-name="T8">is t</text:span>he separation of visible light into its different colors. The index of refraction <text:span text:style-name="T13">(</text:span><text:span text:style-name="T13"><draw:frame draw:style-name="fr3" draw:name="Object2" text:anchor-type="as-char" svg:y="-0.1492in" svg:width="0.089in" svg:height="0.1854in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13">) </text:span>is dependent on the frequency of light (<draw:frame draw:style-name="fr3" draw:name="Object1" text:anchor-type="as-char" svg:y="-0.1728in" svg:width="0.9291in" svg:height="0.2091in" draw:z-index="0"><draw:object xlink:href="./Object 1" xlink:type="simple" xlink:show="embed" xlink:actuate="onLoad"/><draw:image xlink:href="./ObjectReplacements/Object 1" xlink:type="simple" xlink:show="embed" xlink:actuate="onLoad"/></draw:frame>).</text:p>
      <text:h text:style-name="P22" text:outline-level="1"><text:bookmark-start text:name="__RefHeading___Toc209_318428376"/>Examples and Applications<text:bookmark-end text:name="__RefHeading___Toc209_318428376"/></text:h>
      <text:list text:style-name="L1">
        <text:list-item>
          <text:p text:style-name="P23">What is the frequency of light having a wavelength of <draw:frame draw:style-name="fr3" draw:name="Object3" text:anchor-type="as-char" svg:y="-0.1728in" svg:width="0.8098in" svg:height="0.2091in" draw:z-index="2"><draw:object xlink:href="./Object 3" xlink:type="simple" xlink:show="embed" xlink:actuate="onLoad"/><draw:image xlink:href="./ObjectReplacements/Object 3" xlink:type="simple" xlink:show="embed" xlink:actuate="onLoad"/></draw:frame>? What color is the light?</text:p>
          <text:p text:style-name="P24"><draw:frame draw:style-name="fr3" draw:name="Object4" text:anchor-type="as-char" svg:y="-0.3445in" svg:width="2.098in" svg:height="0.6311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5">What is the wavelength of <draw:frame draw:style-name="fr3" draw:name="Object5" text:anchor-type="as-char" svg:y="-0.1492in" svg:width="0.6437in" svg:height="0.1854in" draw:z-index="4"><draw:object xlink:href="./Object 5" xlink:type="simple" xlink:show="embed" xlink:actuate="onLoad"/><draw:image xlink:href="./ObjectReplacements/Object 5" xlink:type="simple" xlink:show="embed" xlink:actuate="onLoad"/></draw:frame><text:s/>(<draw:frame draw:style-name="fr3" draw:name="Object6" text:anchor-type="as-char" svg:y="-0.1728in" svg:width="0.9618in" svg:height="0.2091in" draw:z-index="5"><draw:object xlink:href="./Object 6" xlink:type="simple" xlink:show="embed" xlink:actuate="onLoad"/><draw:image xlink:href="./ObjectReplacements/Object 6" xlink:type="simple" xlink:show="embed" xlink:actuate="onLoad"/></draw:frame>)?</text:p>
          <text:p text:style-name="P24"><draw:frame draw:style-name="fr3" draw:name="Object7" text:anchor-type="as-char" svg:y="-0.3327in" svg:width="2.2028in" svg:height="0.6075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5">What is the frequency of a microwave that has a wavelength of <draw:frame draw:style-name="fr3" draw:name="Object8" text:anchor-type="as-char" svg:y="-0.1492in" svg:width="0.5244in" svg:height="0.1854in" draw:z-index="7"><draw:object xlink:href="./Object 8" xlink:type="simple" xlink:show="embed" xlink:actuate="onLoad"/><draw:image xlink:href="./ObjectReplacements/Object 8" xlink:type="simple" xlink:show="embed" xlink:actuate="onLoad"/></draw:frame><text:s/>(<draw:frame draw:style-name="fr3" draw:name="Object9" text:anchor-type="as-char" svg:y="-0.1492in" svg:width="0.4543in" svg:height="0.1854in" draw:z-index="8"><draw:object xlink:href="./Object 9" xlink:type="simple" xlink:show="embed" xlink:actuate="onLoad"/><draw:image xlink:href="./ObjectReplacements/Object 9" xlink:type="simple" xlink:show="embed" xlink:actuate="onLoad"/></draw:frame>)?</text:p>
          <text:p text:style-name="P24"><draw:frame draw:style-name="fr3" draw:name="Object10" text:anchor-type="as-char" svg:y="-0.3445in" svg:width="1.6925in" svg:height="0.6311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063add9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19T23:20:59.176454049</dc:date>
    <meta:editing-duration>PT7H54M19S</meta:editing-duration>
    <meta:editing-cycles>90</meta:editing-cycles>
    <meta:generator>LibreOffice/25.8.5.2$Linux_X86_64 LibreOffice_project/580$Build-2</meta:generator>
    <meta:document-statistic meta:table-count="0" meta:image-count="1" meta:object-count="10" meta:page-count="3" meta:paragraph-count="47" meta:word-count="481" meta:character-count="2916" meta:non-whitespace-character-count="2479"/>
  </office:meta>
</office:document-meta>
</file>

<file path=Object 1/content.xml><?xml version="1.0" encoding="utf-8"?>
<math xmlns="http://www.w3.org/1998/Math/MathML" display="block">
  <semantics>
    <mrow>
      <mrow>
        <mn>5.09</mn>
        <mo stretchy="false">×</mo>
        <msup>
          <mn>10</mn>
          <mn>14</mn>
        </msup>
      </mrow>
      <mtext>Hz</mtext>
    </mrow>
    <annotation encoding="StarMath 5.0">5.09 times 10^14 "Hz"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v</mi>
              <mo stretchy="false">=</mo>
              <mi>f</mi>
            </mrow>
            <mi>λ</mi>
          </mrow>
        </mtd>
      </mtr>
      <mtr>
        <mtd>
          <mrow>
            <mrow>
              <mn>3.0</mn>
              <mo stretchy="false">×</mo>
              <msup>
                <mn>10</mn>
                <mn>8</mn>
              </msup>
            </mrow>
            <mrow>
              <mrow>
                <mtext>m</mtext>
                <mo stretchy="false">/</mo>
                <mtext>s</mtext>
              </mrow>
              <mo stretchy="false">=</mo>
              <mi>f</mi>
            </mrow>
            <mrow>
              <mo fence="true" form="prefix" stretchy="false">(</mo>
              <mrow>
                <mrow>
                  <mn>0.03</mn>
                  <mtext>m</mtext>
                </mrow>
              </mrow>
              <mo fence="true" form="postfix" stretchy="false">)</mo>
            </mrow>
          </mrow>
        </mtd>
      </mtr>
      <mtr>
        <mtd>
          <mrow>
            <mi>v</mi>
            <mo stretchy="false">=</mo>
            <mrow>
              <mn>1.0</mn>
              <mo stretchy="false">×</mo>
              <msup>
                <mn>10</mn>
                <mn>10</mn>
              </msup>
            </mrow>
          </mrow>
        </mtd>
      </mtr>
    </mtable>
    <annotation encoding="StarMath 5.0">v = f %lambda newline
3.0 times 10^8 "m"/"s" = f ( 0.03 "m" ) newline
v = 1.0 times 10^10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row>
        <mn>6.0</mn>
        <mo stretchy="false">×</mo>
        <msup>
          <mn>10</mn>
          <mrow>
            <mo stretchy="false">−</mo>
            <mn>7</mn>
          </mrow>
        </msup>
      </mrow>
      <mtext>m</mtext>
    </mrow>
    <annotation encoding="StarMath 5.0">6.0 times 10^-7 "m"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v</mi>
              <mo stretchy="false">=</mo>
              <mi>f</mi>
            </mrow>
            <mi>λ</mi>
          </mrow>
        </mtd>
      </mtr>
      <mtr>
        <mtd>
          <mrow>
            <mrow>
              <mn>3.0</mn>
              <mo stretchy="false">×</mo>
              <msup>
                <mn>10</mn>
                <mn>8</mn>
              </msup>
            </mrow>
            <mrow>
              <mrow>
                <mtext>m</mtext>
                <mo stretchy="false">/</mo>
                <mtext>s</mtext>
              </mrow>
              <mo stretchy="false">=</mo>
              <mi>f</mi>
            </mrow>
            <mrow>
              <mo fence="true" form="prefix" stretchy="false">(</mo>
              <mrow>
                <mrow>
                  <mrow>
                    <mn>6.0</mn>
                    <mo stretchy="false">×</mo>
                    <msup>
                      <mn>10</mn>
                      <mrow>
                        <mo stretchy="false">−</mo>
                        <mn>17</mn>
                      </mrow>
                    </msup>
                  </mrow>
                  <mtext>m</mtext>
                </mrow>
              </mrow>
              <mo fence="true" form="postfix" stretchy="false">)</mo>
            </mrow>
          </mrow>
        </mtd>
      </mtr>
      <mtr>
        <mtd>
          <mrow>
            <mrow>
              <mi>f</mi>
              <mo stretchy="false">=</mo>
              <mrow>
                <mn>5.0</mn>
                <mo stretchy="false">×</mo>
                <msup>
                  <mn>10</mn>
                  <mn>14</mn>
                </msup>
              </mrow>
            </mrow>
            <mtext>Hz</mtext>
            <mtext>(orange)</mtext>
          </mrow>
        </mtd>
      </mtr>
    </mtable>
    <annotation encoding="StarMath 5.0">v = f %lambda newline
3.0 times 10^8 "m"/"s" = f ( 6.0 times 10^-17 "m" ) newline
f = 5.0 times 10^14 "Hz" "(orange)"</annotation>
  </semantics>
</math>
</file>

<file path=Object 5/content.xml><?xml version="1.0" encoding="utf-8"?>
<math xmlns="http://www.w3.org/1998/Math/MathML" display="block">
  <semantics>
    <mrow>
      <mtext>FM</mtext>
      <mn>104.3</mn>
    </mrow>
    <annotation encoding="StarMath 5.0">"FM" 104.3</annotation>
  </semantics>
</math>
</file>

<file path=Object 6/content.xml><?xml version="1.0" encoding="utf-8"?>
<math xmlns="http://www.w3.org/1998/Math/MathML" display="block">
  <semantics>
    <mrow>
      <mrow>
        <mn>1.043</mn>
        <mo stretchy="false">×</mo>
        <msup>
          <mn>10</mn>
          <mn>8</mn>
        </msup>
      </mrow>
      <mtext>Hz</mtext>
    </mrow>
    <annotation encoding="StarMath 5.0">1.043 times 10^8 "Hz"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v</mi>
              <mo stretchy="false">=</mo>
              <mi>f</mi>
            </mrow>
            <mi>λ</mi>
          </mrow>
        </mtd>
      </mtr>
      <mtr>
        <mtd>
          <mrow>
            <mrow>
              <mn>3.0</mn>
              <mo stretchy="false">×</mo>
              <msup>
                <mn>10</mn>
                <mn>8</mn>
              </msup>
            </mrow>
            <mrow>
              <mrow>
                <mtext>m</mtext>
                <mo stretchy="false">/</mo>
                <mtext>s</mtext>
              </mrow>
              <mo stretchy="false">=</mo>
              <mrow>
                <mo fence="true" form="prefix" stretchy="false">(</mo>
                <mrow>
                  <mrow>
                    <mrow>
                      <mn>1.043</mn>
                      <mo stretchy="false">×</mo>
                      <msup>
                        <mn>10</mn>
                        <mn>8</mn>
                      </msup>
                    </mrow>
                    <mtext>Hz</mtext>
                  </mrow>
                </mrow>
                <mo fence="true" form="postfix" stretchy="false">)</mo>
              </mrow>
            </mrow>
            <mi>λ</mi>
          </mrow>
        </mtd>
      </mtr>
      <mtr>
        <mtd>
          <mrow>
            <mrow>
              <mi>λ</mi>
              <mo stretchy="false">=</mo>
              <mn>2.9</mn>
            </mrow>
            <mtext>m</mtext>
          </mrow>
        </mtd>
      </mtr>
    </mtable>
    <annotation encoding="StarMath 5.0">v = f %lambda newline
3.0 times 10^8 "m"/"s" = ( 1.043 times 10^8 "Hz" ) %lambda newline
%lambda = 2.9 "m"</annotation>
  </semantics>
</math>
</file>

<file path=Object 8/content.xml><?xml version="1.0" encoding="utf-8"?>
<math xmlns="http://www.w3.org/1998/Math/MathML" display="block">
  <semantics>
    <mrow>
      <mn>3.00</mn>
      <mtext>cm</mtext>
    </mrow>
    <annotation encoding="StarMath 5.0">3.00 "cm"</annotation>
  </semantics>
</math>
</file>

<file path=Object 9/content.xml><?xml version="1.0" encoding="utf-8"?>
<math xmlns="http://www.w3.org/1998/Math/MathML" display="block">
  <semantics>
    <mrow>
      <mn>0.03</mn>
      <mtext>m</mtext>
    </mrow>
    <annotation encoding="StarMath 5.0">0.03 "m"</annotation>
  </semantics>
</math>
</file>
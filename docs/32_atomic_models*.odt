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12648b8" officeooo:paragraph-rsid="012648b8"/>
    </style:style>
    <style:style style:name="P2" style:family="paragraph" style:parent-style-name="Text_20_body">
      <style:paragraph-properties fo:text-align="center" style:justify-single-word="false"/>
      <style:text-properties fo:font-style="italic" officeooo:paragraph-rsid="012ed9cd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09dd8e0" officeooo:paragraph-rsid="009dd8e0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officeooo:rsid="004c7a21" officeooo:paragraph-rsid="004c7a2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fo:font-weight="bold" officeooo:rsid="01176322" officeooo:paragraph-rsid="01176322" style:font-weight-asian="bold" style:font-weight-complex="bold"/>
    </style:style>
    <style:style style:name="P9" style:family="paragraph" style:parent-style-name="Text_20_body">
      <style:text-properties fo:font-weight="normal" officeooo:rsid="01176322" officeooo:paragraph-rsid="01176322" style:font-weight-asian="normal" style:font-weight-complex="normal"/>
    </style:style>
    <style:style style:name="P10" style:family="paragraph" style:parent-style-name="Text_20_body">
      <style:text-properties fo:font-weight="bold" officeooo:rsid="00fd58fc" officeooo:paragraph-rsid="0118a735" style:font-weight-asian="bold" style:font-weight-complex="bold"/>
    </style:style>
    <style:style style:name="P11" style:family="paragraph" style:parent-style-name="Text_20_body">
      <style:text-properties fo:font-weight="normal" officeooo:rsid="0118a735" officeooo:paragraph-rsid="0118a735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118a735" officeooo:paragraph-rsid="0118a735" style:font-weight-asian="normal" style:font-weight-complex="normal"/>
    </style:style>
    <style:style style:name="P13" style:family="paragraph" style:parent-style-name="Text_20_body" style:list-style-name="L2">
      <style:text-properties fo:font-weight="bold" officeooo:rsid="0118a735" officeooo:paragraph-rsid="0118a735" style:font-weight-asian="bold" style:font-weight-complex="bold"/>
    </style:style>
    <style:style style:name="P14" style:family="paragraph" style:parent-style-name="Text_20_body">
      <style:text-properties officeooo:rsid="00fdd383" officeooo:paragraph-rsid="01176322"/>
    </style:style>
    <style:style style:name="P15" style:family="paragraph" style:parent-style-name="Text_20_body">
      <style:text-properties fo:font-weight="normal" officeooo:rsid="0122c57d" officeooo:paragraph-rsid="0122c57d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122c57d" officeooo:paragraph-rsid="0122c57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122c57d" officeooo:paragraph-rsid="0122c57d" style:font-weight-asian="normal" style:font-weight-complex="normal"/>
    </style:style>
    <style:style style:name="P18" style:family="paragraph" style:parent-style-name="Text_20_body">
      <style:text-properties fo:font-weight="bold" officeooo:rsid="0100c4fd" officeooo:paragraph-rsid="0129003f" style:font-weight-asian="bold" style:font-weight-complex="bold"/>
    </style:style>
    <style:style style:name="P19" style:family="paragraph" style:parent-style-name="Text_20_body">
      <style:text-properties officeooo:paragraph-rsid="0119acce"/>
    </style:style>
    <style:style style:name="P20" style:family="paragraph" style:parent-style-name="Heading_20_1">
      <style:text-properties officeooo:rsid="011bda58" officeooo:paragraph-rsid="011bda58"/>
    </style:style>
    <style:style style:name="P21" style:family="paragraph" style:parent-style-name="Text_20_body">
      <style:text-properties officeooo:rsid="011bda58" officeooo:paragraph-rsid="011bda58"/>
    </style:style>
    <style:style style:name="P22" style:family="paragraph" style:parent-style-name="Text_20_body" style:list-style-name="L3">
      <style:text-properties fo:font-weight="normal" officeooo:rsid="011bda58" officeooo:paragraph-rsid="011bda58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11dd2d8" officeooo:paragraph-rsid="011dd2d8" style:font-weight-asian="normal" style:font-weight-complex="normal"/>
    </style:style>
    <style:style style:name="T1" style:family="text">
      <style:text-properties officeooo:rsid="012ed9cd"/>
    </style:style>
    <style:style style:name="T2" style:family="text">
      <style:text-properties officeooo:rsid="002feec6"/>
    </style:style>
    <style:style style:name="T3" style:family="text">
      <style:text-properties officeooo:rsid="002900b4"/>
    </style:style>
    <style:style style:name="T4" style:family="text">
      <style:text-properties officeooo:rsid="00fd58f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18a73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1176322" style:font-weight-asian="normal" style:font-weight-complex="normal"/>
    </style:style>
    <style:style style:name="T9" style:family="text">
      <style:text-properties officeooo:rsid="01176322"/>
    </style:style>
    <style:style style:name="T10" style:family="text">
      <style:text-properties fo:font-weight="normal" officeooo:rsid="0118a735" style:font-weight-asian="normal" style:font-weight-complex="normal"/>
    </style:style>
    <style:style style:name="T11" style:family="text">
      <style:text-properties officeooo:rsid="0122c57d"/>
    </style:style>
    <style:style style:name="T12" style:family="text">
      <style:text-properties fo:font-weight="normal" officeooo:rsid="0100c4fd" style:font-weight-asian="normal" style:font-weight-complex="normal"/>
    </style:style>
    <style:style style:name="T13" style:family="text">
      <style:text-properties fo:font-weight="normal" officeooo:rsid="0122c57d" style:font-weight-asian="normal" style:font-weight-complex="normal"/>
    </style:style>
    <style:style style:name="T14" style:family="text">
      <style:text-properties fo:font-weight="normal" officeooo:rsid="012af13e" style:font-weight-asian="normal" style:font-weight-complex="normal"/>
    </style:style>
    <style:style style:name="T15" style:family="text">
      <style:text-properties fo:font-weight="bold" officeooo:rsid="0118a735" style:font-weight-asian="bold" style:font-weight-complex="bold"/>
    </style:style>
    <style:style style:name="T16" style:family="text">
      <style:text-properties fo:font-weight="normal" officeooo:rsid="0119acce" style:font-weight-asian="normal" style:font-weight-complex="normal"/>
    </style:style>
    <style:style style:name="T17" style:family="text">
      <style:text-properties officeooo:rsid="0119acce"/>
    </style:style>
    <style:style style:name="T18" style:family="text">
      <style:text-properties fo:font-weight="bold" officeooo:rsid="0119acce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omic Models<text:span text:style-name="T1">*</text:span></text:p>
      <text:p text:style-name="P2">(This <text:span text:style-name="T2">idea or </text:span>topic is <text:span text:style-name="T1">excluded in </text:span>the new <text:span text:style-name="T3">Physical Science: Physics course.</text:span>)<text:bookmark-start text:name="__DdeLink__502_3041763869"/><text:bookmark-start text:name="__DdeLink__138_391587487"/></text:p>
      <text:p text:style-name="P3">May <text:span text:style-name="T4">28</text:span>, 202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475_1628348750" office:name="The Plum Pudding Model" text:style-name="Index_20_Link" text:visited-style-name="Index_20_Link">The Plum Pudding Model<text:tab/>2</text:a></text:p>
          <text:p text:style-name="P4"><text:a xlink:type="simple" xlink:href="#__RefHeading___Toc477_1628348750" office:name="The Rutherford Model" text:style-name="Index_20_Link" text:visited-style-name="Index_20_Link">The Rutherford Model<text:tab/>2</text:a></text:p>
          <text:p text:style-name="P4"><text:a xlink:type="simple" xlink:href="#__RefHeading___Toc178_1526815970" office:name="The Bohr Model" text:style-name="Index_20_Link" text:visited-style-name="Index_20_Link">The Bohr Model<text:tab/>2</text:a></text:p>
          <text:p text:style-name="P5"><text:a xlink:type="simple" xlink:href="#__RefHeading___Toc180_1526815970" office:name="Atomic Energy Levels" text:style-name="Index_20_Link" text:visited-style-name="Index_20_Link">Atomic Energy Levels<text:tab/>3</text:a></text:p>
          <text:p text:style-name="P5"><text:a xlink:type="simple" xlink:href="#__RefHeading___Toc182_1526815970" office:name="Spectral Lines" text:style-name="Index_20_Link" text:visited-style-name="Index_20_Link">Spectral Lines<text:tab/>3</text:a></text:p>
          <text:p text:style-name="P4"><text:a xlink:type="simple" xlink:href="#__RefHeading___Toc479_1628348750" office:name="The Quantum Mechanical Model" text:style-name="Index_20_Link" text:visited-style-name="Index_20_Link">The Quantum Mechanical Model<text:tab/>3</text:a></text:p>
          <text:p text:style-name="P4"><text:a xlink:type="simple" xlink:href="#__RefHeading___Toc539_1628348750" office:name="The Four Fundamental Forces" text:style-name="Index_20_Link" text:visited-style-name="Index_20_Link">The Four Fundamental Forces<text:tab/>3</text:a></text:p>
        </text:index-body>
      </text:table-of-content>
      <text:h text:style-name="P6" text:outline-level="1"><text:bookmark-start text:name="__RefHeading___Toc627_4069653955"/>­<text:bookmark-end text:name="__RefHeading___Toc627_4069653955"/></text:h>
      <text:h text:style-name="P7" text:outline-level="1"><text:bookmark-start text:name="__RefHeading___Toc475_1628348750"/>The Plum Pudding Model<text:bookmark-end text:name="__RefHeading___Toc475_1628348750"/></text:h>
      <text:p text:style-name="P8">J.J. Thomson<text:span text:style-name="T5"> described an atom as a positive sphere with negative electrons embedded inside like raisins in pudding.</text:span></text:p>
      <text:p text:style-name="P8"><text:span text:style-name="T5">This model was later discredited because it could not explain the results of </text:span>Rutherford’s gold foil experiment<text:span text:style-name="T5">.</text:span></text:p>
      <text:h text:style-name="Heading_20_1" text:outline-level="1"><text:bookmark-start text:name="__RefHeading___Toc477_1628348750"/>The <text:span text:style-name="T6">Rutherford</text:span> Model<text:bookmark-end text:name="__RefHeading___Toc477_1628348750"/></text:h>
      <text:p text:style-name="P8"><text:span text:style-name="T5">In </text:span>Ernest Rutherford’s<text:span text:style-name="T5"> gold foil experiment, most alpha particles passed through the foil, but some bounced back. Hence, Rutherford concluded that the atom is mostly empty space with a </text:span>tiny, dense, positive nucleus<text:span text:style-name="T5">.</text:span></text:p>
      <text:p text:style-name="P9">This disproved the <text:span text:style-name="T6">p</text:span>lum <text:span text:style-name="T6">p</text:span>udding model because, if the atom were truly a sphere with negative electrons embedded throughout, the heavy alpha particles should have punched straight through with only tiny deflections, like a bullet through tissue paper. Since some were <text:span text:style-name="T7">deflected</text:span> at unexpectedly large angles or <text:span text:style-name="T7">bounced straight back</text:span>, Rutherford concluded that the positive charge in an atom was, in fact, not spread out, but rather concentrated in a tiny, dense spot to <text:span text:style-name="T7">repel the alpha particles</text:span> so strongly.</text:p>
      <text:p text:style-name="P9">However, this was also later improved upon because it could not explain why electrons did not simply spiral into the nucleus (classical physics said that accelerating charges radiate energy).</text:p>
      <text:h text:style-name="Heading_20_1" text:outline-level="1"><text:bookmark-start text:name="__RefHeading___Toc178_1526815970"/>The Bohr Model<text:bookmark-end text:name="__RefHeading___Toc178_1526815970"/></text:h>
      <text:p text:style-name="P10">Neils Bohr<text:span text:style-name="T5"> hypothesized that </text:span><text:span text:style-name="T8">electrons orbit the nucleus of an atom in specific, fixed, circular paths called </text:span><text:span text:style-name="T9">energy levels</text:span><text:span text:style-name="T8"> </text:span><text:span text:style-name="T10">(</text:span><text:span text:style-name="T10"><draw:frame draw:style-name="fr1" draw:name="Object36" text:anchor-type="as-char" svg:y="-0.1492in" svg:width="0.3134in" svg:height="0.1854in" draw:z-index="0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, </text:span><text:span text:style-name="T10"><draw:frame draw:style-name="fr1" draw:name="Object37" text:anchor-type="as-char" svg:y="-0.1492in" svg:width="0.3146in" svg:height="0.1854in" draw:z-index="1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, etc.)</text:span><text:span text:style-name="T5">. He </text:span>quantized<text:span text:style-name="T5"> the energy levels, demonstrating that electrons could only exist in specific </text:span>quanta<text:span text:style-name="T5">. </text:span><text:span text:style-name="T10">As long as an electron stays in its assigned orbital, it does not lose energy.</text:span></text:p>
      <text:p text:style-name="P11">Bohr illustrated how electrons move between orbitals:</text:p>
      <text:list text:style-name="L1">
        <text:list-item>
          <text:p text:style-name="P12">To move up to a <text:span text:style-name="T7">higher orbital</text:span>, an electron must <text:span text:style-name="T7">absorb</text:span> a photon with exact energy <draw:frame draw:style-name="fr1" draw:name="Object38" text:anchor-type="as-char" svg:y="-0.1492in" svg:width="0.248in" svg:height="0.1854in" draw:z-index="2"><draw:object xlink:href="./Object 38" xlink:type="simple" xlink:show="embed" xlink:actuate="onLoad"/><draw:image xlink:href="./ObjectReplacements/Object 38" xlink:type="simple" xlink:show="embed" xlink:actuate="onLoad"/></draw:frame>.</text:p>
        </text:list-item>
        <text:list-item>
          <text:p text:style-name="P12">To move <text:span text:style-name="T7">down</text:span> to a lower orbit, an electron <text:span text:style-name="T7">emits</text:span> a photon with exact energy <draw:frame draw:style-name="fr1" draw:name="Object39" text:anchor-type="as-char" svg:y="-0.1492in" svg:width="0.248in" svg:height="0.1854in" draw:z-index="3"><draw:object xlink:href="./Object 39" xlink:type="simple" xlink:show="embed" xlink:actuate="onLoad"/><draw:image xlink:href="./ObjectReplacements/Object 39" xlink:type="simple" xlink:show="embed" xlink:actuate="onLoad"/></draw:frame>.</text:p>
        </text:list-item>
      </text:list>
      <text:p text:style-name="P9">The Bohr Model identified a fatal flaw in Rutherford’s <text:span text:style-name="T6">n</text:span>uclear <text:span text:style-name="T6">m</text:span>odel, as the former model <text:span text:style-name="T6">relied on classical physics, which stated that:</text:span></text:p>
      <text:list text:style-name="L2">
        <text:list-item>
          <text:p text:style-name="P13">Circular motion involves acceleration<text:span text:style-name="T5">; an electron moving in a circle is constantly changing direction, which means it is accelerating.</text:span></text:p>
        </text:list-item>
        <text:list-item>
          <text:p text:style-name="P13">Accelerating charges radiate energy<text:span text:style-name="T5">; an electron moving in a circle would emit electromagnetic radiation and thus lose energy.</text:span></text:p>
        </text:list-item>
      </text:list>
      <text:p text:style-name="P11"><text:soft-page-break/>However, if the electron losees energy by radiating light, it should slow down and <text:span text:style-name="T7">spiral inward</text:span>, crashing into the nucleus in a fraction of a second. In reality, electrons do not crash into the nucleus; they are usually stable.</text:p>
      <text:p text:style-name="P11">The Bohr <text:span text:style-name="T11">m</text:span>odel eventually failed because the math was only truly applicable to hydrogen atoms, which only had one electron; it was unable to satisfy the nature of helium or any larger atom.</text:p>
      <text:h text:style-name="Heading_20_2" text:outline-level="2"><text:bookmark-start text:name="__RefHeading___Toc180_1526815970"/>Atomic Energy Levels<text:bookmark-end text:name="__RefHeading___Toc180_1526815970"/></text:h>
      <text:p text:style-name="P14">When an electron is in the <text:span text:style-name="T7">ground state</text:span><text:span text:style-name="T5">, it is at the lowest energy level. On the other hand, an electron in the </text:span><text:span text:style-name="T7">excited state</text:span><text:span text:style-name="T5"> is at an energy level above the ground state. </text:span><text:span text:style-name="T12">When an electron falls from the excited state to the ground state, it emits light energy in the form of color. </text:span><text:span text:style-name="T13">This concept explains why atoms emit specific colors of light (line spectra) rather than a continuous rainbow.</text:span></text:p>
      <text:p text:style-name="P15">The formula to calculate the energy of a photon emitted when an electron drops from a higher energy level to a lower energy level. The photon’s emitted energy equals exactly the difference between the two energy levels:</text:p>
      <text:p text:style-name="P16"><draw:frame draw:style-name="fr1" draw:name="Object40" text:anchor-type="as-char" svg:y="-0.1492in" svg:width="1.3547in" svg:height="0.2102in" draw:z-index="4"><draw:object xlink:href="./Object 40" xlink:type="simple" xlink:show="embed" xlink:actuate="onLoad"/><draw:image xlink:href="./ObjectReplacements/Object 40" xlink:type="simple" xlink:show="embed" xlink:actuate="onLoad"/></draw:frame>,</text:p>
      <text:p text:style-name="P17">where <draw:frame draw:style-name="fr1" draw:name="Object41" text:anchor-type="as-char" svg:y="-0.1492in" svg:width="0.4043in" svg:height="0.2102in" draw:z-index="5"><draw:object xlink:href="./Object 41" xlink:type="simple" xlink:show="embed" xlink:actuate="onLoad"/><draw:image xlink:href="./ObjectReplacements/Object 41" xlink:type="simple" xlink:show="embed" xlink:actuate="onLoad"/></draw:frame><text:s/>is the energy of the released photon, <draw:frame draw:style-name="fr1" draw:name="Object42" text:anchor-type="as-char" svg:y="-0.1492in" svg:width="0.3591in" svg:height="0.2102in" draw:z-index="6"><draw:object xlink:href="./Object 42" xlink:type="simple" xlink:show="embed" xlink:actuate="onLoad"/><draw:image xlink:href="./ObjectReplacements/Object 42" xlink:type="simple" xlink:show="embed" xlink:actuate="onLoad"/></draw:frame><text:s/>is the energy level of the electron before it drops down, and <draw:frame draw:style-name="fr1" draw:name="Object43" text:anchor-type="as-char" svg:y="-0.1492in" svg:width="0.3075in" svg:height="0.2102in" draw:z-index="7"><draw:object xlink:href="./Object 43" xlink:type="simple" xlink:show="embed" xlink:actuate="onLoad"/><draw:image xlink:href="./ObjectReplacements/Object 43" xlink:type="simple" xlink:show="embed" xlink:actuate="onLoad"/></draw:frame><text:s/>is the energy level of the electron after it drops down.</text:p>
      <text:h text:style-name="Heading_20_2" text:outline-level="2"><text:bookmark-start text:name="__RefHeading___Toc182_1526815970"/>Spectral Lines<text:bookmark-end text:name="__RefHeading___Toc182_1526815970"/></text:h>
      <text:p text:style-name="P18">Spectral lines<text:span text:style-name="T5"> are particular frequencies of absorbed or emitted energy by an atom. These frequencies can be seen as light. Each element give</text:span><text:span text:style-name="T14">s </text:span><text:span text:style-name="T5">off a different color spectral line.</text:span></text:p>
      <text:h text:style-name="Heading_20_1" text:outline-level="1"><text:bookmark-start text:name="__RefHeading___Toc479_1628348750"/>The Quantum Mechanical Model<text:bookmark-end text:name="__RefHeading___Toc479_1628348750"/></text:h>
      <text:p text:style-name="P19"><text:span text:style-name="T6">The </text:span><text:span text:style-name="T15">quantum mechanical model</text:span><text:span text:style-name="T10">, </text:span><text:span text:style-name="T16">developed by </text:span>Schrödinger, Heisenberg, et al., <text:span text:style-name="T17">is the currently accepted model of the atom. It treats electrons as </text:span><text:span text:style-name="T18">waves</text:span><text:span text:style-name="T16"> rather than simple particles following paths. This is related to the concept of </text:span><text:span text:style-name="T18">wave-particle duality</text:span><text:span text:style-name="T16">, which demonstrated that electrons have wave-like properties.</text:span></text:p>
      <text:h text:style-name="P20" text:outline-level="1"><text:bookmark-start text:name="__RefHeading___Toc539_1628348750"/>The Four Fundamental Forces<text:bookmark-end text:name="__RefHeading___Toc539_1628348750"/></text:h>
      <text:p text:style-name="P21">There are four primary forces in nature. The following list of the four forces is ordered from strongest to weakest in terms of relative strength:</text:p>
      <text:list text:style-name="L3">
        <text:list-item>
          <text:p text:style-name="P22"><text:span text:style-name="T7">Strong Nuclear</text:span>: Holds the nucleus together against electromagnetic repulsion.</text:p>
        </text:list-item>
        <text:list-item>
          <text:p text:style-name="P22"><text:span text:style-name="T7">Electromagnetic</text:span>: Holds electrons to the nucleus, causes chemical bonds, and repels protons in the nucleus.</text:p>
        </text:list-item>
        <text:list-item>
          <text:p text:style-name="P22"><text:span text:style-name="T7">Weak Nuclear</text:span>: Responsible for radioactive beta decay.</text:p>
        </text:list-item>
        <text:list-item>
          <text:p text:style-name="P23"><text:span text:style-name="T7">Gravitational</text:span>: Negligible at the atomic scale, but dominates at the planetary or cosmic scale.<text:bookmark-end text:name="__DdeLink__502_3041763869"/><text:bookmark-end text:name="__DdeLink__138_39158748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104c09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24:39.730975436</dc:date>
    <meta:editing-duration>PT23H28M41S</meta:editing-duration>
    <meta:editing-cycles>196</meta:editing-cycles>
    <meta:generator>LibreOffice/25.8.5.2$Linux_X86_64 LibreOffice_project/580$Build-2</meta:generator>
    <meta:document-statistic meta:table-count="0" meta:image-count="0" meta:object-count="8" meta:page-count="3" meta:paragraph-count="45" meta:word-count="769" meta:character-count="4667" meta:non-whitespace-character-count="3948"/>
  </office:meta>
</office:document-meta>
</file>

<file path=Object 36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37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38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39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40/content.xml><?xml version="1.0" encoding="utf-8"?>
<math xmlns="http://www.w3.org/1998/Math/MathML" display="block">
  <semantics>
    <mrow>
      <msub>
        <mi>E</mi>
        <mtext>photon​</mtext>
      </msub>
      <mo stretchy="false">=</mo>
      <mrow>
        <msub>
          <mi>E</mi>
          <mtext>initial</mtext>
        </msub>
        <mo stretchy="false">−</mo>
        <msub>
          <mi>E</mi>
          <mtext>final</mtext>
        </msub>
      </mrow>
    </mrow>
    <annotation encoding="StarMath 5.0">E_"photon​" = E_"initial" - E_"final"</annotation>
  </semantics>
</math>
</file>

<file path=Object 41/content.xml><?xml version="1.0" encoding="utf-8"?>
<math xmlns="http://www.w3.org/1998/Math/MathML" display="block">
  <semantics>
    <msub>
      <mi>E</mi>
      <mtext>photon</mtext>
    </msub>
    <annotation encoding="StarMath 5.0">E_"photon"</annotation>
  </semantics>
</math>
</file>

<file path=Object 42/content.xml><?xml version="1.0" encoding="utf-8"?>
<math xmlns="http://www.w3.org/1998/Math/MathML" display="block">
  <semantics>
    <msub>
      <mi>E</mi>
      <mtext>initial</mtext>
    </msub>
    <annotation encoding="StarMath 5.0">E_"initial"</annotation>
  </semantics>
</math>
</file>

<file path=Object 43/content.xml><?xml version="1.0" encoding="utf-8"?>
<math xmlns="http://www.w3.org/1998/Math/MathML" display="block">
  <semantics>
    <msub>
      <mi>E</mi>
      <mtext>final</mtext>
    </msub>
    <annotation encoding="StarMath 5.0">E_"final"</annotation>
  </semantics>
</math>
</file>
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Title">
      <style:text-properties officeooo:rsid="0025d6e5" officeooo:paragraph-rsid="0025d6e5"/>
    </style:style>
    <style:style style:name="P2" style:family="paragraph" style:parent-style-name="Text_20_body">
      <style:paragraph-properties fo:text-align="center" style:justify-single-word="false"/>
      <style:text-properties fo:font-style="normal" officeooo:rsid="001be25d" officeooo:paragraph-rsid="001be25d" style:font-style-asian="normal" style:font-style-complex="normal"/>
    </style:style>
    <style:style style:name="P3" style:family="paragraph" style:parent-style-name="Contents_20_1">
      <style:paragraph-properties>
        <style:tab-stops>
          <style:tab-stop style:position="6.9244in" style:type="right" style:leader-style="dotted" style:leader-text="."/>
        </style:tab-stops>
      </style:paragraph-properties>
    </style:style>
    <style:style style:name="P4" style:family="paragraph" style:parent-style-name="Text_20_body">
      <style:paragraph-properties fo:text-align="start" style:justify-single-word="false"/>
      <style:text-properties officeooo:paragraph-rsid="001be25d"/>
    </style:style>
    <style:style style:name="P5" style:family="paragraph" style:parent-style-name="Heading_20_1">
      <style:paragraph-properties fo:text-align="start" style:justify-single-word="false" fo:break-before="page"/>
      <style:text-properties officeooo:rsid="0025d6e5" officeooo:paragraph-rsid="0025d6e5"/>
    </style:style>
    <style:style style:name="P6" style:family="paragraph" style:parent-style-name="Text_20_body">
      <style:paragraph-properties fo:text-align="start" style:justify-single-word="false"/>
      <style:text-properties officeooo:rsid="0025d6e5" officeooo:paragraph-rsid="0025d6e5"/>
    </style:style>
    <style:style style:name="P7" style:family="paragraph" style:parent-style-name="Text_20_body">
      <style:paragraph-properties fo:text-align="start" style:justify-single-word="false"/>
      <style:text-properties fo:font-weight="normal" officeooo:rsid="00276c01" officeooo:paragraph-rsid="00276c01" style:font-weight-asian="normal" style:font-weight-complex="normal"/>
    </style:style>
    <style:style style:name="P8" style:family="paragraph" style:parent-style-name="Text_20_body">
      <style:paragraph-properties fo:text-align="start" style:justify-single-word="false"/>
      <style:text-properties officeooo:rsid="00276c01" officeooo:paragraph-rsid="00276c01"/>
    </style:style>
    <style:style style:name="P9" style:family="paragraph" style:parent-style-name="Heading_20_1">
      <style:text-properties officeooo:rsid="00285afd" officeooo:paragraph-rsid="00285afd"/>
    </style:style>
    <style:style style:name="P10" style:family="paragraph" style:parent-style-name="Text_20_body">
      <style:text-properties officeooo:rsid="00285afd" officeooo:paragraph-rsid="00285afd"/>
    </style:style>
    <style:style style:name="P11" style:family="paragraph" style:parent-style-name="Text_20_body">
      <style:text-properties fo:font-weight="normal" officeooo:rsid="00285afd" officeooo:paragraph-rsid="00285afd" style:font-weight-asian="normal" style:font-weight-complex="normal"/>
    </style:style>
    <style:style style:name="P12" style:family="paragraph" style:parent-style-name="Text_20_body">
      <style:text-properties fo:font-weight="normal" officeooo:rsid="002900b4" officeooo:paragraph-rsid="002900b4" style:font-weight-asian="normal" style:font-weight-complex="normal"/>
    </style:style>
    <style:style style:name="P13" style:family="paragraph" style:parent-style-name="Heading_20_1">
      <style:text-properties officeooo:rsid="002900b4" officeooo:paragraph-rsid="002900b4"/>
    </style:style>
    <style:style style:name="P14" style:family="paragraph" style:parent-style-name="Text_20_body">
      <style:text-properties officeooo:rsid="002900b4" officeooo:paragraph-rsid="002900b4"/>
    </style:style>
    <style:style style:name="P15" style:family="paragraph" style:parent-style-name="Text_20_body" style:list-style-name="L1">
      <style:text-properties officeooo:rsid="002900b4" officeooo:paragraph-rsid="002900b4"/>
    </style:style>
    <style:style style:name="T1" style:family="text">
      <style:text-properties officeooo:rsid="0025d6e5"/>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285afd" style:font-weight-asian="normal" style:font-weight-complex="normal"/>
    </style:style>
    <style:style style:name="T5" style:family="text">
      <style:text-properties officeooo:rsid="002d8efc"/>
    </style:style>
    <style:style style:name="T6" style:family="text">
      <style:text-properties fo:font-weight="bold" officeooo:rsid="002d8efc" style:font-weight-asian="bold" style:font-weight-complex="bold"/>
    </style:style>
    <style:style style:name="T7" style:family="text">
      <style:text-properties officeooo:rsid="002900b4"/>
    </style:style>
    <style:style style:name="T8" style:family="text">
      <style:text-properties officeooo:rsid="002c72b4"/>
    </style:style>
    <style:style style:name="T9" style:family="text">
      <style:text-properties officeooo:rsid="002a34c5"/>
    </style:style>
    <style:style style:name="T10" style:family="text">
      <style:text-properties officeooo:rsid="002b6705"/>
    </style:style>
    <style:style style:name="T11" style:family="text">
      <style:text-properties fo:font-weight="bold" officeooo:rsid="002a34c5" style:font-weight-asian="bold" style:font-weight-complex="bold"/>
    </style:style>
    <style:style style:name="T12" style:family="text">
      <style:text-properties fo:font-weight="normal" officeooo:rsid="002c72b4" style:font-weight-asian="normal" style:font-weight-complex="normal"/>
    </style:style>
    <style:style style:name="T13" style:family="text">
      <style:text-properties fo:font-weight="normal" officeooo:rsid="002a34c5" style:font-weight-asian="normal" style:font-weight-complex="normal"/>
    </style:style>
    <style:style style:name="T14" style:family="text">
      <style:text-properties fo:font-weight="normal" officeooo:rsid="002b6705" style:font-weight-asian="normal"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eface</text:p>
      <text:p text:style-name="P2"><text:span text:style-name="T1">June 19</text:span>, 202<text:span text:style-name="T1">6</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text:a xlink:type="simple" xlink:href="#__RefHeading___Toc67_3491985352" office:name="About This Guide" text:style-name="Index_20_Link" text:visited-style-name="Index_20_Link">About This Guide<text:tab/>2</text:a></text:p>
          <text:p text:style-name="P3"><text:a xlink:type="simple" xlink:href="#__RefHeading___Toc69_3491985352" office:name="The Cluster-Based Format" text:style-name="Index_20_Link" text:visited-style-name="Index_20_Link">The Cluster-Based Format<text:tab/>2</text:a></text:p>
          <text:p text:style-name="P3"><text:a xlink:type="simple" xlink:href="#__RefHeading___Toc71_3491985352" office:name="Guide Key" text:style-name="Index_20_Link" text:visited-style-name="Index_20_Link">Guide Key<text:tab/>2</text:a></text:p>
        </text:index-body>
      </text:table-of-content>
      <text:p text:style-name="P4"/>
      <text:h text:style-name="P5" text:outline-level="1"><text:bookmark-start text:name="__RefHeading___Toc67_3491985352"/>About This Guide<text:bookmark-end text:name="__RefHeading___Toc67_3491985352"/></text:h>
      <text:p text:style-name="P6">This guide to the <text:span text:style-name="T2">Regents Examination in Physical Science: Physics</text:span><text:span text:style-name="T3"> is designed to be as brief as possible while still serving as a well-crafted outline for the Physical Science: Physics course.</text:span></text:p>
      <text:p text:style-name="P7">This examination was administered for the first time on June 17, 2026 in many public high schools across New York State. However, due to the lack of adequate public resources available for practice, many students took the exam with only minimal knowledge of the format and relative difficulty of the questions. Furthermore, many educators reported that the course was difficult to adapt to, as they were also provided few details about which topics from the old <text:span text:style-name="T2">Regents Examination in Physical Setting / Physics</text:span> are excluded in the new course.</text:p>
      <text:p text:style-name="P8"><text:span text:style-name="T3">This guide hopes to bridge the gap between the old course and this new cluster-based examination. </text:span><text:span text:style-name="T4">It is created by a former student who took this course in the 2025–2026 term and has firsthand experience and knowledge about the topics included in this course.</text:span></text:p>
      <text:h text:style-name="P9" text:outline-level="1"><text:bookmark-start text:name="__RefHeading___Toc69_3491985352"/>The Cluster-Based Format<text:bookmark-end text:name="__RefHeading___Toc69_3491985352"/></text:h>
      <text:p text:style-name="P10">The new Regents Examination in Physical Science: Physics is organized in a <text:span text:style-name="T2">cluster-based format</text:span><text:span text:style-name="T3">, and the exam length may vary throughout the years. This new format tests students more on critical thinking and connection skills rather than straightforward concept recall abilites.</text:span></text:p>
      <text:p text:style-name="P10"><text:span text:style-name="T3">Each cluster is a set of around </text:span><text:span text:style-name="T2">five questions</text:span><text:span text:style-name="T3">, each of which are based on a central theme or real-world scenario. A large portion of the exam is still multiple-choice questions; however, short-answer and free-response questions are more complex and may require combining ideas from multiple topics or concepts.</text:span></text:p>
      <text:p text:style-name="P11">The test is heavy in argument-based questions, which usually ask students to <text:span text:style-name="T2">support or refute a claim</text:span> and provide <text:span text:style-name="T2">evidence</text:span> and <text:span text:style-name="T2">reasoning</text:span> to justify their response. To justify their response, a student would usually be required to demonstrate their understanding by creating a <text:span text:style-name="T2">mathematical model</text:span>, <text:span text:style-name="T5">a </text:span><text:span text:style-name="T6">drawing</text:span><text:span text:style-name="T5">,</text:span> or <text:span text:style-name="T7">explaining, in full sentences, evidence that clearly supports or refutes the given claim.</text:span></text:p>
      <text:p text:style-name="P12">Additionally, each question may build upon previously mentioned ideas by incorporating new diagrams or texts. Oftentimes, not all of the information provided may be used.</text:p>
      <text:h text:style-name="P13" text:outline-level="1"><text:bookmark-start text:name="__RefHeading___Toc71_3491985352"/>Guide Key<text:bookmark-end text:name="__RefHeading___Toc71_3491985352"/></text:h>
      <text:p text:style-name="P14">The following symbols may be used throughout this guide to indicate certain ideas:</text:p>
      <text:list text:style-name="L1">
        <text:list-item>
          <text:p text:style-name="P15"><text:span text:style-name="T2">Asterisk (*)</text:span>: The idea or topic <text:span text:style-name="T8">(</text:span><text:span text:style-name="T9">and its subtopics</text:span><text:span text:style-name="T8">) </text:span><text:span text:style-name="T10">were</text:span> included in the old Physical Setting / Physics course but not in the new Physical Science: Physics course.</text:p>
        </text:list-item>
        <text:list-item>
          <text:p text:style-name="P15"><text:span text:style-name="T11">Double Asterisk (**)</text:span><text:span text:style-name="T3">: The idea or topic </text:span><text:span text:style-name="T12">(</text:span><text:span text:style-name="T13">and its subtopics</text:span><text:span text:style-name="T12">) </text:span><text:span text:style-name="T14">are</text:span><text:span text:style-name="T3"> a major aspect </text:span><text:span text:style-name="T13">of</text:span><text:span text:style-name="T3"> the new Physical Science: Physics course.</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15T21:16:42.494352298</meta:creation-date>
    <dc:date>2026-06-19T23:29:15.166555491</dc:date>
    <meta:editing-duration>PT1H9M1S</meta:editing-duration>
    <meta:editing-cycles>17</meta:editing-cycles>
    <meta:generator>LibreOffice/25.8.5.2$Linux_X86_64 LibreOffice_project/580$Build-2</meta:generator>
    <meta:document-statistic meta:table-count="0" meta:image-count="0" meta:object-count="0" meta:page-count="2" meta:paragraph-count="19" meta:word-count="431" meta:character-count="2666" meta:non-whitespace-character-count="2257"/>
  </office:meta>
</office:document-meta>
</file>
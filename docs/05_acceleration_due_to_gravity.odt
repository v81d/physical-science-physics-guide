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styles.xml" manifest:media-type="text/xml"/>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12bea8d" officeooo:paragraph-rsid="012bea8d"/>
    </style:style>
    <style:style style:name="P2" style:family="paragraph" style:parent-style-name="Text_20_body">
      <style:paragraph-properties fo:text-align="center" style:justify-single-word="false"/>
      <style:text-properties fo:font-style="normal" officeooo:rsid="0123fc99" officeooo:paragraph-rsid="0123fc99"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text-properties officeooo:rsid="004c7a21" officeooo:paragraph-rsid="004c7a21"/>
    </style:style>
    <style:style style:name="P6" style:family="paragraph" style:parent-style-name="Heading_20_1">
      <style:paragraph-properties fo:break-before="page"/>
      <style:text-properties officeooo:rsid="012bea8d" officeooo:paragraph-rsid="012bea8d"/>
    </style:style>
    <style:style style:name="P7" style:family="paragraph" style:parent-style-name="Text_20_body">
      <style:text-properties fo:font-weight="bold" officeooo:rsid="012bea8d" officeooo:paragraph-rsid="012bea8d" style:font-weight-asian="bold" style:font-weight-complex="bold"/>
    </style:style>
    <style:style style:name="P8" style:family="paragraph" style:parent-style-name="Heading_20_1">
      <style:text-properties officeooo:rsid="012bea8d" officeooo:paragraph-rsid="012bea8d"/>
    </style:style>
    <style:style style:name="P9" style:family="paragraph" style:parent-style-name="Text_20_body">
      <style:text-properties officeooo:rsid="012bea8d" officeooo:paragraph-rsid="012bea8d"/>
    </style:style>
    <style:style style:name="P10" style:family="paragraph" style:parent-style-name="Heading_20_2">
      <style:text-properties officeooo:rsid="012bea8d" officeooo:paragraph-rsid="012bea8d"/>
    </style:style>
    <style:style style:name="P11" style:family="paragraph" style:parent-style-name="Text_20_body" style:list-style-name="L1">
      <style:text-properties officeooo:rsid="012bea8d" officeooo:paragraph-rsid="012bea8d"/>
    </style:style>
    <style:style style:name="P12" style:family="paragraph" style:parent-style-name="Text_20_body" style:list-style-name="L1">
      <style:text-properties fo:font-weight="normal" officeooo:rsid="012bea8d" officeooo:paragraph-rsid="012bea8d" style:font-weight-asian="normal" style:font-weight-complex="normal"/>
    </style:style>
    <style:style style:name="P13" style:family="paragraph" style:parent-style-name="Text_20_body" style:list-style-name="L2">
      <style:text-properties fo:font-weight="bold" officeooo:rsid="012bea8d" officeooo:paragraph-rsid="012bea8d" style:font-weight-asian="bold" style:font-weight-complex="bold"/>
    </style:style>
    <style:style style:name="P14" style:family="paragraph" style:parent-style-name="Heading_20_1">
      <style:text-properties officeooo:rsid="012c81a0" officeooo:paragraph-rsid="012c81a0"/>
    </style:style>
    <style:style style:name="P15" style:family="paragraph" style:parent-style-name="Text_20_body" style:list-style-name="L3">
      <style:text-properties officeooo:rsid="012c81a0" officeooo:paragraph-rsid="012c81a0"/>
    </style:style>
    <style:style style:name="P16" style:family="paragraph" style:parent-style-name="Text_20_body" style:list-style-name="L3">
      <style:paragraph-properties fo:text-align="center" style:justify-single-word="false"/>
      <style:text-properties officeooo:rsid="012c81a0" officeooo:paragraph-rsid="012c81a0"/>
    </style:style>
    <style:style style:name="P17" style:family="paragraph" style:parent-style-name="Text_20_body" style:list-style-name="L3">
      <style:paragraph-properties fo:text-align="start" style:justify-single-word="false"/>
      <style:text-properties officeooo:rsid="012e66db" officeooo:paragraph-rsid="012e66db"/>
    </style:style>
    <style:style style:name="P18" style:family="paragraph" style:parent-style-name="Text_20_body" style:list-style-name="L3">
      <style:paragraph-properties fo:text-align="center" style:justify-single-word="false"/>
      <style:text-properties officeooo:rsid="012e66db" officeooo:paragraph-rsid="012e66db"/>
    </style:style>
    <style:style style:name="P19" style:family="paragraph" style:parent-style-name="Text_20_body" style:list-style-name="L3">
      <style:paragraph-properties fo:text-align="start" style:justify-single-word="false"/>
      <style:text-properties officeooo:rsid="012e66db" officeooo:paragraph-rsid="012eaed1"/>
    </style:style>
    <style:style style:name="P20" style:family="paragraph" style:parent-style-name="Text_20_body" style:list-style-name="L3">
      <style:paragraph-properties fo:text-align="center" style:justify-single-word="false"/>
      <style:text-properties officeooo:rsid="012eaed1" officeooo:paragraph-rsid="012eaed1"/>
    </style:style>
    <style:style style:name="T1" style:family="text">
      <style:text-properties officeooo:rsid="01320335"/>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eleration Due to Gravity<text:bookmark-start text:name="__DdeLink__502_3041763869"/><text:bookmark-start text:name="__DdeLink__138_391587487"/></text:p>
      <text:p text:style-name="P2">October 8,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1794_207463880" office:name="What Is Acceleration Due to Gravity?" text:style-name="Index_20_Link" text:visited-style-name="Index_20_Link">What Is Acceleration Due to Gravity?<text:tab/>2</text:a></text:p>
          <text:p text:style-name="P3"><text:a xlink:type="simple" xlink:href="#__RefHeading___Toc1796_207463880" office:name="Objects in Free Fall" text:style-name="Index_20_Link" text:visited-style-name="Index_20_Link">Objects in Free Fall<text:tab/>2</text:a></text:p>
          <text:p text:style-name="P4"><text:a xlink:type="simple" xlink:href="#__RefHeading___Toc1798_207463880" office:name="Free Fall Concepts" text:style-name="Index_20_Link" text:visited-style-name="Index_20_Link">Free Fall Concepts<text:tab/>2</text:a></text:p>
          <text:p text:style-name="P4"><text:a xlink:type="simple" xlink:href="#__RefHeading___Toc1800_207463880" office:name="Acceleration Due to Gravity" text:style-name="Index_20_Link" text:visited-style-name="Index_20_Link">Acceleration Due to Gravity<text:tab/>2</text:a></text:p>
          <text:p text:style-name="P3"><text:a xlink:type="simple" xlink:href="#__RefHeading___Toc1802_207463880" office:name="Objects Thrown Up" text:style-name="Index_20_Link" text:visited-style-name="Index_20_Link">Objects Thrown Up<text:tab/>2</text:a></text:p>
          <text:p text:style-name="P3"><text:a xlink:type="simple" xlink:href="#__RefHeading___Toc1804_207463880" office:name="Examples and Applications" text:style-name="Index_20_Link" text:visited-style-name="Index_20_Link">Examples and Applications<text:tab/>3</text:a></text:p>
        </text:index-body>
      </text:table-of-content>
      <text:h text:style-name="P5" text:outline-level="1"><text:bookmark-start text:name="__RefHeading___Toc627_4069653955"/>­<text:bookmark-end text:name="__RefHeading___Toc627_4069653955"/></text:h>
      <text:h text:style-name="P6" text:outline-level="1"><text:bookmark-end text:name="__DdeLink__502_3041763869"/><text:bookmark-end text:name="__DdeLink__138_391587487"/><text:bookmark-start text:name="__RefHeading___Toc1794_207463880"/>What <text:span text:style-name="T1">I</text:span>s Acceleration Due to Gravity?<text:bookmark-end text:name="__RefHeading___Toc1794_207463880"/></text:h>
      <text:p text:style-name="P7">Gravity<text:span text:style-name="T2"> has an effect on an object’s acceleration. Near Earth’s surface, the </text:span>acceleration due to gravity<text:span text:style-name="T2"> is approximately </text:span><text:span text:style-name="T2"><draw:frame draw:style-name="fr1" draw:name="Object6" text:anchor-type="as-char" svg:y="-0.1728in" svg:width="0.5661in" svg:height="0.2091in" draw:z-index="0"><draw:object xlink:href="./Object 6" xlink:type="simple" xlink:show="embed" xlink:actuate="onLoad"/><draw:image xlink:href="./ObjectReplacements/Object 6" xlink:type="simple" xlink:show="embed" xlink:actuate="onLoad"/></draw:frame></text:span><text:span text:style-name="T2">.</text:span></text:p>
      <text:h text:style-name="P8" text:outline-level="1"><text:bookmark-start text:name="__RefHeading___Toc1796_207463880"/>Objects in Free Fall<text:bookmark-end text:name="__RefHeading___Toc1796_207463880"/></text:h>
      <text:p text:style-name="P9">Objects that are in <text:span text:style-name="T3">free fall</text:span><text:span text:style-name="T2"> are only affected by gravity and are not influenced by </text:span><text:span text:style-name="T3">air resistance</text:span><text:span text:style-name="T2">. In practice, perfect free fall does not truly exist in real life, as there is always some amount of force acting on any object in space.</text:span></text:p>
      <text:h text:style-name="P10" text:outline-level="2"><text:bookmark-start text:name="__RefHeading___Toc1798_207463880"/>Free Fall Concepts<text:bookmark-end text:name="__RefHeading___Toc1798_207463880"/></text:h>
      <text:list text:style-name="L1">
        <text:list-item>
          <text:p text:style-name="P11">A <text:span text:style-name="T3">vacuum</text:span><text:span text:style-name="T2"> is a region of empty space where no external matter or air resistance exists. In a vacuum, a boulder and a feather would fall at the same rate despite having different masses.</text:span></text:p>
        </text:list-item>
        <text:list-item>
          <text:p text:style-name="P12">Gravity is the force between the mass of Earth and the mass of any object in Earth’s vicinity. It is a <text:span text:style-name="T3">vector quantity</text:span>. The acceleration due to gravity near Earth’s surface, for example, is <draw:frame draw:style-name="fr1" draw:name="Object7" text:anchor-type="as-char" svg:y="-0.1728in" svg:width="0.5661in" svg:height="0.2091in" draw:z-index="1"><draw:object xlink:href="./Object 7" xlink:type="simple" xlink:show="embed" xlink:actuate="onLoad"/><draw:image xlink:href="./ObjectReplacements/Object 7" xlink:type="simple" xlink:show="embed" xlink:actuate="onLoad"/></draw:frame>.</text:p>
        </text:list-item>
        <text:list-item>
          <text:p text:style-name="P12">Free fall is the ideal falling motion of an object acted upon by only the force of gravity. An object in free fall ignores air resistance.</text:p>
        </text:list-item>
        <text:list-item>
          <text:p text:style-name="P12">Air resistance is a type of <text:span text:style-name="T3">friction</text:span> that restricts the velocity of objects due to their <text:span text:style-name="T3">aerodynamic properties</text:span>.</text:p>
        </text:list-item>
      </text:list>
      <text:h text:style-name="P10" text:outline-level="2"><text:bookmark-start text:name="__RefHeading___Toc1800_207463880"/>Acceleration Due to Gravity<text:bookmark-end text:name="__RefHeading___Toc1800_207463880"/></text:h>
      <text:p text:style-name="P9">If one were to travel to a different celestial body or somewhere high above Earth’s surface, the acceleration due to gravity at their position would be different than near the surface of the Earth. For instance:</text:p>
      <text:list text:style-name="L2">
        <text:list-item>
          <text:p text:style-name="P13">Near the Surface of Mars<text:span text:style-name="T2">: </text:span><text:span text:style-name="T2"><draw:frame draw:style-name="fr1" draw:name="Object8" text:anchor-type="as-char" svg:y="-0.1728in" svg:width="0.8028in" svg:height="0.2091in" draw:z-index="2"><draw:object xlink:href="./Object 8" xlink:type="simple" xlink:show="embed" xlink:actuate="onLoad"/><draw:image xlink:href="./ObjectReplacements/Object 8" xlink:type="simple" xlink:show="embed" xlink:actuate="onLoad"/></draw:frame></text:span></text:p>
        </text:list-item>
        <text:list-item>
          <text:p text:style-name="P13">Near the Surface of the Moon<text:span text:style-name="T2">: </text:span><text:span text:style-name="T2"><draw:frame draw:style-name="fr1" draw:name="Object9" text:anchor-type="as-char" svg:y="-0.1728in" svg:width="0.8035in" svg:height="0.2091in" draw:z-index="3"><draw:object xlink:href="./Object 9" xlink:type="simple" xlink:show="embed" xlink:actuate="onLoad"/><draw:image xlink:href="./ObjectReplacements/Object 9" xlink:type="simple" xlink:show="embed" xlink:actuate="onLoad"/></draw:frame></text:span></text:p>
        </text:list-item>
        <text:list-item>
          <text:p text:style-name="P13">On the Summit of Mt. Everest<text:span text:style-name="T2">: </text:span><text:span text:style-name="T2"><draw:frame draw:style-name="fr1" draw:name="Object10" text:anchor-type="as-char" svg:y="-0.1728in" svg:width="0.8902in" svg:height="0.2091in" draw:z-index="4"><draw:object xlink:href="./Object 10" xlink:type="simple" xlink:show="embed" xlink:actuate="onLoad"/><draw:image xlink:href="./ObjectReplacements/Object 10" xlink:type="simple" xlink:show="embed" xlink:actuate="onLoad"/></draw:frame></text:span></text:p>
        </text:list-item>
      </text:list>
      <text:h text:style-name="P8" text:outline-level="1"><text:bookmark-start text:name="__RefHeading___Toc1802_207463880"/>Objects Thrown Up<text:bookmark-end text:name="__RefHeading___Toc1802_207463880"/></text:h>
      <text:p text:style-name="P9">When an object is <text:span text:style-name="T3">thrown up</text:span><text:span text:style-name="T2">, its acceleration is still constant. However, it points in the direction opposite to the object’s upward direction. Thus, the object slows down until it reaches its highest point, at which its velocity is </text:span><text:span text:style-name="T3">zero</text:span><text:span text:style-name="T2">. The object’s upward motion is </text:span><text:span text:style-name="T3">symmetrical</text:span><text:span text:style-name="T2"> to its downward motion.</text:span></text:p>
      <text:h text:style-name="P14" text:outline-level="1"><text:bookmark-start text:name="__RefHeading___Toc1804_207463880"/><text:soft-page-break/>Examples and Applications<text:bookmark-end text:name="__RefHeading___Toc1804_207463880"/></text:h>
      <text:list text:style-name="L3">
        <text:list-item>
          <text:p text:style-name="P15"><text:bookmark-start text:name="__DdeLink__1540_207463880"/>In July 2024, <draw:frame draw:style-name="fr1" draw:name="Object1" text:anchor-type="as-char" svg:y="-0.1492in" svg:width="0.1693in" svg:height="0.1854in" draw:z-index="6"><draw:object xlink:href="./Object 1" xlink:type="simple" xlink:show="embed" xlink:actuate="onLoad"/><draw:image xlink:href="./ObjectReplacements/Object 1" xlink:type="simple" xlink:show="embed" xlink:actuate="onLoad"/></draw:frame>-kilogram Yaroslava Mahuchikh from Ukraine set the world record of <draw:frame draw:style-name="fr1" draw:name="Object2" text:anchor-type="as-char" svg:y="-0.1492in" svg:width="0.2957in" svg:height="0.1854in" draw:z-index="7"><draw:object xlink:href="./Object 2" xlink:type="simple" xlink:show="embed" xlink:actuate="onLoad"/><draw:image xlink:href="./ObjectReplacements/Object 2" xlink:type="simple" xlink:show="embed" xlink:actuate="onLoad"/></draw:frame><text:s/>meters in the women’s high jump at the Paris Diamond League.</text:p>
          <text:list>
            <text:list-item>
              <text:p text:style-name="P15">Calculate the initial vertical velocity needed for a <draw:frame draw:style-name="fr1" draw:name="Object3" text:anchor-type="as-char" svg:y="-0.1492in" svg:width="0.211in" svg:height="0.1854in" draw:z-index="5"><draw:object xlink:href="./Object 3" xlink:type="simple" xlink:show="embed" xlink:actuate="onLoad"/><draw:image xlink:href="./ObjectReplacements/Object 3" xlink:type="simple" xlink:show="embed" xlink:actuate="onLoad"/></draw:frame>-kilogram mass to travel from the ground to the same height as Yaroslava Mahuchikh in her record-setting high jump.</text:p>
              <text:p text:style-name="P16"><draw:frame draw:style-name="fr1" draw:name="Object4" text:anchor-type="as-char" svg:y="-0.6047in" svg:width="2.4673in" svg:height="1.1772in" draw:z-index="8"><draw:object xlink:href="./Object 4" xlink:type="simple" xlink:show="embed" xlink:actuate="onLoad"/><draw:image xlink:href="./ObjectReplacements/Object 4" xlink:type="simple" xlink:show="embed" xlink:actuate="onLoad"/></draw:frame></text:p>
            </text:list-item>
            <text:list-item>
              <text:p text:style-name="P17"><text:bookmark-end text:name="__DdeLink__1540_207463880"/><text:bookmark-start text:name="__DdeLink__1542_207463880"/>If another athlete jumps with the same takeoff speed but on the Moon where <draw:frame draw:style-name="fr1" draw:name="Object5" text:anchor-type="as-char" svg:y="-0.1728in" svg:width="0.8008in" svg:height="0.2091in" draw:z-index="9"><draw:object xlink:href="./Object 5" xlink:type="simple" xlink:show="embed" xlink:actuate="onLoad"/><draw:image xlink:href="./ObjectReplacements/Object 5" xlink:type="simple" xlink:show="embed" xlink:actuate="onLoad"/></draw:frame>, how long would it take for the athlete to return to the ground?<text:bookmark-end text:name="__DdeLink__1542_207463880"/></text:p>
              <text:p text:style-name="P18"><draw:frame draw:style-name="fr1" draw:name="Object11" text:anchor-type="as-char" svg:y="-0.4598in" svg:width="2.0484in" svg:height="0.8618in" draw:z-index="10"><draw:object xlink:href="./Object 11" xlink:type="simple" xlink:show="embed" xlink:actuate="onLoad"/><draw:image xlink:href="./ObjectReplacements/Object 11" xlink:type="simple" xlink:show="embed" xlink:actuate="onLoad"/></draw:frame></text:p>
              <text:p text:style-name="P18">The time it takes for the athlete to reach their highest point in the jump is approximately <draw:frame draw:style-name="fr1" draw:name="Object12" text:anchor-type="as-char" svg:y="-0.1492in" svg:width="0.3035in" svg:height="0.1854in" draw:z-index="11"><draw:object xlink:href="./Object 12" xlink:type="simple" xlink:show="embed" xlink:actuate="onLoad"/><draw:image xlink:href="./ObjectReplacements/Object 12" xlink:type="simple" xlink:show="embed" xlink:actuate="onLoad"/></draw:frame>. To calculate the time it takes for the athlete to land, we can double the time because the athlete’s upward motion is symmetrical to their downward motion.</text:p>
              <text:p text:style-name="P18"><draw:frame draw:style-name="fr1" draw:name="Object13" text:anchor-type="as-char" svg:y="-0.3228in" svg:width="0.7807in" svg:height="0.5874in" draw:z-index="12"><draw:object xlink:href="./Object 13" xlink:type="simple" xlink:show="embed" xlink:actuate="onLoad"/><draw:image xlink:href="./ObjectReplacements/Object 13" xlink:type="simple" xlink:show="embed" xlink:actuate="onLoad"/></draw:frame></text:p>
            </text:list-item>
          </text:list>
        </text:list-item>
        <text:list-item>
          <text:p text:style-name="P19">A <draw:frame draw:style-name="fr1" draw:name="Object14" text:anchor-type="as-char" svg:y="-0.1492in" svg:width="0.1693in" svg:height="0.1854in" draw:z-index="14"><draw:object xlink:href="./Object 14" xlink:type="simple" xlink:show="embed" xlink:actuate="onLoad"/><draw:image xlink:href="./ObjectReplacements/Object 14" xlink:type="simple" xlink:show="embed" xlink:actuate="onLoad"/></draw:frame>-kilogram athlete and a <draw:frame draw:style-name="fr1" draw:name="Object15" text:anchor-type="as-char" svg:y="-0.1492in" svg:width="0.1693in" svg:height="0.1854in" draw:z-index="15"><draw:object xlink:href="./Object 15" xlink:type="simple" xlink:show="embed" xlink:actuate="onLoad"/><draw:image xlink:href="./ObjectReplacements/Object 15" xlink:type="simple" xlink:show="embed" xlink:actuate="onLoad"/></draw:frame>-kilogram athlete jump with the same initial velocity. Which athlete reaches a higher maximum height?</text:p>
          <text:p text:style-name="P20">Both athletes reach the same maximum height. As suggested by the kinematic equation <draw:frame draw:style-name="fr1" draw:name="Object16" text:anchor-type="as-char" svg:y="-0.1728in" svg:width="0.8201in" svg:height="0.2339in" draw:z-index="13"><draw:object xlink:href="./Object 16" xlink:type="simple" xlink:show="embed" xlink:actuate="onLoad"/><draw:image xlink:href="./ObjectReplacements/Object 16" xlink:type="simple" xlink:show="embed" xlink:actuate="onLoad"/></draw:frame>, distance (maximum height) is not affected by mass. Since both athletes are on the same surface, their acceleration due to gravity is the same. Additionally, both athletes reach their maximum height at a final velocity of zero. Since all variables are the same in both equations, both athletes will reach the same distanc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104c094"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09T20:52:45.477907815</dc:date>
    <meta:editing-duration>P1DT37M56S</meta:editing-duration>
    <meta:editing-cycles>197</meta:editing-cycles>
    <meta:generator>LibreOffice/25.8.5.2$Linux_X86_64 LibreOffice_project/580$Build-2</meta:generator>
    <meta:document-statistic meta:table-count="0" meta:image-count="0" meta:object-count="16" meta:page-count="3" meta:paragraph-count="37" meta:word-count="566" meta:character-count="3196" meta:non-whitespace-character-count="2671"/>
  </office:meta>
</office:document-meta>
</file>

<file path=Object 1/content.xml><?xml version="1.0" encoding="utf-8"?>
<math xmlns="http://www.w3.org/1998/Math/MathML" display="block">
  <semantics>
    <mn>55</mn>
    <annotation encoding="StarMath 5.0">55</annotation>
  </semantics>
</math>
</file>

<file path=Object 10/content.xml><?xml version="1.0" encoding="utf-8"?>
<math xmlns="http://www.w3.org/1998/Math/MathML" display="block">
  <semantics>
    <mrow>
      <mrow>
        <mi>g</mi>
        <mo stretchy="false">≈</mo>
        <mn>9.76</mn>
      </mrow>
      <mrow>
        <mtext>m</mtext>
        <mo stretchy="false">/</mo>
        <msup>
          <mtext>s</mtext>
          <mn>2</mn>
        </msup>
      </mrow>
    </mrow>
    <annotation encoding="StarMath 5.0">g approx 9.76 "m" / "s"^2</annotation>
  </semantics>
</math>
</file>

<file path=Object 11/content.xml><?xml version="1.0" encoding="utf-8"?>
<math xmlns="http://www.w3.org/1998/Math/MathML" display="block">
  <semantics>
    <mtable>
      <mtr>
        <mtd>
          <mrow>
            <msub>
              <mi>v</mi>
              <mi>f</mi>
            </msub>
            <mo stretchy="false">=</mo>
            <mrow>
              <msub>
                <mi>v</mi>
                <mi>i</mi>
              </msub>
              <mo stretchy="false">+</mo>
              <mi mathvariant="italic">at</mi>
            </mrow>
          </mrow>
        </mtd>
      </mtr>
      <mtr>
        <mtd>
          <mrow>
            <mn>0</mn>
            <mrow>
              <mrow>
                <mtext>m</mtext>
                <mo stretchy="false">/</mo>
                <mtext>s</mtext>
              </mrow>
              <mo stretchy="false">=</mo>
              <mn>6.4</mn>
            </mrow>
            <mrow>
              <mrow>
                <mtext>m</mtext>
                <mo stretchy="false">/</mo>
                <mtext>s</mtext>
              </mrow>
              <mo stretchy="false">+</mo>
              <mrow>
                <mo fence="true" form="prefix" stretchy="false">(</mo>
                <mrow>
                  <mrow>
                    <mrow>
                      <mo stretchy="false">−</mo>
                      <mn>1.6</mn>
                    </mrow>
                    <mrow>
                      <mtext>m</mtext>
                      <mo stretchy="false">/</mo>
                      <msup>
                        <mtext>s</mtext>
                        <mn>2</mn>
                      </msup>
                    </mrow>
                  </mrow>
                </mrow>
                <mo fence="true" form="postfix" stretchy="false">)</mo>
              </mrow>
            </mrow>
            <mi>t</mi>
          </mrow>
        </mtd>
      </mtr>
      <mtr>
        <mtd>
          <mrow>
            <mrow>
              <mo stretchy="false">−</mo>
              <mn>6.4</mn>
            </mrow>
            <mrow>
              <mrow>
                <mtext>m</mtext>
                <mo stretchy="false">/</mo>
                <mtext>s</mtext>
              </mrow>
              <mo stretchy="false">=</mo>
              <mrow>
                <mo fence="true" form="prefix" stretchy="false">(</mo>
                <mrow>
                  <mrow>
                    <mrow>
                      <mo stretchy="false">−</mo>
                      <mn>1.6</mn>
                    </mrow>
                    <mrow>
                      <mtext>m</mtext>
                      <mo stretchy="false">/</mo>
                      <msup>
                        <mtext>s</mtext>
                        <mn>2</mn>
                      </msup>
                    </mrow>
                  </mrow>
                </mrow>
                <mo fence="true" form="postfix" stretchy="false">)</mo>
              </mrow>
            </mrow>
            <mi>t</mi>
          </mrow>
        </mtd>
      </mtr>
      <mtr>
        <mtd>
          <mrow>
            <mrow>
              <mi>t</mi>
              <mo stretchy="false">=</mo>
              <mn>4.0</mn>
            </mrow>
            <mtext>s</mtext>
          </mrow>
        </mtd>
      </mtr>
    </mtable>
    <annotation encoding="StarMath 5.0">v_f = v_i + at newline
0 "m" / "s" = 6.4 "m" / "s" + ( -1.6 "m" / "s"^2 ) t newline
-6.4 "m" / "s" = ( -1.6 "m" / "s"^2 ) t newline
t = 4.0 "s"</annotation>
  </semantics>
</math>
</file>

<file path=Object 12/content.xml><?xml version="1.0" encoding="utf-8"?>
<math xmlns="http://www.w3.org/1998/Math/MathML" display="block">
  <semantics>
    <mrow>
      <mn>4.0</mn>
      <mtext>s</mtext>
    </mrow>
    <annotation encoding="StarMath 5.0">4.0 "s"</annotation>
  </semantics>
</math>
</file>

<file path=Object 13/content.xml><?xml version="1.0" encoding="utf-8"?>
<math xmlns="http://www.w3.org/1998/Math/MathML" display="block">
  <semantics>
    <mtable>
      <mtr>
        <mtd>
          <mrow>
            <mrow>
              <mi>T</mi>
              <mo stretchy="false">=</mo>
              <mn>2</mn>
            </mrow>
            <mi>t</mi>
          </mrow>
        </mtd>
      </mtr>
      <mtr>
        <mtd>
          <mrow>
            <mrow>
              <mi>T</mi>
              <mo stretchy="false">=</mo>
              <mn>2</mn>
            </mrow>
            <mrow>
              <mo fence="true" form="prefix" stretchy="false">(</mo>
              <mrow>
                <mrow>
                  <mn>4.0</mn>
                  <mtext>s</mtext>
                </mrow>
              </mrow>
              <mo fence="true" form="postfix" stretchy="false">)</mo>
            </mrow>
          </mrow>
        </mtd>
      </mtr>
      <mtr>
        <mtd>
          <mrow>
            <mrow>
              <mi>T</mi>
              <mo stretchy="false">=</mo>
              <mn>8.0</mn>
            </mrow>
            <mtext>s</mtext>
          </mrow>
        </mtd>
      </mtr>
    </mtable>
    <annotation encoding="StarMath 5.0">T = 2t newline
T = 2 ( 4.0 "s" ) newline
T = 8.0 "s"</annotation>
  </semantics>
</math>
</file>

<file path=Object 14/content.xml><?xml version="1.0" encoding="utf-8"?>
<math xmlns="http://www.w3.org/1998/Math/MathML" display="block">
  <semantics>
    <mn>55</mn>
    <annotation encoding="StarMath 5.0">55</annotation>
  </semantics>
</math>
</file>

<file path=Object 15/content.xml><?xml version="1.0" encoding="utf-8"?>
<math xmlns="http://www.w3.org/1998/Math/MathML" display="block">
  <semantics>
    <mn>75</mn>
    <annotation encoding="StarMath 5.0">75</annotation>
  </semantics>
</math>
</file>

<file path=Object 16/content.xml><?xml version="1.0" encoding="utf-8"?>
<math xmlns="http://www.w3.org/1998/Math/MathML" display="block">
  <semantics>
    <mrow>
      <mrow>
        <msubsup>
          <mi>v</mi>
          <mi>f</mi>
          <mn>2</mn>
        </msubsup>
        <mo stretchy="false">=</mo>
        <mrow>
          <msubsup>
            <mi>v</mi>
            <mi>i</mi>
            <mn>2</mn>
          </msubsup>
          <mo stretchy="false">+</mo>
          <mn>2</mn>
        </mrow>
      </mrow>
      <mi mathvariant="italic">ad</mi>
    </mrow>
    <annotation encoding="StarMath 5.0">v_f^2 = v_i^2 + 2ad</annotation>
  </semantics>
</math>
</file>

<file path=Object 2/content.xml><?xml version="1.0" encoding="utf-8"?>
<math xmlns="http://www.w3.org/1998/Math/MathML" display="block">
  <semantics>
    <mn>2.10</mn>
    <annotation encoding="StarMath 5.0">2.10</annotation>
  </semantics>
</math>
</file>

<file path=Object 3/content.xml><?xml version="1.0" encoding="utf-8"?>
<math xmlns="http://www.w3.org/1998/Math/MathML" display="block">
  <semantics>
    <mn>5.0</mn>
    <annotation encoding="StarMath 5.0">5.0</annotation>
  </semantics>
</math>
</file>

<file path=Object 4/content.xml><?xml version="1.0" encoding="utf-8"?>
<math xmlns="http://www.w3.org/1998/Math/MathML" display="block">
  <semantics>
    <mtable>
      <mtr>
        <mtd>
          <mrow>
            <mrow>
              <msubsup>
                <mi>v</mi>
                <mi>f</mi>
                <mn>2</mn>
              </msubsup>
              <mo stretchy="false">=</mo>
              <mrow>
                <msubsup>
                  <mi>v</mi>
                  <mi>i</mi>
                  <mn>2</mn>
                </msubsup>
                <mo stretchy="false">+</mo>
                <mn>2</mn>
              </mrow>
            </mrow>
            <mi mathvariant="italic">ad</mi>
          </mrow>
        </mtd>
      </mtr>
      <mtr>
        <mtd>
          <mrow>
            <mrow>
              <msup>
                <mrow>
                  <mo fence="true" form="prefix" stretchy="false">(</mo>
                  <mrow>
                    <mrow>
                      <mn>0</mn>
                      <mrow>
                        <mtext>m</mtext>
                        <mo stretchy="false">/</mo>
                        <mtext>s</mtext>
                      </mrow>
                    </mrow>
                  </mrow>
                  <mo fence="true" form="postfix" stretchy="false">)</mo>
                </mrow>
                <mn>2</mn>
              </msup>
              <mo stretchy="false">=</mo>
              <mrow>
                <msubsup>
                  <mi>v</mi>
                  <mi>i</mi>
                  <mn>2</mn>
                </msubsup>
                <mo stretchy="false">+</mo>
                <mn>2</mn>
              </mrow>
            </mrow>
            <mrow>
              <mo fence="true" form="prefix" stretchy="false">(</mo>
              <mrow>
                <mrow>
                  <mrow>
                    <mo stretchy="false">−</mo>
                    <mn>9.8</mn>
                  </mrow>
                  <mrow>
                    <mtext>m</mtext>
                    <mo stretchy="false">/</mo>
                    <msup>
                      <mtext>s</mtext>
                      <mn>2</mn>
                    </msup>
                  </mrow>
                </mrow>
              </mrow>
              <mo fence="true" form="postfix" stretchy="false">)</mo>
            </mrow>
            <mrow>
              <mo fence="true" form="prefix" stretchy="false">(</mo>
              <mrow>
                <mrow>
                  <mn>2.10</mn>
                  <mtext>m</mtext>
                </mrow>
              </mrow>
              <mo fence="true" form="postfix" stretchy="false">)</mo>
            </mrow>
          </mrow>
        </mtd>
      </mtr>
      <mtr>
        <mtd>
          <mrow>
            <mn>0</mn>
            <mrow>
              <mrow>
                <msup>
                  <mtext>m</mtext>
                  <mn>2</mn>
                </msup>
                <mo stretchy="false">/</mo>
                <msup>
                  <mtext>s</mtext>
                  <mn>2</mn>
                </msup>
              </mrow>
              <mo stretchy="false">≈</mo>
              <mrow>
                <msubsup>
                  <mi>v</mi>
                  <mi>i</mi>
                  <mn>2</mn>
                </msubsup>
                <mo stretchy="false">−</mo>
                <mn>41</mn>
              </mrow>
            </mrow>
            <mrow>
              <msup>
                <mtext>m</mtext>
                <mn>2</mn>
              </msup>
              <mo stretchy="false">/</mo>
              <msup>
                <mtext>s</mtext>
                <mn>2</mn>
              </msup>
            </mrow>
          </mrow>
        </mtd>
      </mtr>
      <mtr>
        <mtd>
          <mrow>
            <mrow>
              <msubsup>
                <mi>v</mi>
                <mi>i</mi>
                <mn>2</mn>
              </msubsup>
              <mo stretchy="false">≈</mo>
              <mn>41</mn>
            </mrow>
            <mrow>
              <msup>
                <mtext>m</mtext>
                <mn>2</mn>
              </msup>
              <mo stretchy="false">/</mo>
              <msup>
                <mtext>s</mtext>
                <mn>2</mn>
              </msup>
            </mrow>
          </mrow>
        </mtd>
      </mtr>
      <mtr>
        <mtd>
          <mrow>
            <mrow>
              <msub>
                <mi>v</mi>
                <mi>i</mi>
              </msub>
              <mo stretchy="false">≈</mo>
              <mn>6.4</mn>
            </mrow>
            <mrow>
              <mtext>m</mtext>
              <mo stretchy="false">/</mo>
              <mtext>s</mtext>
            </mrow>
          </mrow>
        </mtd>
      </mtr>
    </mtable>
    <annotation encoding="StarMath 5.0">v_f^2 = v_i^2 + 2ad newline
( 0 "m" / "s" )^2 = v_i^2 + 2 ( -9.8 "m" / "s"^2 ) ( 2.10 "m" ) newline
0 "m"^2 / "s"^2 approx v_i^2 - 41 "m"^2 / "s"^2 newline
v_i^2 approx 41 "m"^2 / "s"^2 newline
v_i approx 6.4 "m" / "s"</annotation>
  </semantics>
</math>
</file>

<file path=Object 5/content.xml><?xml version="1.0" encoding="utf-8"?>
<math xmlns="http://www.w3.org/1998/Math/MathML" display="block">
  <semantics>
    <mrow>
      <mrow>
        <mi>g</mi>
        <mo stretchy="false">=</mo>
        <mn>1.6</mn>
      </mrow>
      <mrow>
        <mtext>m</mtext>
        <mo stretchy="false">/</mo>
        <msup>
          <mtext>s</mtext>
          <mn>2</mn>
        </msup>
      </mrow>
    </mrow>
    <annotation encoding="StarMath 5.0">g = 1.6 "m" / "s"^2</annotation>
  </semantics>
</math>
</file>

<file path=Object 6/content.xml><?xml version="1.0" encoding="utf-8"?>
<math xmlns="http://www.w3.org/1998/Math/MathML" display="block">
  <semantics>
    <mrow>
      <mn>9.8</mn>
      <mrow>
        <mtext>m</mtext>
        <mo stretchy="false">/</mo>
        <msup>
          <mtext>s</mtext>
          <mn>2</mn>
        </msup>
      </mrow>
    </mrow>
    <annotation encoding="StarMath 5.0">9.8 "m" / "s"^2</annotation>
  </semantics>
</math>
</file>

<file path=Object 7/content.xml><?xml version="1.0" encoding="utf-8"?>
<math xmlns="http://www.w3.org/1998/Math/MathML" display="block">
  <semantics>
    <mrow>
      <mn>9.8</mn>
      <mrow>
        <mtext>m</mtext>
        <mo stretchy="false">/</mo>
        <msup>
          <mtext>s</mtext>
          <mn>2</mn>
        </msup>
      </mrow>
    </mrow>
    <annotation encoding="StarMath 5.0">9.8 "m" / "s"^2</annotation>
  </semantics>
</math>
</file>

<file path=Object 8/content.xml><?xml version="1.0" encoding="utf-8"?>
<math xmlns="http://www.w3.org/1998/Math/MathML" display="block">
  <semantics>
    <mrow>
      <mrow>
        <mi>g</mi>
        <mo stretchy="false">≈</mo>
        <mn>3.8</mn>
      </mrow>
      <mrow>
        <mtext>m</mtext>
        <mo stretchy="false">/</mo>
        <msup>
          <mtext>s</mtext>
          <mn>2</mn>
        </msup>
      </mrow>
    </mrow>
    <annotation encoding="StarMath 5.0">g approx 3.8 "m" / "s"^2</annotation>
  </semantics>
</math>
</file>

<file path=Object 9/content.xml><?xml version="1.0" encoding="utf-8"?>
<math xmlns="http://www.w3.org/1998/Math/MathML" display="block">
  <semantics>
    <mrow>
      <mrow>
        <mi>g</mi>
        <mo stretchy="false">≈</mo>
        <mn>1.6</mn>
      </mrow>
      <mrow>
        <mtext>m</mtext>
        <mo stretchy="false">/</mo>
        <msup>
          <mtext>s</mtext>
          <mn>2</mn>
        </msup>
      </mrow>
    </mrow>
    <annotation encoding="StarMath 5.0">g approx 1.6 "m" / "s"^2</annotation>
  </semantics>
</math>
</file>
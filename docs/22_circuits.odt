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settings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Pictures/10000000000000CE000000515A1BFA9C.png" manifest:media-type="image/png"/>
  <manifest:file-entry manifest:full-path="Pictures/10000001000001AE0000019446C682F6.png" manifest:media-type="image/png"/>
  <manifest:file-entry manifest:full-path="Pictures/10000000000001B9000001061A4424F6.png" manifest:media-type="image/png"/>
  <manifest:file-entry manifest:full-path="Pictures/10000001000000D9000000CC38B42EAB.png" manifest:media-type="image/png"/>
  <manifest:file-entry manifest:full-path="Pictures/10000001000000DC000000C8C3EDA513.png" manifest:media-type="image/png"/>
  <manifest:file-entry manifest:full-path="Pictures/100000010000029500000140F180A92D.png" manifest:media-type="image/png"/>
  <manifest:file-entry manifest:full-path="Pictures/10000000000000A90000002A0DD6F258.png" manifest:media-type="image/png"/>
  <manifest:file-entry manifest:full-path="Pictures/10000000000000A900000027CB4FE0C0.png" manifest:media-type="image/png"/>
  <manifest:file-entry manifest:full-path="Pictures/10000000000000DD0000016658DBA47C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Thumbnails/thumbnail.png" manifest:media-type="image/png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manifest.rdf" manifest:media-type="application/rdf+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02cf350" officeooo:paragraph-rsid="002cf350"/>
    </style:style>
    <style:style style:name="P2" style:family="paragraph" style:parent-style-name="Text_20_body">
      <style:paragraph-properties fo:text-align="center" style:justify-single-word="false"/>
      <style:text-properties officeooo:paragraph-rsid="000c2f56"/>
    </style:style>
    <style:style style:name="P3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style="normal" officeooo:rsid="0031c9d9" officeooo:paragraph-rsid="000c2f56" style:font-style-asian="normal" style:font-style-complex="normal"/>
    </style:style>
    <style:style style:name="P8" style:family="paragraph" style:parent-style-name="Heading_20_1">
      <style:paragraph-properties fo:break-before="page"/>
      <style:text-properties officeooo:rsid="00527d38" officeooo:paragraph-rsid="00527d38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cf350" officeooo:paragraph-rsid="002cf350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2cf350" officeooo:paragraph-rsid="002cf350" style:font-weight-asian="bold" style:font-weight-complex="bold"/>
    </style:style>
    <style:style style:name="P11" style:family="paragraph" style:parent-style-name="Text_20_body" style:list-style-name="L1">
      <style:text-properties officeooo:rsid="002cf350" officeooo:paragraph-rsid="002cf350"/>
    </style:style>
    <style:style style:name="P12" style:family="paragraph" style:parent-style-name="Text_20_body" style:list-style-name="L1">
      <style:paragraph-properties style:writing-mode="lr-tb"/>
      <style:text-properties fo:font-weight="bold" officeooo:rsid="002cf350" officeooo:paragraph-rsid="002cf350" style:font-weight-asian="bold" style:font-weight-complex="bold"/>
    </style:style>
    <style:style style:name="P13" style:family="paragraph" style:parent-style-name="Text_20_body">
      <style:text-properties officeooo:rsid="003459be" officeooo:paragraph-rsid="003459be"/>
    </style:style>
    <style:style style:name="P14" style:family="paragraph" style:parent-style-name="Text_20_body">
      <style:text-properties officeooo:rsid="003503eb" officeooo:paragraph-rsid="003503eb"/>
    </style:style>
    <style:style style:name="P15" style:family="paragraph" style:parent-style-name="Text_20_body">
      <style:text-properties officeooo:rsid="0035e25e" officeooo:paragraph-rsid="0035e25e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035e25e" officeooo:paragraph-rsid="0035e25e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35e25e" officeooo:paragraph-rsid="0035e25e" style:font-weight-asian="normal" style:font-weight-complex="normal"/>
    </style:style>
    <style:style style:name="P18" style:family="paragraph" style:parent-style-name="Text_20_body">
      <style:text-properties officeooo:rsid="0036b329" officeooo:paragraph-rsid="0036b329"/>
    </style:style>
    <style:style style:name="P19" style:family="paragraph" style:parent-style-name="Text_20_body">
      <style:text-properties officeooo:rsid="0038f3e1" officeooo:paragraph-rsid="0038f3e1"/>
    </style:style>
    <style:style style:name="P20" style:family="paragraph" style:parent-style-name="Text_20_body" style:list-style-name="L2">
      <style:text-properties officeooo:rsid="0038f3e1" officeooo:paragraph-rsid="0038f3e1"/>
    </style:style>
    <style:style style:name="P21" style:family="paragraph" style:parent-style-name="Text_20_body">
      <style:text-properties officeooo:rsid="003e01fd" officeooo:paragraph-rsid="003e01fd"/>
    </style:style>
    <style:style style:name="P22" style:family="paragraph" style:parent-style-name="Text_20_body">
      <style:text-properties fo:font-weight="normal" officeooo:rsid="003e01fd" officeooo:paragraph-rsid="003e01fd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rsid="003e01fd" officeooo:paragraph-rsid="003e01fd" style:font-weight-asian="normal" style:font-weight-complex="normal"/>
    </style:style>
    <style:style style:name="P24" style:family="paragraph" style:parent-style-name="Text_20_body" style:list-style-name="L3">
      <style:text-properties fo:font-weight="normal" officeooo:rsid="003e01fd" officeooo:paragraph-rsid="0066612d" style:font-weight-asian="normal" style:font-weight-complex="normal"/>
    </style:style>
    <style:style style:name="P25" style:family="paragraph" style:parent-style-name="Text_20_body" style:list-style-name="L3">
      <style:paragraph-properties fo:text-align="center" style:justify-single-word="false"/>
      <style:text-properties fo:font-weight="normal" officeooo:rsid="003e01fd" officeooo:paragraph-rsid="0066612d" style:font-weight-asian="normal" style:font-weight-complex="normal"/>
    </style:style>
    <style:style style:name="P26" style:family="paragraph" style:parent-style-name="Heading_20_1">
      <style:paragraph-properties style:writing-mode="lr-tb"/>
      <style:text-properties officeooo:rsid="0041ffc7" officeooo:paragraph-rsid="0041ffc7"/>
    </style:style>
    <style:style style:name="P27" style:family="paragraph" style:parent-style-name="Text_20_body">
      <style:paragraph-properties style:writing-mode="lr-tb"/>
      <style:text-properties officeooo:rsid="0041ffc7" officeooo:paragraph-rsid="00437ef8"/>
    </style:style>
    <style:style style:name="P28" style:family="paragraph" style:parent-style-name="Text_20_body">
      <style:paragraph-properties style:writing-mode="lr-tb"/>
      <style:text-properties fo:font-weight="normal" officeooo:rsid="00437ef8" officeooo:paragraph-rsid="00437ef8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 style:writing-mode="lr-tb"/>
      <style:text-properties fo:font-weight="normal" officeooo:rsid="00437ef8" officeooo:paragraph-rsid="00437ef8" style:font-weight-asian="normal" style:font-weight-complex="normal"/>
    </style:style>
    <style:style style:name="P30" style:family="paragraph" style:parent-style-name="Text_20_body">
      <style:paragraph-properties fo:text-align="start" style:justify-single-word="false" style:writing-mode="lr-tb"/>
      <style:text-properties fo:font-weight="normal" officeooo:rsid="00437ef8" officeooo:paragraph-rsid="00437ef8" style:font-weight-asian="normal" style:font-weight-complex="normal"/>
    </style:style>
    <style:style style:name="P31" style:family="paragraph" style:parent-style-name="Text_20_body">
      <style:paragraph-properties fo:text-align="start" style:justify-single-word="false" style:writing-mode="lr-tb"/>
      <style:text-properties fo:font-weight="normal" officeooo:rsid="00439116" officeooo:paragraph-rsid="00439116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 style:writing-mode="lr-tb"/>
      <style:text-properties fo:font-weight="normal" officeooo:rsid="00439116" officeooo:paragraph-rsid="00439116" style:font-weight-asian="normal" style:font-weight-complex="normal"/>
    </style:style>
    <style:style style:name="P33" style:family="paragraph" style:parent-style-name="Heading_20_2">
      <style:text-properties officeooo:rsid="00439116" officeooo:paragraph-rsid="00439116"/>
    </style:style>
    <style:style style:name="P34" style:family="paragraph" style:parent-style-name="Text_20_body">
      <style:text-properties officeooo:rsid="00439116" officeooo:paragraph-rsid="00439116"/>
    </style:style>
    <style:style style:name="P35" style:family="paragraph" style:parent-style-name="Text_20_body">
      <style:text-properties fo:font-weight="normal" officeooo:rsid="00439116" officeooo:paragraph-rsid="00439116" style:font-weight-asian="normal" style:font-weight-complex="normal"/>
    </style:style>
    <style:style style:name="P36" style:family="paragraph" style:parent-style-name="Text_20_body">
      <style:paragraph-properties fo:text-align="center" style:justify-single-word="false"/>
      <style:text-properties officeooo:rsid="00439116" officeooo:paragraph-rsid="00439116"/>
    </style:style>
    <style:style style:name="P37" style:family="paragraph" style:parent-style-name="Heading_20_1">
      <style:text-properties officeooo:rsid="0048e825" officeooo:paragraph-rsid="0048e825"/>
    </style:style>
    <style:style style:name="P38" style:family="paragraph" style:parent-style-name="Text_20_body">
      <style:text-properties fo:font-weight="bold" officeooo:rsid="00527d38" officeooo:paragraph-rsid="00527d38" style:font-weight-asian="bold" style:font-weight-complex="bold"/>
    </style:style>
    <style:style style:name="P39" style:family="paragraph" style:parent-style-name="Heading_20_2">
      <style:text-properties officeooo:rsid="0049118a" officeooo:paragraph-rsid="0049118a"/>
    </style:style>
    <style:style style:name="P40" style:family="paragraph" style:parent-style-name="Text_20_body">
      <style:text-properties fo:font-weight="bold" officeooo:rsid="0049118a" officeooo:paragraph-rsid="0049118a" style:font-weight-asian="bold" style:font-weight-complex="bold"/>
    </style:style>
    <style:style style:name="P41" style:family="paragraph" style:parent-style-name="Text_20_body">
      <style:text-properties officeooo:rsid="0049118a" officeooo:paragraph-rsid="0049118a"/>
    </style:style>
    <style:style style:name="P42" style:family="paragraph" style:parent-style-name="Heading_20_3">
      <style:text-properties officeooo:rsid="004c4f5a" officeooo:paragraph-rsid="004c4f5a"/>
    </style:style>
    <style:style style:name="P43" style:family="paragraph" style:parent-style-name="Text_20_body">
      <style:text-properties officeooo:rsid="004c4f5a" officeooo:paragraph-rsid="004c4f5a"/>
    </style:style>
    <style:style style:name="P44" style:family="paragraph" style:parent-style-name="Heading_20_2">
      <style:text-properties officeooo:rsid="004d1498" officeooo:paragraph-rsid="004d1498"/>
    </style:style>
    <style:style style:name="P45" style:family="paragraph" style:parent-style-name="Text_20_body">
      <style:text-properties officeooo:rsid="004d1498" officeooo:paragraph-rsid="004d1498"/>
    </style:style>
    <style:style style:name="P46" style:family="paragraph" style:parent-style-name="Heading_20_3">
      <style:text-properties officeooo:rsid="004d1498" officeooo:paragraph-rsid="004d1498"/>
    </style:style>
    <style:style style:name="P47" style:family="paragraph" style:parent-style-name="Text_20_body">
      <style:text-properties fo:font-weight="normal" officeooo:rsid="004d1498" officeooo:paragraph-rsid="004d1498" style:font-weight-asian="normal" style:font-weight-complex="normal"/>
    </style:style>
    <style:style style:name="P48" style:family="paragraph" style:parent-style-name="Text_20_body">
      <style:text-properties fo:font-weight="bold" officeooo:rsid="004d1498" officeooo:paragraph-rsid="004d1498" style:font-weight-asian="bold" style:font-weight-complex="bold"/>
    </style:style>
    <style:style style:name="P49" style:family="paragraph" style:parent-style-name="Heading_20_3">
      <style:text-properties officeooo:rsid="004d1ca2" officeooo:paragraph-rsid="004d1ca2"/>
    </style:style>
    <style:style style:name="P50" style:family="paragraph" style:parent-style-name="Text_20_body">
      <style:text-properties fo:font-weight="bold" officeooo:rsid="004d1ca2" officeooo:paragraph-rsid="004d1ca2" style:font-weight-asian="bold" style:font-weight-complex="bold"/>
    </style:style>
    <style:style style:name="P51" style:family="paragraph" style:parent-style-name="Heading_20_1">
      <style:text-properties officeooo:rsid="005062f8" officeooo:paragraph-rsid="005062f8"/>
    </style:style>
    <style:style style:name="P52" style:family="paragraph" style:parent-style-name="Heading_20_2">
      <style:text-properties officeooo:rsid="00524b42" officeooo:paragraph-rsid="00524b42"/>
    </style:style>
    <style:style style:name="P53" style:family="paragraph" style:parent-style-name="Text_20_body">
      <style:text-properties fo:font-weight="bold" officeooo:rsid="00524b42" officeooo:paragraph-rsid="00524b42" style:font-weight-asian="bold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weight="normal" officeooo:rsid="00524b42" officeooo:paragraph-rsid="00524b42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24b42" officeooo:paragraph-rsid="00524b42" style:font-weight-asian="normal" style:font-weight-complex="normal"/>
    </style:style>
    <style:style style:name="P56" style:family="paragraph" style:parent-style-name="Text_20_body">
      <style:text-properties fo:font-weight="normal" officeooo:rsid="0053248a" officeooo:paragraph-rsid="0053248a" style:font-weight-asian="normal" style:font-weight-complex="normal"/>
    </style:style>
    <style:style style:name="P57" style:family="paragraph" style:parent-style-name="Heading_20_2">
      <style:text-properties officeooo:rsid="0055bba9" officeooo:paragraph-rsid="0055bba9"/>
    </style:style>
    <style:style style:name="P58" style:family="paragraph" style:parent-style-name="Text_20_body">
      <style:text-properties fo:font-weight="bold" officeooo:rsid="0055bba9" officeooo:paragraph-rsid="0055bba9" style:font-weight-asian="bold" style:font-weight-complex="bold"/>
    </style:style>
    <style:style style:name="P59" style:family="paragraph" style:parent-style-name="Heading_20_3">
      <style:text-properties officeooo:rsid="0057adc0" officeooo:paragraph-rsid="0057adc0"/>
    </style:style>
    <style:style style:name="P60" style:family="paragraph" style:parent-style-name="Text_20_body">
      <style:text-properties officeooo:rsid="0057adc0" officeooo:paragraph-rsid="0057adc0"/>
    </style:style>
    <style:style style:name="P61" style:family="paragraph" style:parent-style-name="Heading_20_4">
      <style:text-properties officeooo:rsid="0057adc0" officeooo:paragraph-rsid="0057adc0"/>
    </style:style>
    <style:style style:name="P62" style:family="paragraph" style:parent-style-name="Text_20_body">
      <style:text-properties fo:font-weight="normal" officeooo:rsid="0057adc0" officeooo:paragraph-rsid="0057adc0" style:font-weight-asian="normal" style:font-weight-complex="normal"/>
    </style:style>
    <style:style style:name="P63" style:family="paragraph" style:parent-style-name="Heading_20_1">
      <style:text-properties officeooo:paragraph-rsid="00676a9d"/>
    </style:style>
    <style:style style:name="P64" style:family="paragraph" style:parent-style-name="Text_20_body" style:list-style-name="L4">
      <style:text-properties officeooo:rsid="0055bba9" officeooo:paragraph-rsid="0055bba9"/>
    </style:style>
    <style:style style:name="P65" style:family="paragraph" style:parent-style-name="Text_20_body" style:list-style-name="L4">
      <style:paragraph-properties fo:text-align="center" style:justify-single-word="false"/>
      <style:text-properties officeooo:rsid="0055bba9" officeooo:paragraph-rsid="0055bba9"/>
    </style:style>
    <style:style style:name="P66" style:family="paragraph" style:parent-style-name="Text_20_body" style:list-style-name="L4">
      <style:text-properties officeooo:rsid="00439116" officeooo:paragraph-rsid="00676a9d"/>
    </style:style>
    <style:style style:name="P67" style:family="paragraph" style:parent-style-name="Text_20_body" style:list-style-name="L4">
      <style:paragraph-properties fo:text-align="center" style:justify-single-word="false"/>
      <style:text-properties officeooo:rsid="00439116" officeooo:paragraph-rsid="00676a9d"/>
    </style:style>
    <style:style style:name="P68" style:family="paragraph" style:parent-style-name="Text_20_body" style:list-style-name="L4">
      <style:paragraph-properties fo:text-align="start" style:justify-single-word="false"/>
      <style:text-properties officeooo:rsid="00439116" officeooo:paragraph-rsid="00676a9d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43d0ac" officeooo:paragraph-rsid="00676a9d"/>
    </style:style>
    <style:style style:name="P70" style:family="paragraph" style:parent-style-name="Text_20_body" style:list-style-name="L4">
      <style:paragraph-properties fo:text-align="center" style:justify-single-word="false"/>
      <style:text-properties officeooo:rsid="0043d0ac" officeooo:paragraph-rsid="00676a9d"/>
    </style:style>
    <style:style style:name="T1" style:family="text">
      <style:text-properties officeooo:rsid="00527d38"/>
    </style:style>
    <style:style style:name="T2" style:family="text">
      <style:text-properties fo:font-style="normal" officeooo:rsid="000c2f56" style:font-style-asian="normal" style:font-style-complex="normal"/>
    </style:style>
    <style:style style:name="T3" style:family="text">
      <style:text-properties fo:font-style="normal" officeooo:rsid="002cf350" style:font-style-asian="normal" style:font-style-complex="normal"/>
    </style:style>
    <style:style style:name="T4" style:family="text">
      <style:text-properties fo:font-style="normal" officeooo:rsid="0031c9d9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e25e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f91f5"/>
    </style:style>
    <style:style style:name="T9" style:family="text">
      <style:text-properties fo:font-weight="bold" officeooo:rsid="003f91f5" style:font-weight-asian="bold" style:font-weight-complex="bold"/>
    </style:style>
    <style:style style:name="T10" style:family="text">
      <style:text-properties officeooo:rsid="004bb518"/>
    </style:style>
    <style:style style:name="T11" style:family="text">
      <style:text-properties officeooo:rsid="003e01fd"/>
    </style:style>
    <style:style style:name="T12" style:family="text">
      <style:text-properties fo:font-weight="normal" officeooo:rsid="003f91f5" style:font-weight-asian="normal" style:font-weight-complex="normal"/>
    </style:style>
    <style:style style:name="T13" style:family="text">
      <style:text-properties fo:font-weight="normal" officeooo:rsid="004aac6f" style:font-weight-asian="normal" style:font-weight-complex="normal"/>
    </style:style>
    <style:style style:name="T14" style:family="text">
      <style:text-properties officeooo:rsid="0048e825"/>
    </style:style>
    <style:style style:name="T15" style:family="text">
      <style:text-properties officeooo:rsid="0043d0ac"/>
    </style:style>
    <style:style style:name="T16" style:family="text">
      <style:text-properties officeooo:rsid="005e0fe4"/>
    </style:style>
    <style:style style:name="T17" style:family="text">
      <style:text-properties fo:font-weight="normal" officeooo:rsid="004c4f5a" style:font-weight-asian="normal" style:font-weight-complex="normal"/>
    </style:style>
    <style:style style:name="T18" style:family="text">
      <style:text-properties officeooo:rsid="004c905c"/>
    </style:style>
    <style:style style:name="T19" style:family="text">
      <style:text-properties officeooo:rsid="004d1498"/>
    </style:style>
    <style:style style:name="T20" style:family="text">
      <style:text-properties fo:font-weight="bold" officeooo:rsid="005e0fe4" style:font-weight-asian="bold" style:font-weight-complex="bold"/>
    </style:style>
    <style:style style:name="T21" style:family="text">
      <style:text-properties fo:font-weight="bold" officeooo:rsid="004d1ca2" style:font-weight-asian="bold" style:font-weight-complex="bold"/>
    </style:style>
    <style:style style:name="T22" style:family="text">
      <style:text-properties fo:font-weight="bold" officeooo:rsid="0061d1c2" style:font-weight-asian="bold" style:font-weight-complex="bold"/>
    </style:style>
    <style:style style:name="T23" style:family="text">
      <style:text-properties fo:font-weight="normal" officeooo:rsid="004d1ca2" style:font-weight-asian="normal" style:font-weight-complex="normal"/>
    </style:style>
    <style:style style:name="T24" style:family="text">
      <style:text-properties fo:font-weight="normal" officeooo:rsid="0061d1c2" style:font-weight-asian="normal" style:font-weight-complex="normal"/>
    </style:style>
    <style:style style:name="T25" style:family="text">
      <style:text-properties officeooo:rsid="0061d1c2"/>
    </style:style>
    <style:style style:name="T26" style:family="text">
      <style:text-properties fo:font-weight="normal" officeooo:rsid="004da6bd" style:font-weight-asian="normal" style:font-weight-complex="normal"/>
    </style:style>
    <style:style style:name="T27" style:family="text">
      <style:text-properties fo:font-weight="bold" officeooo:rsid="0069f763" style:font-weight-asian="bold" style:font-weight-complex="bold"/>
    </style:style>
    <style:style style:name="T28" style:family="text">
      <style:text-properties officeooo:rsid="006b105e"/>
    </style:style>
    <style:style style:name="T29" style:family="text">
      <style:text-properties officeooo:rsid="0069f763"/>
    </style:style>
    <style:style style:name="T30" style:family="text">
      <style:text-properties fo:font-weight="normal" officeooo:rsid="0055bba9" style:font-weight-asian="normal" style:font-weight-complex="normal"/>
    </style:style>
    <style:style style:name="T31" style:family="text">
      <style:text-properties officeooo:rsid="00676a9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31_3458609412"/><text:bookmark-start text:name="__DdeLink__478_3458609412"/><text:bookmark-start text:name="__DdeLink__490_3458609412"/><text:bookmark-start text:name="__RefHeading___Toc339_202974590"/>Circuits <text:span text:style-name="T1">and Electricity</text:span><text:bookmark-end text:name="__RefHeading___Toc339_202974590"/></text:p>
      <text:p text:style-name="P2"><text:span text:style-name="T2">February </text:span><text:span text:style-name="T3">26</text:span><text:span text:style-name="T4">, 2026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41_202974590" office:name="Circuits" text:style-name="Index_20_Link" text:visited-style-name="Index_20_Link">Circuits<text:tab/>2</text:a></text:p>
          <text:p text:style-name="P4"><text:a xlink:type="simple" xlink:href="#__RefHeading___Toc427_3458609412" office:name="Introductory Concepts" text:style-name="Index_20_Link" text:visited-style-name="Index_20_Link">Introductory Concepts<text:tab/>2</text:a></text:p>
          <text:p text:style-name="P4"><text:a xlink:type="simple" xlink:href="#__RefHeading___Toc123_3396213957" office:name="Drawing Circuits" text:style-name="Index_20_Link" text:visited-style-name="Index_20_Link">Drawing Circuits<text:tab/>2</text:a></text:p>
          <text:p text:style-name="P4"><text:a xlink:type="simple" xlink:href="#__RefHeading___Toc125_3396213957" office:name="Ohm’s Law" text:style-name="Index_20_Link" text:visited-style-name="Index_20_Link">Ohm’s Law<text:tab/>2</text:a></text:p>
          <text:p text:style-name="P4"><text:a xlink:type="simple" xlink:href="#__RefHeading___Toc127_3396213957" office:name="Series Circuits" text:style-name="Index_20_Link" text:visited-style-name="Index_20_Link">Series Circuits<text:tab/>3</text:a></text:p>
          <text:p text:style-name="P4"><text:a xlink:type="simple" xlink:href="#__RefHeading___Toc285_2810426664" office:name="Parallel Circuits" text:style-name="Index_20_Link" text:visited-style-name="Index_20_Link">Parallel Circuits<text:tab/>3</text:a></text:p>
          <text:p text:style-name="P3"><text:a xlink:type="simple" xlink:href="#__RefHeading___Toc378_1365886015" office:name="Electrical Work and Power" text:style-name="Index_20_Link" text:visited-style-name="Index_20_Link">Electrical Work and Power<text:tab/>4</text:a></text:p>
          <text:p text:style-name="P4"><text:a xlink:type="simple" xlink:href="#__RefHeading___Toc380_1365886015" office:name="Analogy for Power" text:style-name="Index_20_Link" text:visited-style-name="Index_20_Link">Analogy for Power<text:tab/>5</text:a></text:p>
          <text:p text:style-name="P3"><text:a xlink:type="simple" xlink:href="#__RefHeading___Toc384_1365886015" office:name="Kirchhoff’s Laws" text:style-name="Index_20_Link" text:visited-style-name="Index_20_Link">Kirchhoff’s Laws<text:tab/>5</text:a></text:p>
          <text:p text:style-name="P4"><text:a xlink:type="simple" xlink:href="#__RefHeading___Toc429_2478214970" office:name="Conservation of Charge" text:style-name="Index_20_Link" text:visited-style-name="Index_20_Link">Conservation of Charge<text:tab/>5</text:a></text:p>
          <text:p text:style-name="P4"><text:a xlink:type="simple" xlink:href="#__RefHeading___Toc431_2478214970" office:name="The Ammeter" text:style-name="Index_20_Link" text:visited-style-name="Index_20_Link">The Ammeter<text:tab/>5</text:a></text:p>
          <text:p text:style-name="P5"><text:a xlink:type="simple" xlink:href="#__RefHeading___Toc433_2478214970" office:name="Connecting Ammeters" text:style-name="Index_20_Link" text:visited-style-name="Index_20_Link">Connecting Ammeters<text:tab/>5</text:a></text:p>
          <text:p text:style-name="P4"><text:a xlink:type="simple" xlink:href="#__RefHeading___Toc435_2478214970" office:name="The Voltmeter" text:style-name="Index_20_Link" text:visited-style-name="Index_20_Link">The Voltmeter<text:tab/>5</text:a></text:p>
          <text:p text:style-name="P5"><text:a xlink:type="simple" xlink:href="#__RefHeading___Toc437_2478214970" office:name="Connecting Voltmeters" text:style-name="Index_20_Link" text:visited-style-name="Index_20_Link">Connecting Voltmeters<text:tab/>5</text:a></text:p>
          <text:p text:style-name="P4"><text:a xlink:type="simple" xlink:href="#__RefHeading___Toc439_2478214970" office:name="Gustav Robert Kirchhoff" text:style-name="Index_20_Link" text:visited-style-name="Index_20_Link">Gustav Robert Kirchhoff<text:tab/>6</text:a></text:p>
          <text:p text:style-name="P5"><text:a xlink:type="simple" xlink:href="#__RefHeading___Toc441_2478214970" office:name="Kirchhoff’s First Law" text:style-name="Index_20_Link" text:visited-style-name="Index_20_Link">Kirchhoff’s First Law<text:tab/>6</text:a></text:p>
          <text:p text:style-name="P5"><text:a xlink:type="simple" xlink:href="#__RefHeading___Toc443_2478214970" office:name="Kirchhoff’s Second Law" text:style-name="Index_20_Link" text:visited-style-name="Index_20_Link">Kirchhoff’s Second Law<text:tab/>6</text:a></text:p>
          <text:p text:style-name="P3"><text:a xlink:type="simple" xlink:href="#__RefHeading___Toc539_1024500351" office:name="Current and Resistance" text:style-name="Index_20_Link" text:visited-style-name="Index_20_Link">Current and Resistance<text:tab/>6</text:a></text:p>
          <text:p text:style-name="P4"><text:a xlink:type="simple" xlink:href="#__RefHeading___Toc677_1024500351" office:name="What is Current?" text:style-name="Index_20_Link" text:visited-style-name="Index_20_Link">What is Current?<text:tab/>6</text:a></text:p>
          <text:p text:style-name="P5"><text:a xlink:type="simple" xlink:href="#__RefHeading___Toc679_1024500351" office:name="Types of Current" text:style-name="Index_20_Link" text:visited-style-name="Index_20_Link">Types of Current<text:tab/>6</text:a></text:p>
          <text:p text:style-name="P4"><text:a xlink:type="simple" xlink:href="#__RefHeading___Toc681_1024500351" office:name="What is Resistance?" text:style-name="Index_20_Link" text:visited-style-name="Index_20_Link">What is Resistance?<text:tab/>7</text:a></text:p>
          <text:p text:style-name="P5"><text:a xlink:type="simple" xlink:href="#__RefHeading___Toc683_1024500351" office:name="Factors Affecting Resistance" text:style-name="Index_20_Link" text:visited-style-name="Index_20_Link">Factors Affecting Resistance<text:tab/>7</text:a></text:p>
          <text:p text:style-name="P5"><text:a xlink:type="simple" xlink:href="#__RefHeading___Toc685_1024500351" office:name="Resistors" text:style-name="Index_20_Link" text:visited-style-name="Index_20_Link">Resistors<text:tab/>7</text:a></text:p>
          <text:p text:style-name="P6"><text:a xlink:type="simple" xlink:href="#__RefHeading___Toc687_1024500351" office:name="Types of Resistors" text:style-name="Index_20_Link" text:visited-style-name="Index_20_Link">Types of Resistors<text:tab/>7</text:a></text:p>
          <text:p text:style-name="P6"><text:a xlink:type="simple" xlink:href="#__RefHeading___Toc689_1024500351" office:name="Understanding Resistors" text:style-name="Index_20_Link" text:visited-style-name="Index_20_Link">Understanding Resistors<text:tab/>7</text:a></text:p>
          <text:p text:style-name="P3"><text:a xlink:type="simple" xlink:href="#__RefHeading___Toc691_1024500351" office:name="Examples and Applications" text:style-name="Index_20_Link" text:visited-style-name="Index_20_Link">Examples and Applications<text:tab/>8</text:a></text:p>
        </text:index-body>
      </text:table-of-content>
      <text:p text:style-name="P7"/>
      <text:h text:style-name="P8" text:outline-level="1"><text:bookmark-start text:name="__RefHeading___Toc341_202974590"/>Circuits<text:bookmark-end text:name="__RefHeading___Toc341_202974590"/></text:h>
      <text:p text:style-name="P9">Circuits<text:span text:style-name="T5"> are comprised of primarily three things: a source of potential difference (voltage) like a battery, conductive materials, and complete loops.</text:span></text:p>
      <text:h text:style-name="Heading_20_2" text:outline-level="2"><text:bookmark-start text:name="__RefHeading___Toc427_3458609412"/>Introductory Concepts<text:bookmark-end text:name="__RefHeading___Toc427_3458609412"/></text:h>
      <text:list text:style-name="L1">
        <text:list-item>
          <text:p text:style-name="P10">Voltage (Potential Difference)<text:span text:style-name="T5">: The difference in potential energy between two points in an electric field</text:span><text:bookmark-start text:name="__DdeLink__68_3396213957"/><text:span text:style-name="T5">,</text:span><text:bookmark-end text:name="__DdeLink__68_3396213957"/><text:span text:style-name="T5"> </text:span><text:span text:style-name="T6">measured in volts (</text:span><text:span text:style-name="T6"><draw:frame draw:style-name="fr1" draw:name="Object5" text:anchor-type="as-char" svg:y="-0.1492in" svg:width="0.1346in" svg:height="0.1854in" draw:z-index="32"><draw:object xlink:href="./Object 5" xlink:type="simple" xlink:show="embed" xlink:actuate="onLoad"/><draw:image xlink:href="./ObjectReplacements/Object 5" xlink:type="simple" xlink:show="embed" xlink:actuate="onLoad"/></draw:frame></text:span><text:span text:style-name="T6">)</text:span></text:p>
        </text:list-item>
        <text:list-item>
          <text:p text:style-name="P11"><text:span text:style-name="T7">Current</text:span><text:span text:style-name="T5">: </text:span><text:span text:style-name="T6">T</text:span><text:span text:style-name="T5">he rate at which charge passes through a given point</text:span><text:span text:style-name="T6">, measured in amperes (</text:span><text:span text:style-name="T6"><draw:frame draw:style-name="fr1" draw:name="Object6" text:anchor-type="as-char" svg:y="-0.1492in" svg:width="0.1354in" svg:height="0.1854in" draw:z-index="36"><draw:object xlink:href="./Object 6" xlink:type="simple" xlink:show="embed" xlink:actuate="onLoad"/><draw:image xlink:href="./ObjectReplacements/Object 6" xlink:type="simple" xlink:show="embed" xlink:actuate="onLoad"/></draw:frame></text:span><text:span text:style-name="T6">)</text:span></text:p>
        </text:list-item>
        <text:list-item>
          <text:p text:style-name="P12">Resistance<text:span text:style-name="T5">: A measure of the opposition that a device offers to the flow of electric current, </text:span><text:span text:style-name="T6">measured in ohms (</text:span><text:span text:style-name="T6"><draw:frame draw:style-name="fr1" draw:name="Object7" text:anchor-type="as-char" svg:y="-0.1492in" svg:width="0.1244in" svg:height="0.1854in" draw:z-index="37"><draw:object xlink:href="./Object 7" xlink:type="simple" xlink:show="embed" xlink:actuate="onLoad"/><draw:image xlink:href="./ObjectReplacements/Object 7" xlink:type="simple" xlink:show="embed" xlink:actuate="onLoad"/></draw:frame></text:span><text:span text:style-name="T6">).</text:span></text:p>
        </text:list-item>
      </text:list>
      <text:h text:style-name="Heading_20_2" text:outline-level="2"><text:bookmark-end text:name="__DdeLink__431_3458609412"/><text:bookmark-end text:name="__DdeLink__490_3458609412"/><text:bookmark-end text:name="__DdeLink__478_3458609412"/><text:bookmark-start text:name="__RefHeading___Toc123_3396213957"/>Drawing Circuits<text:bookmark-end text:name="__RefHeading___Toc123_3396213957"/></text:h>
      <text:p text:style-name="P13">Circuits are drawn using schematic symbols representing physical parts:</text:p>
      <text:p text:style-name="P14"><draw:frame draw:style-name="fr2" draw:name="Frame4" text:anchor-type="char" svg:width="2.302in" draw:z-index="40"><draw:text-box fo:min-height="3.7291in"><text:p text:style-name="Figure"><draw:frame draw:style-name="fr3" draw:name="Image1" text:anchor-type="paragraph" svg:width="2.302in" style:rel-width="100%" svg:height="3.7291in" style:rel-height="scale" draw:z-index="41"><draw:image xlink:href="Pictures/10000000000000DD0000016658DBA47C.png" xlink:type="simple" xlink:show="embed" xlink:actuate="onLoad" draw:mime-type="image/png"/></draw:frame>Figure <text:sequence text:ref-name="refFigure3" text:name="Figure" text:formula="ooow:Figure+1" style:num-format="1">1</text:sequence>: Common schematic symbols for circuits.</text:p></draw:text-box></draw:frame>To draw a circuit, pick the parts that must be used and connect the ends to complete the loop.</text:p>
      <text:h text:style-name="Heading_20_2" text:outline-level="2"><text:bookmark-start text:name="__RefHeading___Toc125_3396213957"/>Ohm’s Law<text:bookmark-end text:name="__RefHeading___Toc125_3396213957"/></text:h>
      <text:p text:style-name="P15">In the early nineteenth century, Georg Ohm defined the fundamental relationship between voltage (<draw:frame draw:style-name="fr1" draw:name="Object1" text:anchor-type="as-char" svg:y="-0.1492in" svg:width="0.1272in" svg:height="0.1854in" draw:z-index="0"><draw:object xlink:href="./Object 1" xlink:type="simple" xlink:show="embed" xlink:actuate="onLoad"/><draw:image xlink:href="./ObjectReplacements/Object 1" xlink:type="simple" xlink:show="embed" xlink:actuate="onLoad"/></draw:frame>), current (<draw:frame draw:style-name="fr1" draw:name="Object2" text:anchor-type="as-char" svg:y="-0.1492in" svg:width="0.0807in" svg:height="0.1854in" draw:z-index="1"><draw:object xlink:href="./Object 2" xlink:type="simple" xlink:show="embed" xlink:actuate="onLoad"/><draw:image xlink:href="./ObjectReplacements/Object 2" xlink:type="simple" xlink:show="embed" xlink:actuate="onLoad"/></draw:frame>), and resistance (<draw:frame draw:style-name="fr1" draw:name="Object3" text:anchor-type="as-char" svg:y="-0.1492in" svg:width="0.1181in" svg:height="0.1854in" draw:z-index="2"><draw:object xlink:href="./Object 3" xlink:type="simple" xlink:show="embed" xlink:actuate="onLoad"/><draw:image xlink:href="./ObjectReplacements/Object 3" xlink:type="simple" xlink:show="embed" xlink:actuate="onLoad"/></draw:frame>) in electric circuits. His experiments represent the beginning of circuit analysis. Today, the formula for <text:span text:style-name="T7">Ohm’s Law</text:span><text:span text:style-name="T5"> is still used by engineers when designing circuits:</text:span></text:p>
      <text:p text:style-name="P16"><text:soft-page-break/><draw:frame draw:style-name="fr1" draw:name="Object4" text:anchor-type="as-char" svg:y="-0.1492in" svg:width="0.4409in" svg:height="0.1854in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P17">Because electricity is very predictable, circuit performance can be analyzed with mathematical formulas such as Ohm’s Law before circuits are even constructed.</text:p>
      <text:h text:style-name="Heading_20_2" text:outline-level="2"><text:bookmark-start text:name="__RefHeading___Toc127_3396213957"/>Series Circuits<text:bookmark-end text:name="__RefHeading___Toc127_3396213957"/></text:h>
      <text:p text:style-name="P18">A <text:span text:style-name="T7">series circuit</text:span> is a circuit that only allows current to flow in one direction. <text:span text:style-name="T8">Series circuits only consist of </text:span><text:span text:style-name="T9">one loop</text:span><text:span text:style-name="T8">. </text:span><text:span text:style-name="T10">See the formulas:</text:span></text:p>
      <text:p text:style-name="P19"><draw:frame draw:style-name="fr4" draw:name="Frame6" text:anchor-type="paragraph" svg:width="2.6311in" style:rel-width="38%" svg:height="3.05in" style:rel-height="scale-min" draw:z-index="42"><draw:text-box><text:p text:style-name="Figure"><draw:frame draw:style-name="fr3" draw:name="Image3" text:anchor-type="paragraph" svg:width="2.6311in" style:rel-width="100%" svg:height="2.3917in" style:rel-height="scale" draw:z-index="43"><draw:image xlink:href="Pictures/10000001000000DC000000C8C3EDA513.png" xlink:type="simple" xlink:show="embed" xlink:actuate="onLoad" draw:mime-type="image/png"/></draw:frame>Figure <text:sequence text:ref-name="refFigure5" text:name="Figure" text:formula="ooow:Figure+1" style:num-format="1">2</text:sequence>: Relationships between current, voltage, and resistance in series circuits.</text:p></draw:text-box></draw:frame>There are <text:span text:style-name="T11">four</text:span> essential facts about series circuits:</text:p>
      <text:list text:style-name="L2">
        <text:list-item>
          <text:p text:style-name="P20">If one resistor fails, the other resistors also fail.</text:p>
        </text:list-item>
        <text:list-item>
          <text:p text:style-name="P20">Current remains <text:span text:style-name="T7">constant</text:span>.</text:p>
        </text:list-item>
        <text:list-item>
          <text:p text:style-name="P20">Voltage and resistance <text:span text:style-name="T7">add up</text:span><text:span text:style-name="T5">.</text:span></text:p>
        </text:list-item>
        <text:list-item>
          <text:p text:style-name="P20">The total resistance will be <text:span text:style-name="T7">larger</text:span> than the largest resistor in the loop.</text:p>
        </text:list-item>
      </text:list>
      <text:h text:style-name="Heading_20_2" text:outline-level="2"><text:bookmark-start text:name="__RefHeading___Toc285_2810426664"/>Parallel Circuits<text:bookmark-end text:name="__RefHeading___Toc285_2810426664"/></text:h>
      <text:p text:style-name="P21">A <text:span text:style-name="T7">parallel circuit</text:span><text:span text:style-name="T5"> is a circuit that allows current to flow in multiple directions. </text:span><text:span text:style-name="T12">While series circuits only have one loop, parallel circuits have </text:span><text:span text:style-name="T9">multiple loops</text:span><text:span text:style-name="T12">. </text:span><text:span text:style-name="T13">See the equations:</text:span></text:p>
      <text:p text:style-name="P22"><draw:frame draw:style-name="fr2" draw:name="Frame5" text:anchor-type="char" svg:width="2.3693in" draw:z-index="44"><draw:text-box fo:min-height="2.228in"><text:p text:style-name="Figure"><draw:frame draw:style-name="fr3" draw:name="Image2" text:anchor-type="paragraph" svg:width="2.3693in" style:rel-width="100%" svg:height="2.228in" style:rel-height="scale" draw:z-index="45"><draw:image xlink:href="Pictures/10000001000000D9000000CC38B42EAB.png" xlink:type="simple" xlink:show="embed" xlink:actuate="onLoad" draw:mime-type="image/png"/></draw:frame>Figure <text:sequence text:ref-name="refFigure4" text:name="Figure" text:formula="ooow:Figure+1" style:num-format="1">3</text:sequence>: Relationships between current, voltage, and resistance in parallel circuits.</text:p></draw:text-box></draw:frame><text:soft-page-break/>Below are four key facts about parallel circuits:</text:p>
      <text:list text:style-name="L3">
        <text:list-item>
          <text:p text:style-name="P23">If one resistor goes out, the others can still stay on.</text:p>
        </text:list-item>
        <text:list-item>
          <text:p text:style-name="P23">Voltage remains <text:span text:style-name="T7">constant</text:span>.</text:p>
        </text:list-item>
        <text:list-item>
          <text:p text:style-name="P24">Current and the reciprocals of the resistors <text:span text:style-name="T7">add up</text:span>, as demonstrated by the formula:</text:p>
          <text:p text:style-name="P25"><draw:frame draw:style-name="fr1" draw:name="Object8" text:anchor-type="as-char" svg:y="-0.2445in" svg:width="1.5028in" svg:height="0.4201in" draw:z-index="4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23">The total resistance will be <text:span text:style-name="T7">smaller</text:span> than the smallest resistor.</text:p>
        </text:list-item>
      </text:list>
      <text:h text:style-name="P26" text:outline-level="1"><text:bookmark-start text:name="__RefHeading___Toc378_1365886015"/>Electrical Work <text:span text:style-name="T14">and </text:span>Power<text:bookmark-end text:name="__RefHeading___Toc378_1365886015"/></text:h>
      <text:p text:style-name="P27"><text:span text:style-name="T7">Electrical work </text:span>is the amount of energy that is used by a circuit (measured in joules, <draw:frame draw:style-name="fr1" draw:name="Object10" text:anchor-type="as-char" svg:y="-0.1492in" svg:width="0.0756in" svg:height="0.1854in" draw:z-index="38"><draw:object xlink:href="./Object 10" xlink:type="simple" xlink:show="embed" xlink:actuate="onLoad"/><draw:image xlink:href="./ObjectReplacements/Object 10" xlink:type="simple" xlink:show="embed" xlink:actuate="onLoad"/></draw:frame>). <text:span text:style-name="T7">Electrical power</text:span><text:span text:style-name="T5">, on the other hand, is the rate of doing work or expending energy (measured in watts, </text:span><text:span text:style-name="T5"><draw:frame draw:style-name="fr1" draw:name="Object9" text:anchor-type="as-char" svg:y="-0.1492in" svg:width="0.1752in" svg:height="0.1854in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5">).</text:span></text:p>
      <text:p text:style-name="P28">To calculate work given a charge and voltage, use the model:</text:p>
      <text:p text:style-name="P29"><draw:frame draw:style-name="fr1" draw:name="Object11" text:anchor-type="as-char" svg:y="-0.1492in" svg:width="0.5161in" svg:height="0.1854in" draw:z-index="6"><draw:object xlink:href="./Object 11" xlink:type="simple" xlink:show="embed" xlink:actuate="onLoad"/><draw:image xlink:href="./ObjectReplacements/Object 11" xlink:type="simple" xlink:show="embed" xlink:actuate="onLoad"/></draw:frame>,</text:p>
      <text:p text:style-name="P30">where <draw:frame draw:style-name="fr1" draw:name="Object12" text:anchor-type="as-char" svg:y="-0.1492in" svg:width="0.161in" svg:height="0.1854in" draw:z-index="7"><draw:object xlink:href="./Object 12" xlink:type="simple" xlink:show="embed" xlink:actuate="onLoad"/><draw:image xlink:href="./ObjectReplacements/Object 12" xlink:type="simple" xlink:show="embed" xlink:actuate="onLoad"/></draw:frame><text:s/>is the work done, <draw:frame draw:style-name="fr1" draw:name="Object13" text:anchor-type="as-char" svg:y="-0.1492in" svg:width="0.0925in" svg:height="0.1854in" draw:z-index="8"><draw:object xlink:href="./Object 13" xlink:type="simple" xlink:show="embed" xlink:actuate="onLoad"/><draw:image xlink:href="./ObjectReplacements/Object 13" xlink:type="simple" xlink:show="embed" xlink:actuate="onLoad"/></draw:frame><text:s/>is the charge (in coulombs, <draw:frame draw:style-name="fr1" draw:name="Object14" text:anchor-type="as-char" svg:y="-0.1492in" svg:width="0.1134in" svg:height="0.1854in" draw:z-index="9"><draw:object xlink:href="./Object 14" xlink:type="simple" xlink:show="embed" xlink:actuate="onLoad"/><draw:image xlink:href="./ObjectReplacements/Object 14" xlink:type="simple" xlink:show="embed" xlink:actuate="onLoad"/></draw:frame>), and <draw:frame draw:style-name="fr1" draw:name="Object15" text:anchor-type="as-char" svg:y="-0.1492in" svg:width="0.1272in" svg:height="0.1854in" draw:z-index="10"><draw:object xlink:href="./Object 15" xlink:type="simple" xlink:show="embed" xlink:actuate="onLoad"/><draw:image xlink:href="./ObjectReplacements/Object 15" xlink:type="simple" xlink:show="embed" xlink:actuate="onLoad"/></draw:frame><text:s/>is the voltage.</text:p>
      <text:p text:style-name="P30">You can also use:</text:p>
      <text:p text:style-name="P29"><draw:frame draw:style-name="fr1" draw:name="Object16" text:anchor-type="as-char" svg:y="-0.2681in" svg:width="1.7209in" svg:height="0.4189in" draw:z-index="11"><draw:object xlink:href="./Object 16" xlink:type="simple" xlink:show="embed" xlink:actuate="onLoad"/><draw:image xlink:href="./ObjectReplacements/Object 16" xlink:type="simple" xlink:show="embed" xlink:actuate="onLoad"/></draw:frame>,</text:p>
      <text:p text:style-name="P30">where <draw:frame draw:style-name="fr1" draw:name="Object17" text:anchor-type="as-char" svg:y="-0.1492in" svg:width="0.1165in" svg:height="0.1854in" draw:z-index="12"><draw:object xlink:href="./Object 17" xlink:type="simple" xlink:show="embed" xlink:actuate="onLoad"/><draw:image xlink:href="./ObjectReplacements/Object 17" xlink:type="simple" xlink:show="embed" xlink:actuate="onLoad"/></draw:frame><text:s/>is the power, <draw:frame draw:style-name="fr1" draw:name="Object18" text:anchor-type="as-char" svg:y="-0.1492in" svg:width="0.0602in" svg:height="0.1854in" draw:z-index="13"><draw:object xlink:href="./Object 18" xlink:type="simple" xlink:show="embed" xlink:actuate="onLoad"/><draw:image xlink:href="./ObjectReplacements/Object 18" xlink:type="simple" xlink:show="embed" xlink:actuate="onLoad"/></draw:frame><text:s/>is the time interval (in seconds), <draw:frame draw:style-name="fr1" draw:name="Object19" text:anchor-type="as-char" svg:y="-0.1492in" svg:width="0.0807in" svg:height="0.1854in" draw:z-index="14"><draw:object xlink:href="./Object 19" xlink:type="simple" xlink:show="embed" xlink:actuate="onLoad"/><draw:image xlink:href="./ObjectReplacements/Object 19" xlink:type="simple" xlink:show="embed" xlink:actuate="onLoad"/></draw:frame><text:s/>is the current, and <draw:frame draw:style-name="fr1" draw:name="Object20" text:anchor-type="as-char" svg:y="-0.1492in" svg:width="0.1181in" svg:height="0.1854in" draw:z-index="15"><draw:object xlink:href="./Object 20" xlink:type="simple" xlink:show="embed" xlink:actuate="onLoad"/><draw:image xlink:href="./ObjectReplacements/Object 20" xlink:type="simple" xlink:show="embed" xlink:actuate="onLoad"/></draw:frame><text:s/>is the resistance.</text:p>
      <text:p text:style-name="P31">Although the above formula can be used to calculate work, its variables can be arranged to create a mathematical model for calculating power, <draw:frame draw:style-name="fr1" draw:name="Object21" text:anchor-type="as-char" svg:y="-0.1492in" svg:width="0.1165in" svg:height="0.1854in" draw:z-index="16"><draw:object xlink:href="./Object 21" xlink:type="simple" xlink:show="embed" xlink:actuate="onLoad"/><draw:image xlink:href="./ObjectReplacements/Object 21" xlink:type="simple" xlink:show="embed" xlink:actuate="onLoad"/></draw:frame>. Thus, we can form the equation:</text:p>
      <text:p text:style-name="P32"><draw:frame draw:style-name="fr1" draw:name="Object22" text:anchor-type="as-char" svg:y="-0.2681in" svg:width="1.1909in" svg:height="0.4189in" draw:z-index="17"><draw:object xlink:href="./Object 22" xlink:type="simple" xlink:show="embed" xlink:actuate="onLoad"/><draw:image xlink:href="./ObjectReplacements/Object 22" xlink:type="simple" xlink:show="embed" xlink:actuate="onLoad"/></draw:frame>.</text:p>
      <text:h text:style-name="P33" text:outline-level="2"><text:bookmark-start text:name="__RefHeading___Toc380_1365886015"/><text:soft-page-break/>Analog<text:span text:style-name="T15">y</text:span> for Power<text:bookmark-end text:name="__RefHeading___Toc380_1365886015"/></text:h>
      <text:p text:style-name="P34">There are some restrictions on each circuit in your home. A <text:span text:style-name="T7">fuse</text:span> or <text:span text:style-name="T7">circuit breaker</text:span> protects each circuit. The protection is needed because too much current can heat or burn the wires in the walls of your home, potentially causing an <text:span text:style-name="T7">electrical fire</text:span><text:span text:style-name="T5">.</text:span></text:p>
      <text:p text:style-name="P35">Most people think about the fuse or circuit breaker only when it turns off the electricity to a part of your home. The circuit is shut down when too much current is required. In most household circuits, the maximum current is usually <draw:frame draw:style-name="fr1" draw:name="Object23" text:anchor-type="as-char" svg:y="-0.1492in" svg:width="0.1693in" svg:height="0.1854in" draw:z-index="18"><draw:object xlink:href="./Object 23" xlink:type="simple" xlink:show="embed" xlink:actuate="onLoad"/><draw:image xlink:href="./ObjectReplacements/Object 23" xlink:type="simple" xlink:show="embed" xlink:actuate="onLoad"/></draw:frame><text:s/>or <draw:frame draw:style-name="fr1" draw:name="Object24" text:anchor-type="as-char" svg:y="-0.1492in" svg:width="0.1709in" svg:height="0.1854in" draw:z-index="19"><draw:object xlink:href="./Object 24" xlink:type="simple" xlink:show="embed" xlink:actuate="onLoad"/><draw:image xlink:href="./ObjectReplacements/Object 24" xlink:type="simple" xlink:show="embed" xlink:actuate="onLoad"/></draw:frame><text:s/>amperes. Each appliance in a typical house requires a certain amount of current to run properly.</text:p>
      <text:p text:style-name="P35">The voltage of almost all of the circuits in a house is <draw:frame draw:style-name="fr1" draw:name="Object25" text:anchor-type="as-char" svg:y="-0.1492in" svg:width="0.4043in" svg:height="0.1854in" draw:z-index="20"><draw:object xlink:href="./Object 25" xlink:type="simple" xlink:show="embed" xlink:actuate="onLoad"/><draw:image xlink:href="./ObjectReplacements/Object 25" xlink:type="simple" xlink:show="embed" xlink:actuate="onLoad"/></draw:frame>. If the fuse or circuit breaker can handle a maximum of <draw:frame draw:style-name="fr1" draw:name="Object26" text:anchor-type="as-char" svg:y="-0.1492in" svg:width="0.3217in" svg:height="0.1854in" draw:z-index="21"><draw:object xlink:href="./Object 26" xlink:type="simple" xlink:show="embed" xlink:actuate="onLoad"/><draw:image xlink:href="./ObjectReplacements/Object 26" xlink:type="simple" xlink:show="embed" xlink:actuate="onLoad"/></draw:frame>, then the power limit is:</text:p>
      <text:p text:style-name="P36"><text:span text:style-name="T5"><draw:frame draw:style-name="fr1" draw:name="Object27" text:anchor-type="as-char" svg:y="-0.1528in" svg:width="2.2189in" svg:height="0.2016in" draw:z-index="22"><draw:object xlink:href="./Object 27" xlink:type="simple" xlink:show="embed" xlink:actuate="onLoad"/><draw:image xlink:href="./ObjectReplacements/Object 27" xlink:type="simple" xlink:show="embed" xlink:actuate="onLoad"/></draw:frame></text:span><text:span text:style-name="T5">.</text:span></text:p>
      <text:h text:style-name="P37" text:outline-level="1"><text:bookmark-start text:name="__RefHeading___Toc384_1365886015"/>Kirch<text:span text:style-name="T16">h</text:span>off’s Laws<text:bookmark-end text:name="__RefHeading___Toc384_1365886015"/></text:h>
      <text:p text:style-name="P38">Kirch<text:span text:style-name="T16">h</text:span>off’s Laws<text:span text:style-name="T5"> relate to charge, voltage, and how they are conserved in a circuit.</text:span></text:p>
      <text:h text:style-name="P39" text:outline-level="2"><text:bookmark-start text:name="__RefHeading___Toc429_2478214970"/>Conservation of Charge<text:bookmark-end text:name="__RefHeading___Toc429_2478214970"/></text:h>
      <text:p text:style-name="P40">Conservation of charge<text:span text:style-name="T5"> means that the total amount of electrons and protons remains the same, resulting in a net charge of </text:span><text:span text:style-name="T5"><draw:frame draw:style-name="fr1" draw:name="Object36" text:anchor-type="as-char" svg:y="-0.1492in" svg:width="0.0882in" svg:height="0.1854in" draw:z-index="23"><draw:object xlink:href="./Object 36" xlink:type="simple" xlink:show="embed" xlink:actuate="onLoad"/><draw:image xlink:href="./ObjectReplacements/Object 36" xlink:type="simple" xlink:show="embed" xlink:actuate="onLoad"/></draw:frame></text:span><text:span text:style-name="T5">.</text:span></text:p>
      <text:h text:style-name="P39" text:outline-level="2"><text:bookmark-start text:name="__RefHeading___Toc431_2478214970"/>The Ammeter<text:bookmark-end text:name="__RefHeading___Toc431_2478214970"/></text:h>
      <text:p text:style-name="P41"><text:span text:style-name="T5">The </text:span><text:span text:style-name="T7">ammeter</text:span><text:span text:style-name="T5"> is a device used to measure current </text:span><text:span text:style-name="T17">in amperes (</text:span><text:span text:style-name="T17"><draw:frame draw:style-name="fr1" draw:name="Object37" text:anchor-type="as-char" svg:y="-0.1492in" svg:width="0.1354in" svg:height="0.1854in" draw:z-index="24"><draw:object xlink:href="./Object 37" xlink:type="simple" xlink:show="embed" xlink:actuate="onLoad"/><draw:image xlink:href="./ObjectReplacements/Object 37" xlink:type="simple" xlink:show="embed" xlink:actuate="onLoad"/></draw:frame></text:span><text:span text:style-name="T17">)</text:span><text:span text:style-name="T5">. It is represented using the following symbol:</text:span></text:p>
      <text:h text:style-name="P42" text:outline-level="3"><text:bookmark-start text:name="__RefHeading___Toc433_2478214970"/><draw:frame draw:style-name="fr5" draw:name="Image4" text:anchor-type="char" svg:width="1.7602in" svg:height="0.4063in" draw:z-index="54"><draw:image xlink:href="Pictures/10000000000000A900000027CB4FE0C0.png" xlink:type="simple" xlink:show="embed" xlink:actuate="onLoad" draw:mime-type="image/png"/></draw:frame>Connecting Ammeters<text:bookmark-end text:name="__RefHeading___Toc433_2478214970"/></text:h>
      <text:p text:style-name="P43">Ammeters are connected in series. Current is constant in a series circuit, so when an ammeter <text:span text:style-name="T18">is connected </text:span>in series, it reads the same current as the device <text:span text:style-name="T19">being</text:span> measur<text:span text:style-name="T19">ed</text:span>.</text:p>
      <text:h text:style-name="P44" text:outline-level="2"><text:bookmark-start text:name="__RefHeading___Toc435_2478214970"/>The Voltmeter<text:bookmark-end text:name="__RefHeading___Toc435_2478214970"/></text:h>
      <text:p text:style-name="P45">The <text:span text:style-name="T7">voltmeter</text:span><text:span text:style-name="T5"> is a device used to measure voltage in volts (</text:span><text:span text:style-name="T5"><draw:frame draw:style-name="fr1" draw:name="Object38" text:anchor-type="as-char" svg:y="-0.1492in" svg:width="0.1346in" svg:height="0.1854in" draw:z-index="25"><draw:object xlink:href="./Object 38" xlink:type="simple" xlink:show="embed" xlink:actuate="onLoad"/><draw:image xlink:href="./ObjectReplacements/Object 38" xlink:type="simple" xlink:show="embed" xlink:actuate="onLoad"/></draw:frame></text:span><text:span text:style-name="T5">). It is drawn using the symbol:</text:span></text:p>
      <text:h text:style-name="P46" text:outline-level="3"><text:bookmark-start text:name="__RefHeading___Toc437_2478214970"/><draw:frame draw:style-name="fr5" draw:name="Image5" text:anchor-type="char" svg:width="1.7602in" svg:height="0.4374in" draw:z-index="55"><draw:image xlink:href="Pictures/10000000000000A90000002A0DD6F258.png" xlink:type="simple" xlink:show="embed" xlink:actuate="onLoad" draw:mime-type="image/png"/></draw:frame>Connecting Voltmeters<text:bookmark-end text:name="__RefHeading___Toc437_2478214970"/></text:h>
      <text:p text:style-name="P47">Voltmeters are connected in parallel. Voltage is constant in a parallel circuit, so when a voltmeter is connected in parallel, it reads the same voltage as the device being measured.</text:p>
      <text:h text:style-name="P44" text:outline-level="2"><text:bookmark-start text:name="__RefHeading___Toc439_2478214970"/><text:soft-page-break/>Gustav Robert Kirch<text:span text:style-name="T16">h</text:span>off<text:bookmark-end text:name="__RefHeading___Toc439_2478214970"/></text:h>
      <text:p text:style-name="P48">Gustav Robert Kirch<text:span text:style-name="T16">h</text:span>off<text:span text:style-name="T5"> is a German physicist who studied how current flowed.</text:span></text:p>
      <text:h text:style-name="P46" text:outline-level="3"><text:bookmark-start text:name="__RefHeading___Toc441_2478214970"/>Kirch<text:span text:style-name="T16">h</text:span>off’s First Law<text:bookmark-end text:name="__RefHeading___Toc441_2478214970"/></text:h>
      <text:p text:style-name="P45"><text:span text:style-name="T7">Kirch</text:span><text:span text:style-name="T20">h</text:span><text:span text:style-name="T7">off’s </text:span><text:span text:style-name="T21">F</text:span><text:span text:style-name="T7">irst </text:span><text:span text:style-name="T21">L</text:span><text:span text:style-name="T7">aw</text:span>, also known as the <text:span text:style-name="T7">junction </text:span><text:span text:style-name="T22">rule</text:span><text:span text:style-name="T5">, states that total current entering a junction </text:span><text:span text:style-name="T23">(node)</text:span><text:span text:style-name="T5"> is equal to the total current </text:span><text:span text:style-name="T23">leaving it </text:span><text:span text:style-name="T5">(conservation of charge).</text:span></text:p>
      <text:h text:style-name="P49" text:outline-level="3"><draw:frame draw:style-name="fr6" draw:name="Frame1" text:anchor-type="paragraph" svg:width="3.8091in" style:rel-width="55%" svg:height="2.9209in" style:rel-height="scale-min" draw:z-index="56"><draw:text-box><text:p text:style-name="Figure"><draw:frame draw:style-name="fr3" draw:name="Image6" text:anchor-type="paragraph" svg:width="3.8091in" style:rel-width="100%" svg:height="2.2626in" style:rel-height="scale" draw:z-index="57"><draw:image xlink:href="Pictures/10000000000001B9000001061A4424F6.png" xlink:type="simple" xlink:show="embed" xlink:actuate="onLoad" draw:mime-type="image/png"/></draw:frame>Figure <text:sequence text:ref-name="refFigure0" text:name="Figure" text:formula="ooow:Figure+1" style:num-format="1">4</text:sequence>: Ammeter A reads <draw:frame draw:style-name="fr7" draw:name="Object49" text:anchor-type="as-char" svg:y="-0.1492in" svg:width="0.248in" svg:height="0.1854in" draw:z-index="59"><draw:object xlink:href="./Object 49" xlink:type="simple" xlink:show="embed" xlink:actuate="onLoad"/><draw:image xlink:href="./ObjectReplacements/Object 49" xlink:type="simple" xlink:show="embed" xlink:actuate="onLoad"/></draw:frame><text:s/>because the total current entering the node (<draw:frame draw:style-name="fr7" draw:name="Object48" text:anchor-type="as-char" svg:y="-0.1492in" svg:width="0.2409in" svg:height="0.1854in" draw:z-index="58"><draw:object xlink:href="./Object 48" xlink:type="simple" xlink:show="embed" xlink:actuate="onLoad"/><draw:image xlink:href="./ObjectReplacements/Object 48" xlink:type="simple" xlink:show="embed" xlink:actuate="onLoad"/></draw:frame>) must equal the total current leaving the node.</text:p></draw:text-box></draw:frame><text:bookmark-start text:name="__RefHeading___Toc443_2478214970"/>Kirch<text:span text:style-name="T16">h</text:span>off’s Second Law<text:bookmark-end text:name="__RefHeading___Toc443_2478214970"/></text:h>
      <text:p text:style-name="P50">Kirc<text:span text:style-name="T16">h</text:span>hoff’s Second Law<text:span text:style-name="T5">, </text:span><text:span text:style-name="T24">also known as the</text:span><text:span text:style-name="T25"> loop rule</text:span><text:span text:style-name="T24">,</text:span> <text:span text:style-name="T5">states </text:span><text:span text:style-name="T26">in any complete circuit loop, the sum of the voltage gains (the battery) is equal to the sum of the voltage losses (the resistors).</text:span></text:p>
      <text:h text:style-name="P51" text:outline-level="1"><text:bookmark-start text:name="__RefHeading___Toc539_1024500351"/>Current and Resistance<text:bookmark-end text:name="__RefHeading___Toc539_1024500351"/></text:h>
      <text:p text:style-name="P38">Current <text:span text:style-name="T5">and </text:span>resistance<text:span text:style-name="T5"> are two essential topics for understanding electricity.</text:span></text:p>
      <text:h text:style-name="P52" text:outline-level="2"><text:bookmark-start text:name="__RefHeading___Toc677_1024500351"/>What is Current?<text:bookmark-end text:name="__RefHeading___Toc677_1024500351"/></text:h>
      <text:p text:style-name="P53">Current<text:span text:style-name="T5"> is the rate at which charge flows past a point in a circuit. It can be calculated using:</text:span></text:p>
      <text:p text:style-name="P54"><draw:frame draw:style-name="fr1" draw:name="Object39" text:anchor-type="as-char" svg:y="-0.2445in" svg:width="0.4764in" svg:height="0.3953in" draw:z-index="27"><draw:object xlink:href="./Object 39" xlink:type="simple" xlink:show="embed" xlink:actuate="onLoad"/><draw:image xlink:href="./ObjectReplacements/Object 39" xlink:type="simple" xlink:show="embed" xlink:actuate="onLoad"/></draw:frame>,</text:p>
      <text:p text:style-name="P55">where <draw:frame draw:style-name="fr1" draw:name="Object40" text:anchor-type="as-char" svg:y="-0.1492in" svg:width="0.0807in" svg:height="0.1854in" draw:z-index="28"><draw:object xlink:href="./Object 40" xlink:type="simple" xlink:show="embed" xlink:actuate="onLoad"/><draw:image xlink:href="./ObjectReplacements/Object 40" xlink:type="simple" xlink:show="embed" xlink:actuate="onLoad"/></draw:frame><text:s/>is the current in amperes (<draw:frame draw:style-name="fr1" draw:name="Object41" text:anchor-type="as-char" svg:y="-0.1492in" svg:width="0.1354in" svg:height="0.1854in" draw:z-index="29"><draw:object xlink:href="./Object 41" xlink:type="simple" xlink:show="embed" xlink:actuate="onLoad"/><draw:image xlink:href="./ObjectReplacements/Object 41" xlink:type="simple" xlink:show="embed" xlink:actuate="onLoad"/></draw:frame>), <draw:frame draw:style-name="fr1" draw:name="Object42" text:anchor-type="as-char" svg:y="-0.1492in" svg:width="0.2217in" svg:height="0.1854in" draw:z-index="30"><draw:object xlink:href="./Object 42" xlink:type="simple" xlink:show="embed" xlink:actuate="onLoad"/><draw:image xlink:href="./ObjectReplacements/Object 42" xlink:type="simple" xlink:show="embed" xlink:actuate="onLoad"/></draw:frame><text:s/>is the change in charge, and <draw:frame draw:style-name="fr1" draw:name="Object43" text:anchor-type="as-char" svg:y="-0.1492in" svg:width="0.0602in" svg:height="0.1854in" draw:z-index="31"><draw:object xlink:href="./Object 43" xlink:type="simple" xlink:show="embed" xlink:actuate="onLoad"/><draw:image xlink:href="./ObjectReplacements/Object 43" xlink:type="simple" xlink:show="embed" xlink:actuate="onLoad"/></draw:frame><text:s/>is the time elapsed.</text:p>
      <text:p text:style-name="P55">One ampere is essentially one coulomb per second, as per the formula above.</text:p>
      <text:h text:style-name="Heading_20_3" text:outline-level="3"><text:bookmark-start text:name="__RefHeading___Toc679_1024500351"/>Types of Current<text:bookmark-end text:name="__RefHeading___Toc679_1024500351"/></text:h>
      <text:p text:style-name="P56">There are two types of current: <text:span text:style-name="T7">conventional current</text:span> and <text:span text:style-name="T7">electron </text:span><text:span text:style-name="T27">flow</text:span><text:span text:style-name="T7">. </text:span>Conventional current is the flow of positive charges from a positive end to a negative end. Meanwhile, electron <text:span text:style-name="T28">flow</text:span> is the flow of electrons from a negative end to a positive end.</text:p>
      <text:h text:style-name="P57" text:outline-level="2"><draw:frame draw:style-name="fr6" draw:name="Frame2" text:anchor-type="paragraph" svg:width="3.4626in" style:rel-width="50%" svg:height="3.7193in" style:rel-height="scale-min" draw:z-index="60"><draw:text-box><text:p text:style-name="Figure"><draw:frame draw:style-name="fr3" draw:name="Image7" text:anchor-type="paragraph" svg:width="3.4626in" style:rel-width="100%" svg:height="3.2528in" style:rel-height="scale" draw:z-index="61"><draw:image xlink:href="Pictures/10000001000001AE0000019446C682F6.png" xlink:type="simple" xlink:show="embed" xlink:actuate="onLoad" draw:mime-type="image/png"/></draw:frame>Figure <text:sequence text:ref-name="refFigure1" text:name="Figure" text:formula="ooow:Figure+1" style:num-format="1">5</text:sequence>: The flow of charges in conventional current and electron <text:span text:style-name="T29">flow</text:span>.</text:p></draw:text-box></draw:frame><text:bookmark text:name="__DdeLink__597_1024500351"/><text:bookmark-start text:name="__RefHeading___Toc681_1024500351"/><text:soft-page-break/>What is Resistance?<text:bookmark-end text:name="__RefHeading___Toc681_1024500351"/></text:h>
      <text:p text:style-name="P58">Resistance<text:span text:style-name="T5">, measured in ohms (</text:span><text:span text:style-name="T5"><draw:frame draw:style-name="fr1" draw:name="Object47" text:anchor-type="as-char" svg:y="-0.1492in" svg:width="0.1244in" svg:height="0.1854in" draw:z-index="39"><draw:object xlink:href="./Object 47" xlink:type="simple" xlink:show="embed" xlink:actuate="onLoad"/><draw:image xlink:href="./ObjectReplacements/Object 47" xlink:type="simple" xlink:show="embed" xlink:actuate="onLoad"/></draw:frame></text:span><text:span text:style-name="T5">) is the opposition to the flow of electrons.</text:span><text:bookmark-start text:name="__DdeLink__616_1024500351"/><text:bookmark-start text:name="__DdeLink__610_1024500351"/><text:span text:style-name="T5"> </text:span><text:bookmark-end text:name="__DdeLink__616_1024500351"/><text:bookmark-end text:name="__DdeLink__610_1024500351"/><text:span text:style-name="T5">Although resistance sounds like a negative aspect, it is very important in many circuits and is often used advantageously.</text:span></text:p>
      <text:h text:style-name="P59" text:outline-level="3"><text:bookmark-start text:name="__RefHeading___Toc683_1024500351"/>Factors Affecting Resistance<text:bookmark-end text:name="__RefHeading___Toc683_1024500351"/></text:h>
      <text:p text:style-name="P60">Resistance in a wire is primarily affected by the wire’s length, its <text:span text:style-name="T7">cross-sectional area</text:span><text:span text:style-name="T5">, and the temperature</text:span>. The wire’s length simply represents how long it is, while its cross-sectional area describes how thick it is. <text:bookmark-start text:name="__DdeLink__610_1024500351 Copy 1"/><text:span text:style-name="T30">The resistance in a metal conductor is directly proportional to the length and inversely proportional to the cross-sectional area. </text:span><text:bookmark-end text:name="__DdeLink__610_1024500351 Copy 1"/><text:span text:style-name="T5">Temperature is also directly proportional to resistance.</text:span></text:p>
      <text:h text:style-name="Heading_20_3" text:outline-level="3"><text:bookmark-start text:name="__RefHeading___Toc685_1024500351"/>Resistors<text:bookmark-end text:name="__RefHeading___Toc685_1024500351"/></text:h>
      <text:p text:style-name="P58">Resistors<text:span text:style-name="T5"> are devices that turn electrical current into heat energy. This is valuable in limiting current flow to another portion of a circuit.</text:span></text:p>
      <text:h text:style-name="P61" text:outline-level="4"><text:bookmark-start text:name="__RefHeading___Toc687_1024500351"/>Types of Resistors<text:bookmark-end text:name="__RefHeading___Toc687_1024500351"/></text:h>
      <text:p text:style-name="P60">There are two main types of resistors: <text:span text:style-name="T7">fixed resistors</text:span><text:span text:style-name="T5"> and </text:span><text:span text:style-name="T7">variable resistors</text:span><text:span text:style-name="T5"> (potentiometers). Their schematic symbols are different:</text:span></text:p>
      <text:h text:style-name="P61" text:outline-level="4"><text:bookmark-start text:name="__RefHeading___Toc689_1024500351"/><draw:frame draw:style-name="fr5" draw:name="Image8" text:anchor-type="char" svg:width="2.1457in" svg:height="0.8437in" draw:z-index="26"><draw:image xlink:href="Pictures/10000000000000CE000000515A1BFA9C.png" xlink:type="simple" xlink:show="embed" xlink:actuate="onLoad" draw:mime-type="image/png"/></draw:frame>Understanding Resistors<text:bookmark-end text:name="__RefHeading___Toc689_1024500351"/></text:h>
      <text:p text:style-name="P62">There are two ways to determine the value of a resistor: measuring it with a meter or reading the <text:span text:style-name="T7">color code</text:span>. Resistors are labeled using <text:span text:style-name="T7">bands</text:span>, each having its own color.</text:p>
      <text:h text:style-name="P63" text:outline-level="1" text:is-list-header="true"><draw:frame draw:style-name="fr6" draw:name="Frame3" text:anchor-type="paragraph" svg:width="4.5709in" style:rel-width="66%" svg:height="2.4874in" style:rel-height="scale-min" draw:z-index="62"><draw:text-box><text:p text:style-name="Figure"><draw:frame draw:style-name="fr3" draw:name="Image9" text:anchor-type="paragraph" svg:width="4.5709in" style:rel-width="100%" svg:height="2.2126in" style:rel-height="scale" draw:z-index="63"><draw:image xlink:href="Pictures/100000010000029500000140F180A92D.png" xlink:type="simple" xlink:show="embed" xlink:actuate="onLoad" draw:mime-type="image/png"/></draw:frame>Figure <text:sequence text:ref-name="refFigure2" text:name="Figure" text:formula="ooow:Figure+1" style:num-format="1">6</text:sequence>: The bands on a resistor labeled with colors.</text:p></draw:text-box></draw:frame><text:bookmark-start text:name="__RefHeading___Toc691_1024500351"/><text:soft-page-break/>Example<text:span text:style-name="T31">s and Applications</text:span><text:bookmark-end text:name="__RefHeading___Toc691_1024500351"/></text:h>
      <text:list text:style-name="L4">
        <text:list-item>
          <text:p text:style-name="P64">What is the current if <draw:frame draw:style-name="fr1" draw:name="Object44" text:anchor-type="as-char" svg:y="-0.1728in" svg:width="0.7075in" svg:height="0.2091in" draw:z-index="33"><draw:object xlink:href="./Object 44" xlink:type="simple" xlink:show="embed" xlink:actuate="onLoad"/><draw:image xlink:href="./ObjectReplacements/Object 44" xlink:type="simple" xlink:show="embed" xlink:actuate="onLoad"/><svg:desc>formula</svg:desc></draw:frame><text:s/>elementary charges pass by a given point every <draw:frame draw:style-name="fr1" draw:name="Object45" text:anchor-type="as-char" svg:y="-0.1492in" svg:width="0.3811in" svg:height="0.1854in" draw:z-index="34"><draw:object xlink:href="./Object 45" xlink:type="simple" xlink:show="embed" xlink:actuate="onLoad"/><draw:image xlink:href="./ObjectReplacements/Object 45" xlink:type="simple" xlink:show="embed" xlink:actuate="onLoad"/><svg:desc>formula</svg:desc></draw:frame>?</text:p>
          <text:p text:style-name="P65"><draw:frame draw:style-name="fr1" draw:name="Object46" text:anchor-type="as-char" svg:y="-0.5425in" svg:width="2.3839in" svg:height="1.0272in" draw:z-index="3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66">An electric razor has a resistance of <draw:frame draw:style-name="fr1" draw:name="Object28" text:anchor-type="as-char" svg:y="-0.1492in" svg:width="0.3508in" svg:height="0.1854in" draw:z-index="47"><draw:object xlink:href="./Object 29" xlink:type="simple" xlink:show="embed" xlink:actuate="onLoad"/><draw:image xlink:href="./ObjectReplacements/Object 29" xlink:type="simple" xlink:show="embed" xlink:actuate="onLoad"/><svg:desc>formula</svg:desc></draw:frame><text:s/>with a current of <draw:frame draw:style-name="fr1" draw:name="Object29" text:anchor-type="as-char" svg:y="-0.1492in" svg:width="0.3217in" svg:height="0.1854in" draw:z-index="48"><draw:object xlink:href="./Object 30" xlink:type="simple" xlink:show="embed" xlink:actuate="onLoad"/><draw:image xlink:href="./ObjectReplacements/Object 30" xlink:type="simple" xlink:show="embed" xlink:actuate="onLoad"/><svg:desc>formula</svg:desc></draw:frame>. What is the power developed by it?</text:p>
          <text:p text:style-name="P67"><draw:frame draw:style-name="fr1" draw:name="Object30" text:anchor-type="as-char" svg:y="-0.3445in" svg:width="1.239in" svg:height="0.6311in" draw:z-index="4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</text:list-item>
        <text:list-item>
          <text:p text:style-name="P68">What is the power rating for a light bulb that is rated for <draw:frame draw:style-name="fr1" draw:name="Object31" text:anchor-type="as-char" svg:y="-0.1492in" svg:width="0.4043in" svg:height="0.1854in" draw:z-index="50"><draw:object xlink:href="./Object 32" xlink:type="simple" xlink:show="embed" xlink:actuate="onLoad"/><draw:image xlink:href="./ObjectReplacements/Object 32" xlink:type="simple" xlink:show="embed" xlink:actuate="onLoad"/><svg:desc>formula</svg:desc></draw:frame><text:s/>and <draw:frame draw:style-name="fr1" draw:name="Object32" text:anchor-type="as-char" svg:y="-0.1492in" svg:width="0.3654in" svg:height="0.1854in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?</text:p>
          <text:p text:style-name="P67"><draw:frame draw:style-name="fr1" draw:name="Object33" text:anchor-type="as-char" svg:y="-0.3228in" svg:width="1.2846in" svg:height="0.5874in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</text:list-item>
        <text:list-item>
          <text:p text:style-name="P69">How much electrical energy is consumed by a <draw:frame draw:style-name="fr1" draw:name="Object34" text:anchor-type="as-char" svg:y="-0.1728in" svg:width="0.7646in" svg:height="0.2091in" draw:z-index="53"><draw:object xlink:href="./Object 35" xlink:type="simple" xlink:show="embed" xlink:actuate="onLoad"/><draw:image xlink:href="./ObjectReplacements/Object 35" xlink:type="simple" xlink:show="embed" xlink:actuate="onLoad"/><svg:desc>formula</svg:desc></draw:frame><text:s/>light bulb that is used for two hours?</text:p>
          <text:p text:style-name="P70"><draw:frame draw:style-name="fr1" draw:name="Object35" text:anchor-type="as-char" svg:y="-0.3445in" svg:width="2.4228in" svg:height="0.6311in" draw:z-index="4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4:22:15.225200250</meta:creation-date>
    <dc:date>2026-06-09T20:38:50.026067008</dc:date>
    <meta:editing-duration>PT4H5M34S</meta:editing-duration>
    <meta:editing-cycles>87</meta:editing-cycles>
    <meta:generator>LibreOffice/25.8.5.2$Linux_X86_64 LibreOffice_project/580$Build-2</meta:generator>
    <meta:document-statistic meta:table-count="0" meta:image-count="9" meta:object-count="49" meta:page-count="8" meta:paragraph-count="124" meta:word-count="1349" meta:character-count="7985" meta:non-whitespace-character-count="6756"/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0/content.xml><?xml version="1.0" encoding="utf-8"?>
<math xmlns="http://www.w3.org/1998/Math/MathML" display="block">
  <semantics>
    <mtext>J</mtext>
    <annotation encoding="StarMath 5.0">"J"</annotation>
  </semantics>
</math>
</file>

<file path=Object 11/content.xml><?xml version="1.0" encoding="utf-8"?>
<math xmlns="http://www.w3.org/1998/Math/MathML" display="block">
  <semantics>
    <mrow>
      <mi>W</mi>
      <mo stretchy="false">=</mo>
      <mi mathvariant="italic">qV</mi>
    </mrow>
    <annotation encoding="StarMath 5.0">W = qV</annotation>
  </semantics>
</math>
</file>

<file path=Object 12/content.xml><?xml version="1.0" encoding="utf-8"?>
<math xmlns="http://www.w3.org/1998/Math/MathML" display="block">
  <semantics>
    <mi>W</mi>
    <annotation encoding="StarMath 5.0">W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text>C</mtext>
    <annotation encoding="StarMath 5.0">"C"</annotation>
  </semantics>
</math>
</file>

<file path=Object 15/content.xml><?xml version="1.0" encoding="utf-8"?>
<math xmlns="http://www.w3.org/1998/Math/MathML" display="block">
  <semantics>
    <mi>V</mi>
    <annotation encoding="StarMath 5.0">V</annotation>
  </semantics>
</math>
</file>

<file path=Object 16/content.xml><?xml version="1.0" encoding="utf-8"?>
<math xmlns="http://www.w3.org/1998/Math/MathML" display="block">
  <semantics>
    <mrow>
      <mrow>
        <mi>W</mi>
        <mo stretchy="false">=</mo>
        <mi mathvariant="italic">Pt</mi>
        <mo stretchy="false">=</mo>
        <mi mathvariant="italic">VIt</mi>
        <mo stretchy="false">=</mo>
        <msup>
          <mi>I</mi>
          <mn>2</mn>
        </msup>
      </mrow>
      <mrow>
        <mi mathvariant="italic">Rt</mi>
        <mo stretchy="false">=</mo>
        <mfrac>
          <mrow>
            <msup>
              <mi>V</mi>
              <mn>2</mn>
            </msup>
            <mi>t</mi>
          </mrow>
          <mi>R</mi>
        </mfrac>
      </mrow>
    </mrow>
    <annotation encoding="StarMath 5.0">W = Pt = VIt = I^2 Rt = frac { V^2 t } { R }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>t</mi>
    <annotation encoding="StarMath 5.0">t</annotation>
  </semantics>
</math>
</file>

<file path=Object 19/content.xml><?xml version="1.0" encoding="utf-8"?>
<math xmlns="http://www.w3.org/1998/Math/MathML" display="block">
  <semantics>
    <mi>I</mi>
    <annotation encoding="StarMath 5.0">I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20/content.xml><?xml version="1.0" encoding="utf-8"?>
<math xmlns="http://www.w3.org/1998/Math/MathML" display="block">
  <semantics>
    <mi>R</mi>
    <annotation encoding="StarMath 5.0">R</annotation>
  </semantics>
</math>
</file>

<file path=Object 21/content.xml><?xml version="1.0" encoding="utf-8"?>
<math xmlns="http://www.w3.org/1998/Math/MathML" display="block">
  <semantics>
    <mi>P</mi>
    <annotation encoding="StarMath 5.0">P</annotation>
  </semantics>
</math>
</file>

<file path=Object 22/content.xml><?xml version="1.0" encoding="utf-8"?>
<math xmlns="http://www.w3.org/1998/Math/MathML" display="block">
  <semantics>
    <mrow>
      <mrow>
        <mi>P</mi>
        <mo stretchy="false">=</mo>
        <mi mathvariant="italic">VI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VI = I^2 R = frac { V^2 } { R }</annotation>
  </semantics>
</math>
</file>

<file path=Object 23/content.xml><?xml version="1.0" encoding="utf-8"?>
<math xmlns="http://www.w3.org/1998/Math/MathML" display="block">
  <semantics>
    <mn>15</mn>
    <annotation encoding="StarMath 5.0">15</annotation>
  </semantics>
</math>
</file>

<file path=Object 24/content.xml><?xml version="1.0" encoding="utf-8"?>
<math xmlns="http://www.w3.org/1998/Math/MathML" display="block">
  <semantics>
    <mn>20</mn>
    <annotation encoding="StarMath 5.0">20</annotation>
  </semantics>
</math>
</file>

<file path=Object 25/content.xml><?xml version="1.0" encoding="utf-8"?>
<math xmlns="http://www.w3.org/1998/Math/MathML" display="block">
  <semantics>
    <mrow>
      <mn>120</mn>
      <mtext>V</mtext>
    </mrow>
    <annotation encoding="StarMath 5.0">120 "V"</annotation>
  </semantics>
</math>
</file>

<file path=Object 26/content.xml><?xml version="1.0" encoding="utf-8"?>
<math xmlns="http://www.w3.org/1998/Math/MathML" display="block">
  <semantics>
    <mrow>
      <mn>15</mn>
      <mtext>A</mtext>
    </mrow>
    <annotation encoding="StarMath 5.0">15 "A"</annotation>
  </semantics>
</math>
</file>

<file path=Object 27/content.xml><?xml version="1.0" encoding="utf-8"?>
<math xmlns="http://www.w3.org/1998/Math/MathML" display="block">
  <semantics>
    <mrow>
      <mrow>
        <mi>P</mi>
        <mo stretchy="false">=</mo>
        <mi mathvariant="italic">VI</mi>
        <mo stretchy="false">=</mo>
        <mrow>
          <mo fence="true" form="prefix" stretchy="false">(</mo>
          <mrow>
            <mrow>
              <mn>120</mn>
              <mtext>V</mtext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n>15</mn>
              <mtext>A</mtext>
            </mrow>
          </mrow>
          <mo fence="true" form="postfix" stretchy="false">)</mo>
        </mrow>
        <mo stretchy="false">=</mo>
        <mn>1800</mn>
      </mrow>
      <mtext>W</mtext>
    </mrow>
    <annotation encoding="StarMath 5.0">P = VI = ( 120 "V" ) ( 15 "A" ) = 1800 "W"</annotation>
  </semantics>
</math>
</file>

<file path=Object 28/content.xml><?xml version="1.0" encoding="utf-8"?>
<math xmlns="http://www.w3.org/1998/Math/MathML" display="block">
  <semantics>
    <mtable>
      <mtr>
        <mtd>
          <mrow>
            <mi>W</mi>
            <mo stretchy="false">=</mo>
            <mi mathvariant="italic">Pt</mi>
          </mrow>
        </mtd>
      </mtr>
      <mtr>
        <mtd>
          <mrow>
            <mrow>
              <mi>W</mi>
              <mo stretchy="false">=</mo>
              <mrow>
                <mo fence="true" form="prefix" stretchy="false">(</mo>
                <mrow>
                  <mrow>
                    <mrow>
                      <mn>1.0</mn>
                      <mo stretchy="false">×</mo>
                      <msup>
                        <mn>10</mn>
                        <mn>2</mn>
                      </msup>
                    </mrow>
                    <mtext>W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2.0</mn>
                  <mrow>
                    <mtext>h</mtext>
                    <mo stretchy="false">⋅</mo>
                    <mn>60.</mn>
                  </mrow>
                  <mrow>
                    <mtext>m</mtext>
                    <mo stretchy="false">⋅</mo>
                    <mn>60.</mn>
                  </mrow>
                  <mtext>s</mtext>
                </mrow>
              </mrow>
              <mo fence="true" form="postfix" stretchy="false">)</mo>
            </mrow>
          </mrow>
        </mtd>
      </mtr>
      <mtr>
        <mtd>
          <mrow>
            <mrow>
              <mi>W</mi>
              <mo stretchy="false">=</mo>
              <mrow>
                <mn>7.2</mn>
                <mo stretchy="false">×</mo>
                <msup>
                  <mn>10</mn>
                  <mn>5</mn>
                </msup>
              </mrow>
            </mrow>
            <mtext>J</mtext>
          </mrow>
        </mtd>
      </mtr>
    </mtable>
    <annotation encoding="StarMath 5.0">W = Pt newline
W = ( 1.0 times 10^2 "W" ) ( 2.0 "h" cdot 60. "m" cdot 60. "s" ) newline
W = 7.2 times 10^5 "J"</annotation>
  </semantics>
</math>
</file>

<file path=Object 29/content.xml><?xml version="1.0" encoding="utf-8"?>
<math xmlns="http://www.w3.org/1998/Math/MathML" display="block">
  <semantics>
    <mrow>
      <mn>20.</mn>
      <mi mathvariant="normal">Ω</mi>
    </mrow>
    <annotation encoding="StarMath 5.0">20. %OMEGA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30/content.xml><?xml version="1.0" encoding="utf-8"?>
<math xmlns="http://www.w3.org/1998/Math/MathML" display="block">
  <semantics>
    <mrow>
      <mn>15</mn>
      <mtext>A</mtext>
    </mrow>
    <annotation encoding="StarMath 5.0">15 "A"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i>P</mi>
              <mo stretchy="false">=</mo>
              <msup>
                <mi>I</mi>
                <mn>2</mn>
              </msup>
            </mrow>
            <mi>R</mi>
          </mrow>
        </mtd>
      </mtr>
      <mtr>
        <mtd>
          <mrow>
            <mrow>
              <mi>P</mi>
              <mo stretchy="false">=</mo>
              <msup>
                <mrow>
                  <mo fence="true" form="prefix" stretchy="false">(</mo>
                  <mrow>
                    <mrow>
                      <mn>15</mn>
                      <mtext>A</mtext>
                    </mrow>
                  </mrow>
                  <mo fence="true" form="postfix" stretchy="false">)</mo>
                </mrow>
                <mn>2</mn>
              </msup>
            </mrow>
            <mrow>
              <mo fence="true" form="prefix" stretchy="false">(</mo>
              <mrow>
                <mrow>
                  <mn>20.</mn>
                  <mi mathvariant="normal">Ω</mi>
                </mrow>
              </mrow>
              <mo fence="true" form="postfix" stretchy="false">)</mo>
            </mrow>
          </mrow>
        </mtd>
      </mtr>
      <mtr>
        <mtd>
          <mrow>
            <mrow>
              <mi>P</mi>
              <mo stretchy="false">=</mo>
              <mn>4500</mn>
            </mrow>
            <mtext>W</mtext>
          </mrow>
        </mtd>
      </mtr>
    </mtable>
    <annotation encoding="StarMath 5.0">P = I^2 R newline
P = ( 15 "A" ) ^ 2 ( 20. %OMEGA ) newline
P = 4500 "W"</annotation>
  </semantics>
</math>
</file>

<file path=Object 32/content.xml><?xml version="1.0" encoding="utf-8"?>
<math xmlns="http://www.w3.org/1998/Math/MathML" display="block">
  <semantics>
    <mrow>
      <mn>120</mn>
      <mtext>V</mtext>
    </mrow>
    <annotation encoding="StarMath 5.0">120 "V"</annotation>
  </semantics>
</math>
</file>

<file path=Object 33/content.xml><?xml version="1.0" encoding="utf-8"?>
<math xmlns="http://www.w3.org/1998/Math/MathML" display="block">
  <semantics>
    <mrow>
      <mn>0.5</mn>
      <mtext>A</mtext>
    </mrow>
    <annotation encoding="StarMath 5.0">0.5 "A"</annotation>
  </semantics>
</math>
</file>

<file path=Object 34/content.xml><?xml version="1.0" encoding="utf-8"?>
<math xmlns="http://www.w3.org/1998/Math/MathML" display="block">
  <semantics>
    <mtable>
      <mtr>
        <mtd>
          <mrow>
            <mi>P</mi>
            <mo stretchy="false">=</mo>
            <mi mathvariant="italic">VI</mi>
          </mrow>
        </mtd>
      </mtr>
      <mtr>
        <mtd>
          <mrow>
            <mrow>
              <mi>P</mi>
              <mo stretchy="false">=</mo>
              <mrow>
                <mo fence="true" form="prefix" stretchy="false">(</mo>
                <mrow>
                  <mrow>
                    <mn>120</mn>
                    <mtext>V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0.5</mn>
                  <mtext>A</mtext>
                </mrow>
              </mrow>
              <mo fence="true" form="postfix" stretchy="false">)</mo>
            </mrow>
          </mrow>
        </mtd>
      </mtr>
      <mtr>
        <mtd>
          <mrow>
            <mrow>
              <mi>P</mi>
              <mo stretchy="false">=</mo>
              <mn>60.</mn>
            </mrow>
            <mtext>V</mtext>
          </mrow>
        </mtd>
      </mtr>
    </mtable>
    <annotation encoding="StarMath 5.0">P = VI newline
P = ( 120 "V" ) ( 0.5 "A" ) newline
P = 60. "V"</annotation>
  </semantics>
</math>
</file>

<file path=Object 35/content.xml><?xml version="1.0" encoding="utf-8"?>
<math xmlns="http://www.w3.org/1998/Math/MathML" display="block">
  <semantics>
    <mrow>
      <mrow>
        <mn>1.0</mn>
        <mo stretchy="false">×</mo>
        <msup>
          <mn>10</mn>
          <mn>2</mn>
        </msup>
      </mrow>
      <mtext>W</mtext>
    </mrow>
    <annotation encoding="StarMath 5.0">1.0 times 10^2 "W"</annotation>
  </semantics>
</math>
</file>

<file path=Object 36/content.xml><?xml version="1.0" encoding="utf-8"?>
<math xmlns="http://www.w3.org/1998/Math/MathML" display="block">
  <semantics>
    <mn>0</mn>
    <annotation encoding="StarMath 5.0">0</annotation>
  </semantics>
</math>
</file>

<file path=Object 37/content.xml><?xml version="1.0" encoding="utf-8"?>
<math xmlns="http://www.w3.org/1998/Math/MathML" display="block">
  <semantics>
    <mtext>A</mtext>
    <annotation encoding="StarMath 5.0">"A"</annotation>
  </semantics>
</math>
</file>

<file path=Object 38/content.xml><?xml version="1.0" encoding="utf-8"?>
<math xmlns="http://www.w3.org/1998/Math/MathML" display="block">
  <semantics>
    <mtext>V</mtext>
    <annotation encoding="StarMath 5.0">"V"</annotation>
  </semantics>
</math>
</file>

<file path=Object 39/content.xml><?xml version="1.0" encoding="utf-8"?>
<math xmlns="http://www.w3.org/1998/Math/MathML" display="block">
  <semantics>
    <mrow>
      <mi>I</mi>
      <mo stretchy="false">=</mo>
      <mfrac>
        <mrow>
          <mi mathvariant="normal">Δ</mi>
          <mi>q</mi>
        </mrow>
        <mi>t</mi>
      </mfrac>
    </mrow>
    <annotation encoding="StarMath 5.0">I = frac { %DELTA q } { t }</annotation>
  </semantics>
</math>
</file>

<file path=Object 4/content.xml><?xml version="1.0" encoding="utf-8"?>
<math xmlns="http://www.w3.org/1998/Math/MathML" display="block">
  <semantics>
    <mrow>
      <mi>V</mi>
      <mo stretchy="false">=</mo>
      <mi mathvariant="italic">IR</mi>
    </mrow>
    <annotation encoding="StarMath 5.0">V = IR</annotation>
  </semantics>
</math>
</file>

<file path=Object 40/content.xml><?xml version="1.0" encoding="utf-8"?>
<math xmlns="http://www.w3.org/1998/Math/MathML" display="block">
  <semantics>
    <mi>I</mi>
    <annotation encoding="StarMath 5.0">I</annotation>
  </semantics>
</math>
</file>

<file path=Object 41/content.xml><?xml version="1.0" encoding="utf-8"?>
<math xmlns="http://www.w3.org/1998/Math/MathML" display="block">
  <semantics>
    <mtext>A</mtext>
    <annotation encoding="StarMath 5.0">"A"</annotation>
  </semantics>
</math>
</file>

<file path=Object 42/content.xml><?xml version="1.0" encoding="utf-8"?>
<math xmlns="http://www.w3.org/1998/Math/MathML" display="block">
  <semantics>
    <mrow>
      <mi mathvariant="normal">Δ</mi>
      <mi>q</mi>
    </mrow>
    <annotation encoding="StarMath 5.0">%DELTA q</annotation>
  </semantics>
</math>
</file>

<file path=Object 43/content.xml><?xml version="1.0" encoding="utf-8"?>
<math xmlns="http://www.w3.org/1998/Math/MathML" display="block">
  <semantics>
    <mi>t</mi>
    <annotation encoding="StarMath 5.0">t</annotation>
  </semantics>
</math>
</file>

<file path=Object 44/content.xml><?xml version="1.0" encoding="utf-8"?>
<math xmlns="http://www.w3.org/1998/Math/MathML" display="block">
  <semantics>
    <mrow>
      <mn>5.00</mn>
      <mo stretchy="false">×</mo>
      <msup>
        <mn>10</mn>
        <mn>16</mn>
      </msup>
    </mrow>
    <annotation encoding="StarMath 5.0">5.00 times 10^16</annotation>
  </semantics>
</math>
</file>

<file path=Object 45/content.xml><?xml version="1.0" encoding="utf-8"?>
<math xmlns="http://www.w3.org/1998/Math/MathML" display="block">
  <semantics>
    <mrow>
      <mn>1.60</mn>
      <mtext>s</mtext>
    </mrow>
    <annotation encoding="StarMath 5.0">1.60 "s"</annotation>
  </semantics>
</math>
</file>

<file path=Object 46/content.xml><?xml version="1.0" encoding="utf-8"?>
<math xmlns="http://www.w3.org/1998/Math/MathML" display="block">
  <semantics>
    <mtable>
      <mtr>
        <mtd>
          <mrow>
            <mi>I</mi>
            <mo stretchy="false">=</mo>
            <mfrac>
              <mrow>
                <mi mathvariant="normal">Δ</mi>
                <mi>q</mi>
              </mrow>
              <mi>t</mi>
            </mfrac>
          </mrow>
        </mtd>
      </mtr>
      <mtr>
        <mtd>
          <mrow>
            <mi>I</mi>
            <mo stretchy="false">=</mo>
            <mfrac>
              <mrow>
                <mrow>
                  <mo fence="true" form="prefix" stretchy="false">(</mo>
                  <mrow>
                    <mrow>
                      <mrow>
                        <mn>5.00</mn>
                        <mo stretchy="false">×</mo>
                        <msup>
                          <mn>10</mn>
                          <mn>16</mn>
                        </msup>
                      </mrow>
                      <mi>e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n>1.60</mn>
                        <mo stretchy="false">×</mo>
                        <msup>
                          <mn>10</mn>
                          <mrow>
                            <mo stretchy="false">−</mo>
                            <mn>19</mn>
                          </mrow>
                        </msup>
                      </mrow>
                      <mrow>
                        <mtext>C</mtext>
                        <mo stretchy="false">/</mo>
                        <mi>e</mi>
                      </mrow>
                    </mrow>
                  </mrow>
                  <mo fence="true" form="postfix" stretchy="false">)</mo>
                </mrow>
              </mrow>
              <mrow>
                <mn>1.60</mn>
                <mtext>s</mtext>
              </mrow>
            </mfrac>
          </mrow>
        </mtd>
      </mtr>
      <mtr>
        <mtd>
          <mrow>
            <mrow>
              <mi>I</mi>
              <mo stretchy="false">=</mo>
              <mn>0.005</mn>
            </mrow>
            <mtext>A</mtext>
          </mrow>
        </mtd>
      </mtr>
    </mtable>
    <annotation encoding="StarMath 5.0">I = frac { %DELTA q } { t } newline
I = frac { ( 5.00 times 10^16 e ) ( 1.60 times 10^-19 "C" / e ) } { 1.60 "s" } newline
I = 0.005 "A"</annotation>
  </semantics>
</math>
</file>

<file path=Object 4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8/content.xml><?xml version="1.0" encoding="utf-8"?>
<math xmlns="http://www.w3.org/1998/Math/MathML" display="block">
  <semantics>
    <mrow>
      <mn>6</mn>
      <mtext>A</mtext>
    </mrow>
    <annotation encoding="StarMath 5.0">6 "A"</annotation>
  </semantics>
</math>
</file>

<file path=Object 49/content.xml><?xml version="1.0" encoding="utf-8"?>
<math xmlns="http://www.w3.org/1998/Math/MathML" display="block">
  <semantics>
    <mrow>
      <mn>4</mn>
      <mtext>A</mtext>
    </mrow>
    <annotation encoding="StarMath 5.0">4 "A"</annotation>
  </semantics>
</math>
</file>

<file path=Object 5/content.xml><?xml version="1.0" encoding="utf-8"?>
<math xmlns="http://www.w3.org/1998/Math/MathML" display="block">
  <semantics>
    <mtext>V</mtext>
    <annotation encoding="StarMath 5.0">"V"</annotation>
  </semantics>
</math>
</file>

<file path=Object 6/content.xml><?xml version="1.0" encoding="utf-8"?>
<math xmlns="http://www.w3.org/1998/Math/MathML" display="block">
  <semantics>
    <mtext>A</mtext>
    <annotation encoding="StarMath 5.0">"A"</annotation>
  </semantics>
</math>
</file>

<file path=Object 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8/content.xml><?xml version="1.0" encoding="utf-8"?>
<math xmlns="http://www.w3.org/1998/Math/MathML" display="block">
  <semantics>
    <mrow>
      <mfrac>
        <mn>1</mn>
        <msub>
          <mi>R</mi>
          <mtext>eq</mtext>
        </msub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  <mo stretchy="false">+</mo>
        <mfrac>
          <mn>1</mn>
          <msub>
            <mi>R</mi>
            <mn>3</mn>
          </msub>
        </mfrac>
        <mo stretchy="false">+</mo>
        <mo stretchy="false">…</mo>
      </mrow>
    </mrow>
    <annotation encoding="StarMath 5.0">frac { 1 } { R_"eq" } = { frac { 1 } { R_1 } } + { frac { 1 } { R_2 } } + { frac { 1 } { R_3 } } + dotslow</annotation>
  </semantics>
</math>
</file>

<file path=Object 9/content.xml><?xml version="1.0" encoding="utf-8"?>
<math xmlns="http://www.w3.org/1998/Math/MathML" display="block">
  <semantics>
    <mtext>W</mtext>
    <annotation encoding="StarMath 5.0">"W"</annotation>
  </semantics>
</math>
</file>
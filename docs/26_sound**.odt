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500000137D83E75FA.png" manifest:media-type="image/png"/>
  <manifest:file-entry manifest:full-path="Pictures/10000000000002AE0000011036A1C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071f4bd" officeooo:paragraph-rsid="0071f4bd"/>
    </style:style>
    <style:style style:name="P2" style:family="paragraph" style:parent-style-name="Text_20_body">
      <style:paragraph-properties fo:text-align="center" style:justify-single-word="false"/>
      <style:text-properties fo:font-style="italic" officeooo:paragraph-rsid="008870d0" style:font-style-asian="italic" style:font-style-complex="italic"/>
    </style:style>
    <style:style style:name="P3" style:family="paragraph" style:parent-style-name="Text_20_body">
      <style:paragraph-properties fo:text-align="center" style:justify-single-word="false"/>
      <style:text-properties fo:font-style="normal" officeooo:rsid="0015d3fa" officeooo:paragraph-rsid="001f6534" style:font-style-asian="normal" style:font-style-complex="normal"/>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Heading_20_1" style:list-style-name="">
      <style:text-properties officeooo:rsid="004c7a21" officeooo:paragraph-rsid="004c7a21"/>
    </style:style>
    <style:style style:name="P8" style:family="paragraph" style:parent-style-name="Heading_20_1">
      <style:paragraph-properties fo:break-before="page"/>
      <style:text-properties officeooo:rsid="0073bd06" officeooo:paragraph-rsid="0073bd06"/>
    </style:style>
    <style:style style:name="P9" style:family="paragraph" style:parent-style-name="Text_20_body">
      <style:paragraph-properties fo:text-align="start" style:justify-single-word="false"/>
      <style:text-properties officeooo:rsid="0073bd06" officeooo:paragraph-rsid="0073bd06"/>
    </style:style>
    <style:style style:name="P10" style:family="paragraph" style:parent-style-name="Heading_20_2">
      <style:text-properties officeooo:rsid="00753b3e" officeooo:paragraph-rsid="00753b3e"/>
    </style:style>
    <style:style style:name="P11" style:family="paragraph" style:parent-style-name="Text_20_body">
      <style:paragraph-properties fo:text-align="start" style:justify-single-word="false"/>
      <style:text-properties fo:font-weight="normal" officeooo:rsid="00753b3e" officeooo:paragraph-rsid="00753b3e" style:font-weight-asian="normal" style:font-weight-complex="normal"/>
    </style:style>
    <style:style style:name="P12" style:family="paragraph" style:parent-style-name="Text_20_body">
      <style:paragraph-properties fo:text-align="center" style:justify-single-word="false"/>
      <style:text-properties fo:font-weight="normal" officeooo:rsid="00753b3e" officeooo:paragraph-rsid="00753b3e" style:font-weight-asian="normal" style:font-weight-complex="normal"/>
    </style:style>
    <style:style style:name="P13" style:family="paragraph" style:parent-style-name="Text_20_body">
      <style:paragraph-properties fo:text-align="start" style:justify-single-word="false"/>
      <style:text-properties fo:font-style="italic" officeooo:paragraph-rsid="008870d0" style:font-style-asian="italic" style:font-style-complex="italic"/>
    </style:style>
    <style:style style:name="P14" style:family="paragraph" style:parent-style-name="Text_20_body">
      <style:text-properties officeooo:rsid="0077d5be" officeooo:paragraph-rsid="0078d584"/>
    </style:style>
    <style:style style:name="P15" style:family="paragraph" style:parent-style-name="Text_20_body">
      <style:text-properties officeooo:rsid="0079de39" officeooo:paragraph-rsid="0079de39"/>
    </style:style>
    <style:style style:name="P16" style:family="paragraph" style:parent-style-name="Text_20_body">
      <style:text-properties fo:font-weight="bold" officeooo:rsid="007b4c92" officeooo:paragraph-rsid="007b4c92" style:font-weight-asian="bold" style:font-weight-complex="bold"/>
    </style:style>
    <style:style style:name="P17" style:family="paragraph" style:parent-style-name="Text_20_body">
      <style:text-properties fo:font-weight="bold" officeooo:rsid="007e3b0e" officeooo:paragraph-rsid="007e3b0e" style:font-weight-asian="bold" style:font-weight-complex="bold"/>
    </style:style>
    <style:style style:name="P18" style:family="paragraph" style:parent-style-name="Text_20_body">
      <style:text-properties fo:font-weight="normal" officeooo:rsid="007e3b0e" officeooo:paragraph-rsid="007e3b0e" style:font-weight-asian="normal" style:font-weight-complex="normal"/>
    </style:style>
    <style:style style:name="P19" style:family="paragraph" style:parent-style-name="Text_20_body">
      <style:text-properties fo:font-weight="bold" officeooo:rsid="007fddd6" officeooo:paragraph-rsid="007fddd6" style:font-weight-asian="bold" style:font-weight-complex="bold"/>
    </style:style>
    <style:style style:name="P20" style:family="paragraph" style:parent-style-name="Heading_20_1">
      <style:text-properties officeooo:rsid="0080e0e9" officeooo:paragraph-rsid="0080e0e9"/>
    </style:style>
    <style:style style:name="P21" style:family="paragraph" style:parent-style-name="Text_20_body">
      <style:text-properties officeooo:rsid="0080e0e9" officeooo:paragraph-rsid="0080e0e9"/>
    </style:style>
    <style:style style:name="P22" style:family="paragraph" style:parent-style-name="Text_20_body">
      <style:text-properties fo:font-weight="normal" officeooo:rsid="0080e0e9" officeooo:paragraph-rsid="0080e0e9" style:font-weight-asian="normal" style:font-weight-complex="normal"/>
    </style:style>
    <style:style style:name="P23" style:family="paragraph" style:parent-style-name="Text_20_body">
      <style:paragraph-properties fo:text-align="center" style:justify-single-word="false"/>
      <style:text-properties fo:font-weight="normal" officeooo:rsid="0080e0e9" officeooo:paragraph-rsid="0080e0e9" style:font-weight-asian="normal" style:font-weight-complex="normal"/>
    </style:style>
    <style:style style:name="P24" style:family="paragraph" style:parent-style-name="Heading_20_2">
      <style:text-properties officeooo:rsid="0083ff44" officeooo:paragraph-rsid="0083ff44"/>
    </style:style>
    <style:style style:name="P25" style:family="paragraph" style:parent-style-name="Text_20_body">
      <style:text-properties officeooo:rsid="0083ff44" officeooo:paragraph-rsid="0083ff44"/>
    </style:style>
    <style:style style:name="P26" style:family="paragraph" style:parent-style-name="Text_20_body">
      <style:text-properties fo:font-weight="normal" officeooo:rsid="008870d0" officeooo:paragraph-rsid="008870d0" style:font-weight-asian="normal" style:font-weight-complex="normal"/>
    </style:style>
    <style:style style:name="T1" style:family="text">
      <style:text-properties officeooo:rsid="008870d0"/>
    </style:style>
    <style:style style:name="T2" style:family="text">
      <style:text-properties officeooo:rsid="002feec6"/>
    </style:style>
    <style:style style:name="T3" style:family="text">
      <style:text-properties officeooo:rsid="002900b4"/>
    </style:style>
    <style:style style:name="T4" style:family="text">
      <style:text-properties officeooo:rsid="00332384"/>
    </style:style>
    <style:style style:name="T5" style:family="text">
      <style:text-properties officeooo:rsid="0071f4b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75644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783efa" style:font-style-asian="normal" style:font-weight-asian="normal" style:font-style-complex="normal" style:font-weight-complex="normal"/>
    </style:style>
    <style:style style:name="T12" style:family="text">
      <style:text-properties fo:font-style="normal" fo:font-weight="bold" officeooo:rsid="00783efa" style:font-style-asian="normal" style:font-weight-asian="bold" style:font-style-complex="normal" style:font-weight-complex="bold"/>
    </style:style>
    <style:style style:name="T13" style:family="text">
      <style:text-properties officeooo:rsid="007fddd6"/>
    </style:style>
    <style:style style:name="T14" style:family="text">
      <style:text-properties officeooo:rsid="0083ff44"/>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nd<text:span text:style-name="T1">**</text:span></text:p>
      <text:p text:style-name="P2">(This <text:span text:style-name="T2">idea or </text:span>topic is <text:span text:style-name="T1">a major aspect</text:span> <text:span text:style-name="T1">of</text:span> the new <text:span text:style-name="T3">Physical Science: Physics course.</text:span>)<text:bookmark-start text:name="__DdeLink__502_3041763869"/><text:bookmark-start text:name="__DdeLink__138_391587487"/></text:p>
      <text:p text:style-name="P3"><text:span text:style-name="T4">April </text:span><text:span text:style-name="T5">21</text:span><text:span text:style-name="T4">, 20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27_4069653955" office:name="­" text:style-name="Index_20_Link" text:visited-style-name="Index_20_Link">­<text:tab/>1</text:a></text:p>
          <text:p text:style-name="P4"><text:a xlink:type="simple" xlink:href="#__RefHeading___Toc2346_679008467" office:name="Sound Waves" text:style-name="Index_20_Link" text:visited-style-name="Index_20_Link">Sound Waves<text:tab/>2</text:a></text:p>
          <text:p text:style-name="P5"><text:a xlink:type="simple" xlink:href="#__RefHeading___Toc715_3929381055" office:name="Longitudinal Waves" text:style-name="Index_20_Link" text:visited-style-name="Index_20_Link">Longitudinal Waves<text:tab/>2</text:a></text:p>
          <text:p text:style-name="P5"><text:a xlink:type="simple" xlink:href="#__RefHeading___Toc717_3929381055" office:name="Temperature and the Speed of Sound*" text:style-name="Index_20_Link" text:visited-style-name="Index_20_Link">Temperature and the Speed of Sound*<text:tab/>2</text:a></text:p>
          <text:p text:style-name="P5"><text:a xlink:type="simple" xlink:href="#__RefHeading___Toc719_3929381055" office:name="Echoes and Reverberation" text:style-name="Index_20_Link" text:visited-style-name="Index_20_Link">Echoes and Reverberation<text:tab/>2</text:a></text:p>
          <text:p text:style-name="P6"><text:a xlink:type="simple" xlink:href="#__RefHeading___Toc194_3324249060" office:name="Sonar*" text:style-name="Index_20_Link" text:visited-style-name="Index_20_Link">Sonar*<text:tab/>3</text:a></text:p>
          <text:p text:style-name="P5"><text:a xlink:type="simple" xlink:href="#__RefHeading___Toc196_3324249060" office:name="Natural Frequency and Resonance" text:style-name="Index_20_Link" text:visited-style-name="Index_20_Link">Natural Frequency and Resonance<text:tab/>3</text:a></text:p>
          <text:p text:style-name="P4"><text:a xlink:type="simple" xlink:href="#__RefHeading___Toc198_3324249060" office:name="The Doppler Effect" text:style-name="Index_20_Link" text:visited-style-name="Index_20_Link">The Doppler Effect<text:tab/>3</text:a></text:p>
          <text:p text:style-name="P5"><text:a xlink:type="simple" xlink:href="#__RefHeading___Toc200_3324249060" office:name="Sonic Booms" text:style-name="Index_20_Link" text:visited-style-name="Index_20_Link">Sonic Booms<text:tab/>4</text:a></text:p>
          <text:p text:style-name="P5"><text:a xlink:type="simple" xlink:href="#__RefHeading___Toc202_3324249060" office:name="Redshift and Blueshift" text:style-name="Index_20_Link" text:visited-style-name="Index_20_Link">Redshift and Blueshift<text:tab/>4</text:a></text:p>
        </text:index-body>
      </text:table-of-content>
      <text:h text:style-name="P7" text:outline-level="1"><text:bookmark-start text:name="__RefHeading___Toc627_4069653955"/>­<text:bookmark-end text:name="__RefHeading___Toc627_4069653955"/></text:h>
      <text:h text:style-name="P8" text:outline-level="1"><text:bookmark-start text:name="__RefHeading___Toc2346_679008467"/>Sound Waves<text:bookmark-end text:name="__RefHeading___Toc2346_679008467"/></text:h>
      <text:p text:style-name="P9"><text:bookmark-end text:name="__DdeLink__138_391587487"/><text:bookmark-end text:name="__DdeLink__502_3041763869"/><text:span text:style-name="T6">Sound is a longitudinal wave that travels in a direction </text:span><text:span text:style-name="T7">parallel</text:span><text:span text:style-name="T6"> to the medium (i.e., air, water, a solid, etc.). As sound travels through the material, the molecules move back and forth in the </text:span><text:span text:style-name="T7">same direction</text:span><text:span text:style-name="T6"> as the wave.</text:span></text:p>
      <text:h text:style-name="P10" text:outline-level="2"><text:bookmark-start text:name="__RefHeading___Toc715_3929381055"/>Longitudinal Waves<text:bookmark-end text:name="__RefHeading___Toc715_3929381055"/></text:h>
      <text:p text:style-name="P11">The molecules in the path of a longitudinal wave experience <text:span text:style-name="T7">compressions</text:span> in <text:span text:style-name="T7">high-pressure zones</text:span> and <text:span text:style-name="T7">rarefactions</text:span> in <text:span text:style-name="T7">low-pressure zones</text:span>. <text:span text:style-name="T8">The molecules act like individual coils in a spring. The faster the molecules move back and forth, the greater the frequency of the wave, and the greater the distance they move, the greater the wave’s amplitude.</text:span></text:p>
      <text:p text:style-name="P12"><draw:frame draw:style-name="fr1" draw:name="Frame1" text:anchor-type="as-char" svg:width="6.9252in" style:rel-width="100%" svg:height="3.2118in" style:rel-height="scale-min" draw:z-index="0"><draw:text-box><text:p text:style-name="Figure"><draw:frame draw:style-name="fr2" draw:name="Image1" text:anchor-type="paragraph" svg:width="6.9252in" style:rel-width="100%" svg:height="2.7453in" style:rel-height="scale" draw:z-index="1"><draw:image xlink:href="Pictures/10000000000002AE0000011036A1C450.png" xlink:type="simple" xlink:show="embed" xlink:actuate="onLoad" draw:mime-type="image/png"/></draw:frame>Figure <text:sequence text:ref-name="refFigure0" text:name="Figure" text:formula="ooow:Figure+1" style:num-format="1">1</text:sequence>: The areas at which the molecules appear more "together" are zones of compression, whereas the regions with the molecules appear more spread out are rarefaction areas.</text:p></draw:text-box></draw:frame></text:p>
      <text:h text:style-name="Heading_20_2" text:outline-level="2" text:is-list-header="true"><text:bookmark-start text:name="__RefHeading___Toc717_3929381055"/>Temperature and the Speed of Sound<text:span text:style-name="T1">*</text:span><text:bookmark-end text:name="__RefHeading___Toc717_3929381055"/></text:h>
      <text:p text:style-name="P13">(This <text:span text:style-name="T2">idea or </text:span>topic is excluded in the new <text:span text:style-name="T3">Physical Science: Physics course.</text:span>)</text:p>
      <text:p text:style-name="P14">Because the speed of sound is <text:span text:style-name="T9">inversely proportional</text:span><text:span text:style-name="T10"> to the medium’s density, faster sound correlates to a medium of lower density. </text:span><text:span text:style-name="T11">The hotter a substance is, the faster its molecules and atoms vibrate and the more space they take up. This lowers the substance’s density (since less molecules are packed together) and increases the speed of sound through that medium. Therefore, temperature and the speed of sound are </text:span><text:span text:style-name="T12">directly proportional</text:span><text:span text:style-name="T11">; the higher the temperature, the faster the speed of sound. To visualize this more clearly, recall that molecules must bump into each other in order to transmit a longitudinal wave. When molecules move quickly, they need less time to bump into their neighbors.</text:span></text:p>
      <text:h text:style-name="Heading_20_2" text:outline-level="2"><text:bookmark-start text:name="__RefHeading___Toc719_3929381055"/>Echoes and Reverberation<text:bookmark-end text:name="__RefHeading___Toc719_3929381055"/></text:h>
      <text:p text:style-name="P15">An <text:span text:style-name="T7">echo</text:span><text:span text:style-name="T6"> is simply a reflected sound wave. When sound waves are reflected, they bounce off a point and travel back in the opposite direction.</text:span></text:p>
      <text:p text:style-name="P16"><text:soft-page-break/>Reverberation<text:span text:style-name="T6"> is the repeated reflection of sound at close quarters. If you were to yell inside a narrow tunnel, your reflected sound would bounce back to your ears so quickly that your brain would not be able to distinguish between the original yell and its reflection.</text:span></text:p>
      <text:h text:style-name="Heading_20_3" text:outline-level="3"><text:bookmark-start text:name="__RefHeading___Toc194_3324249060"/>Sonar<text:span text:style-name="T1">*</text:span><text:bookmark-end text:name="__RefHeading___Toc194_3324249060"/></text:h>
      <text:p text:style-name="P13">(This <text:span text:style-name="T2">idea or </text:span>topic is excluded in the new <text:span text:style-name="T3">Physical Science: Physics course.</text:span>)</text:p>
      <text:p text:style-name="P17">Sonar<text:span text:style-name="T6"> stands for Sound Navigation and Ranging. </text:span><text:bookmark text:name="__DdeLink__127_3467276830"/><text:span text:style-name="T6">The main principle of sonar is sending out sound waves and listening for echoes. The distance of an object can be determined based on the time it takes for an echo that reflects off that object to return.</text:span></text:p>
      <text:p text:style-name="P18">Sonar is used in commercial fishing boats to find schools of fish. Scientists also use it to map the ocean floor. Special glasses that make use of sonar can help blind people by producing sounds of different pitches depending on how close an obstacle is.</text:p>
      <text:p text:style-name="P18"><text:span text:style-name="T13">Instruments that use radio (low-frequency light) waves utilize </text:span><text:span text:style-name="T7">radar</text:span> (Radio Detection and Ranging).</text:p>
      <text:h text:style-name="Heading_20_2" text:outline-level="2"><text:bookmark-start text:name="__RefHeading___Toc196_3324249060"/>Natural Frequency and Resonance<text:bookmark-end text:name="__RefHeading___Toc196_3324249060"/></text:h>
      <text:p text:style-name="P19">Natural frequency<text:span text:style-name="T6"> is the frequency at which a specific body vibrates. </text:span>Resonance<text:span text:style-name="T6">, on the other hand, is the vibration of a body at its natural frequency due to the influence of another source vibrating at the same frequency.</text:span></text:p>
      <text:h text:style-name="P20" text:outline-level="1"><text:bookmark-start text:name="__RefHeading___Toc198_3324249060"/>The Doppler Effect<text:bookmark-end text:name="__RefHeading___Toc198_3324249060"/></text:h>
      <text:p text:style-name="P21">The <text:span text:style-name="T7">Doppler effect</text:span><text:span text:style-name="T6"> (Doppler shift) is the variation in the </text:span><text:span text:style-name="T7">observed frequency</text:span><text:span text:style-name="T6"> of a wave when there is relative motion between the source and the receive. Recall that </text:span><text:span text:style-name="T7">wave fronts</text:span><text:span text:style-name="T6"> are all points on a wave that are </text:span><text:span text:style-name="T7">in phase</text:span><text:span text:style-name="T6"> with each other.</text:span></text:p>
      <text:p text:style-name="P22">Wavelength and frequency are <text:span text:style-name="T7">inversely related</text:span>, so increases in frequency must decrease wavelength.</text:p>
      <text:p text:style-name="P23"><draw:frame draw:style-name="fr1" draw:name="Frame2" text:anchor-type="as-char" svg:width="5.6091in" style:rel-width="81%" svg:height="2.8209in" style:rel-height="scale-min" draw:z-index="2"><draw:text-box><text:p text:style-name="Figure"><draw:frame draw:style-name="fr2" draw:name="Image2" text:anchor-type="paragraph" svg:width="5.6091in" style:rel-width="100%" svg:height="2.3543in" style:rel-height="scale" draw:z-index="3"><draw:image xlink:href="Pictures/10000000000002E500000137D83E75FA.png" xlink:type="simple" xlink:show="embed" xlink:actuate="onLoad" draw:mime-type="image/png"/></draw:frame>Figure <text:sequence text:ref-name="refFigure1" text:name="Figure" text:formula="ooow:Figure+1" style:num-format="1">2</text:sequence>: A diagram representing the change in nature of water ripples (waves) due to the movement of a bug.</text:p></draw:text-box></draw:frame></text:p>
      <text:h text:style-name="P24" text:outline-level="2"><text:bookmark-start text:name="__RefHeading___Toc200_3324249060"/><text:soft-page-break/>Sonic Booms<text:bookmark-end text:name="__RefHeading___Toc200_3324249060"/></text:h>
      <text:p text:style-name="P25">A <text:span text:style-name="T7">sonic boom</text:span><text:span text:style-name="T6"> is a sound caused by shock waves, which are created when an object travels through the air faster than the speed of sound.</text:span></text:p>
      <text:h text:style-name="Heading_20_2" text:outline-level="2"><text:bookmark-start text:name="__RefHeading___Toc202_3324249060"/>Redshift and Blueshift<text:bookmark-end text:name="__RefHeading___Toc202_3324249060"/></text:h>
      <text:p text:style-name="P25">A <text:span text:style-name="T7">redshift</text:span><text:span text:style-name="T6"> is an increase in wavelength (decrease in frequency) of electromagnetic radiation. Conversely, a </text:span><text:span text:style-name="T7">blueshift</text:span><text:span text:style-name="T6"> is a </text:span><text:span text:style-name="T7">decrease</text:span><text:span text:style-name="T6"> in wavelength (increase in frequency) of electromagnetic radiation.</text:span></text:p>
      <text:p text:style-name="P26">They essentially act as Doppler shift in light or other electromagnetic waves. They <text:span text:style-name="T14">also allow scientists to verify that the universe is, indeed, expanding </text:span>by revealing the relative movement of celestial objects<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063add9"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19T23:20:07.509747736</dc:date>
    <meta:editing-duration>PT6H58M51S</meta:editing-duration>
    <meta:editing-cycles>74</meta:editing-cycles>
    <meta:generator>LibreOffice/25.8.5.2$Linux_X86_64 LibreOffice_project/580$Build-2</meta:generator>
    <meta:document-statistic meta:table-count="0" meta:image-count="2" meta:object-count="0" meta:page-count="4" meta:paragraph-count="44" meta:word-count="720" meta:character-count="4321" meta:non-whitespace-character-count="3643"/>
  </office:meta>
</office:document-meta>
</file>
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Pictures/10000000000001BA000000D41871B8C8.png" manifest:media-type="image/png"/>
  <manifest:file-entry manifest:full-path="Pictures/1000000000000199000000F95CCED985.png" manifest:media-type="image/png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officeooo:rsid="00670772" officeooo:paragraph-rsid="00670772"/>
    </style:style>
    <style:style style:name="P2" style:family="paragraph" style:parent-style-name="Text_20_body">
      <style:paragraph-properties fo:text-align="center" style:justify-single-word="false"/>
      <style:text-properties fo:font-style="italic" officeooo:paragraph-rsid="00757a3c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tyle="normal" officeooo:rsid="0015d3fa" officeooo:paragraph-rsid="001f6534" style:font-style-asian="normal" style:font-style-complex="normal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6" style:family="paragraph" style:parent-style-name="Heading_20_1" style:list-style-name="">
      <style:text-properties officeooo:rsid="004c7a21" officeooo:paragraph-rsid="004c7a21"/>
    </style:style>
    <style:style style:name="P7" style:family="paragraph" style:parent-style-name="Heading_20_1">
      <style:paragraph-properties fo:break-before="page"/>
      <style:text-properties officeooo:rsid="0068df1e" officeooo:paragraph-rsid="0068df1e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68df1e" officeooo:paragraph-rsid="0068df1e" style:font-weight-asian="bold" style:font-weight-complex="bold"/>
    </style:style>
    <style:style style:name="P9" style:family="paragraph" style:parent-style-name="Heading_20_1">
      <style:text-properties officeooo:rsid="00696b1b" officeooo:paragraph-rsid="00696b1b"/>
    </style:style>
    <style:style style:name="P10" style:family="paragraph" style:parent-style-name="Text_20_body">
      <style:text-properties officeooo:rsid="00696b1b" officeooo:paragraph-rsid="00696b1b"/>
    </style:style>
    <style:style style:name="P11" style:family="paragraph" style:parent-style-name="Heading_20_2">
      <style:text-properties officeooo:rsid="00696b1b" officeooo:paragraph-rsid="00696b1b"/>
    </style:style>
    <style:style style:name="P12" style:family="paragraph" style:parent-style-name="Text_20_body">
      <style:text-properties fo:font-weight="normal" officeooo:rsid="00696b1b" officeooo:paragraph-rsid="00696b1b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weight="normal" officeooo:rsid="00696b1b" officeooo:paragraph-rsid="00696b1b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officeooo:rsid="00696b1b" officeooo:paragraph-rsid="00696b1b"/>
    </style:style>
    <style:style style:name="T1" style:family="text">
      <style:text-properties officeooo:rsid="00757a3c"/>
    </style:style>
    <style:style style:name="T2" style:family="text">
      <style:text-properties officeooo:rsid="002feec6"/>
    </style:style>
    <style:style style:name="T3" style:family="text">
      <style:text-properties officeooo:rsid="002900b4"/>
    </style:style>
    <style:style style:name="T4" style:family="text">
      <style:text-properties officeooo:rsid="00332384"/>
    </style:style>
    <style:style style:name="T5" style:family="text">
      <style:text-properties officeooo:rsid="0067077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6ae4c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rthquakes<text:span text:style-name="T1">*</text:span></text:p>
      <text:p text:style-name="P2">(This <text:span text:style-name="T2">idea or </text:span>topic is excluded in the new <text:span text:style-name="T3">Physical Science: Physics course.</text:span>)<text:bookmark-start text:name="__DdeLink__502_3041763869"/><text:bookmark-start text:name="__DdeLink__138_391587487"/></text:p>
      <text:p text:style-name="P3"><text:span text:style-name="T4">April 1</text:span><text:span text:style-name="T5">7</text:span><text:span text:style-name="T4">, 2026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627_4069653955" office:name="­" text:style-name="Index_20_Link" text:visited-style-name="Index_20_Link">­<text:tab/>1</text:a></text:p>
          <text:p text:style-name="P4"><text:a xlink:type="simple" xlink:href="#__RefHeading___Toc2346_679008467" office:name="What Are Earthquakes?" text:style-name="Index_20_Link" text:visited-style-name="Index_20_Link">What Are Earthquakes?<text:tab/>2</text:a></text:p>
          <text:p text:style-name="P4"><text:a xlink:type="simple" xlink:href="#__RefHeading___Toc1006_2870247131" office:name="Seismic Waves" text:style-name="Index_20_Link" text:visited-style-name="Index_20_Link">Seismic Waves<text:tab/>2</text:a></text:p>
          <text:p text:style-name="P5"><text:a xlink:type="simple" xlink:href="#__RefHeading___Toc1008_2870247131" office:name="P-Waves" text:style-name="Index_20_Link" text:visited-style-name="Index_20_Link">P-Waves<text:tab/>2</text:a></text:p>
          <text:p text:style-name="P5"><text:a xlink:type="simple" xlink:href="#__RefHeading___Toc1010_2870247131" office:name="S-Waves" text:style-name="Index_20_Link" text:visited-style-name="Index_20_Link">S-Waves<text:tab/>2</text:a></text:p>
          <text:p text:style-name="P5"><text:a xlink:type="simple" xlink:href="#__RefHeading___Toc1012_2870247131" office:name="The Richter Scale" text:style-name="Index_20_Link" text:visited-style-name="Index_20_Link">The Richter Scale<text:tab/>3</text:a></text:p>
        </text:index-body>
      </text:table-of-content>
      <text:h text:style-name="P6" text:outline-level="1"><text:bookmark-start text:name="__RefHeading___Toc627_4069653955"/>­<text:bookmark-end text:name="__RefHeading___Toc627_4069653955"/></text:h>
      <text:h text:style-name="P7" text:outline-level="1"><text:bookmark-start text:name="__RefHeading___Toc2346_679008467"/>What Are Earthquakes?<text:bookmark-end text:name="__RefHeading___Toc2346_679008467"/></text:h>
      <text:p text:style-name="P8"><text:bookmark-end text:name="__DdeLink__138_391587487"/><text:bookmark-end text:name="__DdeLink__502_3041763869"/><text:span text:style-name="T6">An </text:span>earthquake<text:span text:style-name="T6"> is the shaking of the surface of the Earth caused by a sudden release of energy in the lithosphere. They are measured by intensity; some are weak while others are very strong. The 2010 Haiti earthquake, for example, was a catastrophic magnitude </text:span><text:span text:style-name="T6"><draw:frame draw:style-name="fr1" draw:name="Object1" text:anchor-type="as-char" svg:y="-0.1492in" svg:width="0.211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s/>earthquake that claimed between </text:span><text:span text:style-name="T6"><draw:frame draw:style-name="fr1" draw:name="Object2" text:anchor-type="as-char" svg:y="-0.1492in" svg:width="0.5445in" svg:height="0.185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s/>and </text:span><text:span text:style-name="T6"><draw:frame draw:style-name="fr1" draw:name="Object3" text:anchor-type="as-char" svg:y="-0.1492in" svg:width="0.5457in" svg:height="0.1854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"><text:s/>lives.</text:span></text:p>
      <text:h text:style-name="P9" text:outline-level="1"><text:bookmark-start text:name="__RefHeading___Toc1006_2870247131"/>Seismic Waves<text:bookmark-end text:name="__RefHeading___Toc1006_2870247131"/></text:h>
      <text:p text:style-name="P10"><text:span text:style-name="T7">Seismic waves</text:span> are vibrations caused by movement inside Earth, later manifesting itself as an earthquake. There are two types of seismic waves: <text:span text:style-name="T7">P-waves</text:span> and <text:span text:style-name="T7">S-waves</text:span>.</text:p>
      <text:h text:style-name="P11" text:outline-level="2"><text:bookmark-start text:name="__RefHeading___Toc1008_2870247131"/>P-Waves<text:bookmark-end text:name="__RefHeading___Toc1008_2870247131"/></text:h>
      <text:p text:style-name="P12">P-<text:span text:style-name="T8">waves</text:span> (primary <text:span text:style-name="T8">waves</text:span>) are longitudinal waves that shake the ground in the direction in which the wave is traveling. Their speed depends on the nature of the rock through which they are traveling.</text:p>
      <text:p text:style-name="P13"><draw:frame draw:style-name="fr2" draw:name="Frame1" text:anchor-type="as-char" svg:width="4.6398in" style:rel-width="67%" svg:height="3.2902in" style:rel-height="scale-min" draw:z-index="5"><draw:text-box><text:p text:style-name="Figure"><draw:frame draw:style-name="fr3" draw:name="Image1" text:anchor-type="paragraph" svg:width="4.6398in" style:rel-width="100%" svg:height="2.8236in" style:rel-height="scale" draw:z-index="6"><draw:image xlink:href="Pictures/1000000000000199000000F95CCED985.png" xlink:type="simple" xlink:show="embed" xlink:actuate="onLoad" draw:mime-type="image/png"/></draw:frame>Figure <text:sequence text:ref-name="refFigure0" text:name="Figure" text:formula="ooow:Figure+1" style:num-format="1">1</text:sequence>: A visualization of a P-wave traveling through a medium parallel to its motion.</text:p></draw:text-box></draw:frame></text:p>
      <text:h text:style-name="P11" text:outline-level="2"><text:bookmark-start text:name="__RefHeading___Toc1010_2870247131"/>S-Waves<text:bookmark-end text:name="__RefHeading___Toc1010_2870247131"/></text:h>
      <text:p text:style-name="P10">S-<text:span text:style-name="T8">waves</text:span> (shear <text:span text:style-name="T8">or secondary waves</text:span>) are transverse waves that shake the ground in directions perpendicular to the direction of travel.</text:p>
      <text:p text:style-name="P14"><text:soft-page-break/><draw:frame draw:style-name="fr2" draw:name="Frame2" text:anchor-type="as-char" svg:width="4.5016in" style:rel-width="65%" svg:height="2.6252in" style:rel-height="scale-min" draw:z-index="7"><draw:text-box><text:p text:style-name="Figure"><draw:frame draw:style-name="fr3" draw:name="Image2" text:anchor-type="paragraph" svg:width="4.5016in" style:rel-width="100%" svg:height="2.1583in" style:rel-height="scale" draw:z-index="8"><draw:image xlink:href="Pictures/10000000000001BA000000D41871B8C8.png" xlink:type="simple" xlink:show="embed" xlink:actuate="onLoad" draw:mime-type="image/png"/></draw:frame>Figure <text:sequence text:ref-name="refFigure1" text:name="Figure" text:formula="ooow:Figure+1" style:num-format="1">2</text:sequence>: A visualization of an S-wave traveling through a medium perpendicular to its motion.</text:p></draw:text-box></draw:frame></text:p>
      <text:h text:style-name="P11" text:outline-level="2"><text:bookmark-start text:name="__RefHeading___Toc1012_2870247131"/>The Richter Scale<text:bookmark-end text:name="__RefHeading___Toc1012_2870247131"/></text:h>
      <text:p text:style-name="P10">Earthquake severity is measured on the logarithmic <text:span text:style-name="T7">Richter scale</text:span><text:span text:style-name="T6">. A magnitude </text:span><text:span text:style-name="T6"><draw:frame draw:style-name="fr1" draw:name="Object4" text:anchor-type="as-char" svg:y="-0.1492in" svg:width="0.211in" svg:height="0.1854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"><text:s/>earthquake is thus ten times more severe than a magnitude </text:span><text:span text:style-name="T6"><draw:frame draw:style-name="fr1" draw:name="Object5" text:anchor-type="as-char" svg:y="-0.1492in" svg:width="0.2165in" svg:height="0.1854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"><text:s/>earthquak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weight="normal" officeooo:rsid="0063add9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4:41:32.782593689</meta:creation-date>
    <dc:date>2026-06-19T23:15:49.652445962</dc:date>
    <meta:editing-duration>PT5H20M33S</meta:editing-duration>
    <meta:editing-cycles>54</meta:editing-cycles>
    <meta:generator>LibreOffice/25.8.5.2$Linux_X86_64 LibreOffice_project/580$Build-2</meta:generator>
    <meta:document-statistic meta:table-count="0" meta:image-count="2" meta:object-count="5" meta:page-count="3" meta:paragraph-count="25" meta:word-count="228" meta:character-count="1392" meta:non-whitespace-character-count="1182"/>
  </office:meta>
</office:document-meta>
</file>

<file path=Object 1/content.xml><?xml version="1.0" encoding="utf-8"?>
<math xmlns="http://www.w3.org/1998/Math/MathML" display="block">
  <semantics>
    <mn>7.0</mn>
    <annotation encoding="StarMath 5.0">7.0</annotation>
  </semantics>
</math>
</file>

<file path=Object 2/content.xml><?xml version="1.0" encoding="utf-8"?>
<math xmlns="http://www.w3.org/1998/Math/MathML" display="block">
  <semantics>
    <mn>100,000</mn>
    <annotation encoding="StarMath 5.0">100,000</annotation>
  </semantics>
</math>
</file>

<file path=Object 3/content.xml><?xml version="1.0" encoding="utf-8"?>
<math xmlns="http://www.w3.org/1998/Math/MathML" display="block">
  <semantics>
    <mn>200,000</mn>
    <annotation encoding="StarMath 5.0">200,000</annotation>
  </semantics>
</math>
</file>

<file path=Object 4/content.xml><?xml version="1.0" encoding="utf-8"?>
<math xmlns="http://www.w3.org/1998/Math/MathML" display="block">
  <semantics>
    <mn>5.0</mn>
    <annotation encoding="StarMath 5.0">5.0</annotation>
  </semantics>
</math>
</file>

<file path=Object 5/content.xml><?xml version="1.0" encoding="utf-8"?>
<math xmlns="http://www.w3.org/1998/Math/MathML" display="block">
  <semantics>
    <mn>4.0</mn>
    <annotation encoding="StarMath 5.0">4.0</annotation>
  </semantics>
</math>
</file>
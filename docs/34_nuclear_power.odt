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content.xml" manifest:media-type="text/xml"/>
  <manifest:file-entry manifest:full-path="styles.xml" manifest:media-type="text/xml"/>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Pictures/10000001000006400000046A1FEF932B.png" manifest:media-type="image/png"/>
  <manifest:file-entry manifest:full-path="Pictures/1000000100000600000005ED15C64BC5.png" manifest:media-type="image/png"/>
  <manifest:file-entry manifest:full-path="Pictures/10000001000005DC0000083850DB5AEE.png" manifest:media-type="image/png"/>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itle">
      <style:text-properties officeooo:rsid="01326b51" officeooo:paragraph-rsid="01326b51"/>
    </style:style>
    <style:style style:name="P2" style:family="paragraph" style:parent-style-name="Text_20_body">
      <style:paragraph-properties fo:text-align="center" style:justify-single-word="false"/>
      <style:text-properties fo:font-style="normal" officeooo:rsid="009dd8e0" officeooo:paragraph-rsid="009dd8e0" style:font-style-asian="normal" style:font-style-complex="normal"/>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text-properties officeooo:rsid="004c7a21" officeooo:paragraph-rsid="004c7a21"/>
    </style:style>
    <style:style style:name="P6" style:family="paragraph" style:parent-style-name="Heading_20_1">
      <style:paragraph-properties fo:break-before="page"/>
      <style:text-properties officeooo:rsid="01113cb5" officeooo:paragraph-rsid="01326b51"/>
    </style:style>
    <style:style style:name="P7" style:family="paragraph" style:parent-style-name="Text_20_body">
      <style:text-properties officeooo:paragraph-rsid="013de17f"/>
    </style:style>
    <style:style style:name="P8" style:family="paragraph" style:parent-style-name="Text_20_body">
      <style:text-properties officeooo:rsid="01113cb5" officeooo:paragraph-rsid="01326b51"/>
    </style:style>
    <style:style style:name="P9" style:family="paragraph" style:parent-style-name="Heading_20_2">
      <style:text-properties officeooo:rsid="0112fc7f" officeooo:paragraph-rsid="01326b51"/>
    </style:style>
    <style:style style:name="P10" style:family="paragraph" style:parent-style-name="Text_20_body">
      <style:text-properties officeooo:rsid="0112fc7f" officeooo:paragraph-rsid="01326b51"/>
    </style:style>
    <style:style style:name="P11" style:family="paragraph" style:parent-style-name="Text_20_body">
      <style:text-properties fo:font-weight="normal" officeooo:rsid="0112fc7f" officeooo:paragraph-rsid="01326b51" style:font-weight-asian="normal" style:font-weight-complex="normal"/>
    </style:style>
    <style:style style:name="P12" style:family="paragraph" style:parent-style-name="Text_20_body">
      <style:paragraph-properties fo:text-align="center" style:justify-single-word="false"/>
      <style:text-properties fo:font-weight="normal" officeooo:rsid="0112fc7f" officeooo:paragraph-rsid="01326b51" style:font-weight-asian="normal" style:font-weight-complex="normal"/>
    </style:style>
    <style:style style:name="P13" style:family="paragraph" style:parent-style-name="Heading_20_2">
      <style:text-properties officeooo:rsid="01138600" officeooo:paragraph-rsid="01326b51"/>
    </style:style>
    <style:style style:name="P14" style:family="paragraph" style:parent-style-name="Text_20_body">
      <style:text-properties officeooo:rsid="01138600" officeooo:paragraph-rsid="01326b51"/>
    </style:style>
    <style:style style:name="P15" style:family="paragraph" style:parent-style-name="Text_20_body">
      <style:paragraph-properties fo:text-align="center" style:justify-single-word="false"/>
      <style:text-properties fo:font-weight="normal" officeooo:rsid="01138600" officeooo:paragraph-rsid="01326b51" style:font-weight-asian="normal" style:font-weight-complex="normal"/>
    </style:style>
    <style:style style:name="P16" style:family="paragraph" style:parent-style-name="Heading_20_2">
      <style:text-properties officeooo:paragraph-rsid="013de17f"/>
    </style:style>
    <style:style style:name="P17" style:family="paragraph" style:parent-style-name="Text_20_body">
      <style:text-properties officeooo:rsid="01397324" officeooo:paragraph-rsid="01397324"/>
    </style:style>
    <style:style style:name="P18" style:family="paragraph" style:parent-style-name="Text_20_body" style:list-style-name="L1">
      <style:text-properties officeooo:rsid="01397324" officeooo:paragraph-rsid="01397324"/>
    </style:style>
    <style:style style:name="P19" style:family="paragraph" style:parent-style-name="Text_20_body" style:list-style-name="L1">
      <style:text-properties fo:font-weight="bold" officeooo:rsid="01397324" officeooo:paragraph-rsid="01397324" style:font-weight-asian="bold" style:font-weight-complex="bold"/>
    </style:style>
    <style:style style:name="P20" style:family="paragraph" style:parent-style-name="Heading_20_2">
      <style:text-properties officeooo:rsid="010d2a0e" officeooo:paragraph-rsid="01326b51"/>
    </style:style>
    <style:style style:name="P21" style:family="paragraph" style:parent-style-name="Text_20_body">
      <style:text-properties officeooo:rsid="010d2a0e" officeooo:paragraph-rsid="01326b51"/>
    </style:style>
    <style:style style:name="P22" style:family="paragraph" style:parent-style-name="Text_20_body">
      <style:text-properties fo:font-weight="normal" officeooo:rsid="010d2a0e" officeooo:paragraph-rsid="01326b51" style:font-weight-asian="normal" style:font-weight-complex="normal"/>
    </style:style>
    <style:style style:name="P23" style:family="paragraph" style:parent-style-name="Text_20_body">
      <style:paragraph-properties fo:text-align="center" style:justify-single-word="false"/>
      <style:text-properties fo:font-weight="normal" officeooo:rsid="010d2a0e" officeooo:paragraph-rsid="01326b51" style:font-weight-asian="normal" style:font-weight-complex="normal"/>
    </style:style>
    <style:style style:name="P24" style:family="paragraph" style:parent-style-name="Text_20_body">
      <style:paragraph-properties fo:text-align="start" style:justify-single-word="false"/>
      <style:text-properties fo:font-weight="normal" officeooo:rsid="010e47cb" officeooo:paragraph-rsid="01326b51" style:font-weight-asian="normal" style:font-weight-complex="normal"/>
    </style:style>
    <style:style style:name="T1" style:family="text">
      <style:text-properties officeooo:rsid="00fd58fc"/>
    </style:style>
    <style:style style:name="T2" style:family="text">
      <style:text-properties officeooo:rsid="01371989"/>
    </style:style>
    <style:style style:name="T3" style:family="text">
      <style:text-properties officeooo:rsid="013de17f"/>
    </style:style>
    <style:style style:name="T4" style:family="text">
      <style:text-properties fo:font-style="italic" style:font-style-asian="italic" style:font-style-complex="italic"/>
    </style:style>
    <style:style style:name="T5" style:family="text">
      <style:text-properties fo:font-style="italic" officeooo:rsid="002feec6" style:font-style-asian="italic" style:font-style-complex="italic"/>
    </style:style>
    <style:style style:name="T6" style:family="text">
      <style:text-properties fo:font-style="italic" officeooo:rsid="013de17f" style:font-style-asian="italic" style:font-style-complex="italic"/>
    </style:style>
    <style:style style:name="T7" style:family="text">
      <style:text-properties fo:font-style="italic" officeooo:rsid="002900b4" style:font-style-asian="italic" style:font-style-complex="italic"/>
    </style:style>
    <style:style style:name="T8" style:family="text">
      <style:text-properties officeooo:rsid="0112fc7f"/>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138600"/>
    </style:style>
    <style:style style:name="T12" style:family="text">
      <style:text-properties fo:font-weight="bold" officeooo:rsid="01138600" style:font-weight-asian="bold" style:font-weight-complex="bold"/>
    </style:style>
    <style:style style:name="T13" style:family="text">
      <style:text-properties fo:font-weight="normal" officeooo:rsid="010d2a0e" style:font-weight-asian="normal" style:font-weight-complex="normal"/>
    </style:style>
    <style:style style:name="T14" style:family="text">
      <style:text-properties officeooo:rsid="01397324"/>
    </style:style>
    <style:style style:name="T15" style:family="text">
      <style:text-properties officeooo:rsid="01113cb5"/>
    </style:style>
    <style:style style:name="T16" style:family="text">
      <style:text-properties officeooo:rsid="010ebe62"/>
    </style:style>
    <style:style style:name="T17" style:family="text">
      <style:text-properties fo:font-weight="bold" officeooo:rsid="010ebe62"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clear Power<text:bookmark-start text:name="__DdeLink__138_391587487"/><text:bookmark-start text:name="__DdeLink__502_3041763869"/></text:p>
      <text:p text:style-name="P2">May <text:span text:style-name="T1">2</text:span><text:span text:style-name="T2">9</text:span>, 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627_4069653955" office:name="­" text:style-name="Index_20_Link" text:visited-style-name="Index_20_Link">­<text:tab/>1</text:a></text:p>
          <text:p text:style-name="P3"><text:a xlink:type="simple" xlink:href="#__RefHeading___Toc363_2153913225" office:name="Nuclear Reactions*" text:style-name="Index_20_Link" text:visited-style-name="Index_20_Link">Nuclear Reactions*<text:tab/>2</text:a></text:p>
          <text:p text:style-name="P4"><text:a xlink:type="simple" xlink:href="#__RefHeading___Toc365_2153913225" office:name="Nuclear Fission" text:style-name="Index_20_Link" text:visited-style-name="Index_20_Link">Nuclear Fission<text:tab/>2</text:a></text:p>
          <text:p text:style-name="P4"><text:a xlink:type="simple" xlink:href="#__RefHeading___Toc367_2153913225" office:name="Nuclear Fusion" text:style-name="Index_20_Link" text:visited-style-name="Index_20_Link">Nuclear Fusion<text:tab/>4</text:a></text:p>
          <text:p text:style-name="P4"><text:a xlink:type="simple" xlink:href="#__RefHeading___Toc12507_3491985352" office:name="Radioactive Decay" text:style-name="Index_20_Link" text:visited-style-name="Index_20_Link">Radioactive Decay<text:tab/>4</text:a></text:p>
          <text:p text:style-name="P4"><text:a xlink:type="simple" xlink:href="#__RefHeading___Toc361_2153913225" office:name="The Mass Defect**" text:style-name="Index_20_Link" text:visited-style-name="Index_20_Link">The Mass Defect**<text:tab/>4</text:a></text:p>
        </text:index-body>
      </text:table-of-content>
      <text:h text:style-name="P5" text:outline-level="1"><text:bookmark-start text:name="__RefHeading___Toc627_4069653955"/>­<text:bookmark-end text:name="__RefHeading___Toc627_4069653955"/></text:h>
      <text:h text:style-name="P6" text:outline-level="1"><text:bookmark-start text:name="__RefHeading___Toc363_2153913225"/>Nuclear Reactions<text:span text:style-name="T3">*</text:span><text:bookmark-end text:name="__RefHeading___Toc363_2153913225"/></text:h>
      <text:p text:style-name="P7"><text:span text:style-name="T4">(This </text:span><text:span text:style-name="T5">idea or </text:span><text:span text:style-name="T4">topic is </text:span><text:span text:style-name="T6">excluded in </text:span><text:span text:style-name="T4">the new </text:span><text:span text:style-name="T7">Physical Science: Physics course.</text:span><text:span text:style-name="T4">)</text:span></text:p>
      <text:p text:style-name="P8">In all nuclear reactions, the sum of the atomic numbers of the reactants must equal the sum of the atomic numbers of the resultants. The total mass of the reactants must also equal the total mass of the resultants. There are multiple types of nuclear reactions: <text:span text:style-name="T8">alpha decay, beta decay, positron decay, gamma decay, nuclear fission, and nuclear fusion.</text:span></text:p>
      <text:h text:style-name="P9" text:outline-level="2"><text:bookmark-start text:name="__RefHeading___Toc365_2153913225"/>Nuclear Fission<text:bookmark-end text:name="__RefHeading___Toc365_2153913225"/></text:h>
      <text:p text:style-name="P10">Unstable nuclei become more stable through a process known as <text:span text:style-name="T9">nuclear fission</text:span><text:span text:style-name="T10">, a process in which a nucleus breaks down into two or more smaller nuclei when bombarded with a neutron. Fission reactions lead to the emission of more neutrons, potentially causing a </text:span><text:span text:style-name="T9">nuclear chain reaction</text:span><text:span text:style-name="T10"> in which nearby nuclei also break down due to the uncontrolled release of neutrons.</text:span></text:p>
      <text:p text:style-name="P10"><text:span text:style-name="T10">Humans have harnessed the power of nuclear fission reactions through the use of </text:span><text:span text:style-name="T9">nuclear reactors</text:span><text:span text:style-name="T10">, devices used to control and power fission nuclear chain reactions. They are often used to produce electricity, power production, and support research.</text:span></text:p>
      <text:p text:style-name="P11">Fissile nuclei split after absorbing neutrons, releasing energy and (often two or three) more neutrons. The newly emitted neutrons can induce further fission of nearby nuclei. If left uncontrolled, these chain reactions can become detrimental. However, nuclear reactors mitigate this effect by <text:span text:style-name="T11">meticulously controlling these reactions using </text:span><text:span text:style-name="T12">control rods</text:span><text:span text:style-name="T11">, which regulate the emission of neutrons by collecting them and preventing further fission reactions.</text:span></text:p>
      <text:p text:style-name="P12"><draw:frame draw:style-name="fr1" draw:name="Frame3" text:anchor-type="paragraph" svg:width="2.8398in" style:rel-width="41%" svg:height="4.4492in" style:rel-height="scale-min" draw:z-index="9"><draw:text-box><text:p text:style-name="Figure"><draw:frame draw:style-name="fr2" draw:name="Image1 Copy 1" text:anchor-type="paragraph" svg:width="2.8398in" style:rel-width="100%" svg:height="3.9827in" style:rel-height="scale" draw:z-index="10"><draw:image xlink:href="Pictures/10000001000005DC0000083850DB5AEE.png" xlink:type="simple" xlink:show="embed" xlink:actuate="onLoad" draw:mime-type="image/png"/></draw:frame>Figure <text:sequence text:ref-name="refFigure0" text:name="Figure" text:formula="ooow:Figure+1" style:num-format="1">1</text:sequence>: A map of a nuclear reactor core.</text:p></draw:text-box></draw:frame><text:soft-page-break/><draw:frame draw:style-name="fr3" draw:name="Frame2" text:anchor-type="as-char" svg:width="3.8283in" draw:z-index="11"><draw:text-box fo:min-height="3.7811in"><text:p text:style-name="Figure"><draw:frame draw:style-name="fr2" draw:name="Image2" text:anchor-type="paragraph" svg:width="3.8283in" style:rel-width="100%" svg:height="3.7811in" style:rel-height="scale" draw:z-index="12"><draw:image xlink:href="Pictures/1000000100000600000005ED15C64BC5.png" xlink:type="simple" xlink:show="embed" xlink:actuate="onLoad" draw:mime-type="image/png"/></draw:frame>Figure <text:sequence text:ref-name="refFigure1" text:name="Figure" text:formula="ooow:Figure+1" style:num-format="1">2</text:sequence>: The step-by-step process of nuclear fission.</text:p></draw:text-box></draw:frame></text:p>
      <text:h text:style-name="P13" text:outline-level="2"><text:bookmark-start text:name="__RefHeading___Toc367_2153913225"/><text:soft-page-break/>Nuclear Fusion<text:bookmark-end text:name="__RefHeading___Toc367_2153913225"/></text:h>
      <text:p text:style-name="P14">Small nuclei become more stable by joining together to form larger nuclei, engaging in a process called <text:span text:style-name="T9">nuclear fusion</text:span><text:span text:style-name="T10">. The previously mentioned nuclear fusion reaction </text:span><text:span text:style-name="T13"><draw:frame draw:style-name="fr4" draw:name="Object33" text:anchor-type="as-char" svg:y="-0.1728in" svg:width="1.8055in" svg:height="0.2339in" draw:z-index="13"><draw:object xlink:href="./Object 11" xlink:type="simple" xlink:show="embed" xlink:actuate="onLoad"/><draw:image xlink:href="./ObjectReplacements/Object 11" xlink:type="simple" xlink:show="embed" xlink:actuate="onLoad"/><svg:desc>formula</svg:desc></draw:frame></text:span><text:span text:style-name="T13">, </text:span><text:span text:style-name="T10">for example,</text:span><text:span text:style-name="T13"> </text:span><text:span text:style-name="T10">involves the joining of a hydrogen-2 atom and a hydrogen-3 atom.</text:span></text:p>
      <text:p text:style-name="P15"><draw:frame draw:style-name="fr5" draw:name="Frame1" text:anchor-type="as-char" svg:width="4.6681in" draw:z-index="14"><draw:text-box fo:min-height="3.2965in"><text:p text:style-name="Figure"><draw:frame draw:style-name="fr2" draw:name="Image3" text:anchor-type="paragraph" svg:width="4.6681in" style:rel-width="100%" svg:height="3.2965in" style:rel-height="scale" draw:z-index="15"><draw:image xlink:href="Pictures/10000001000006400000046A1FEF932B.png" xlink:type="simple" xlink:show="embed" xlink:actuate="onLoad" draw:mime-type="image/png"/></draw:frame>Figure <text:sequence text:ref-name="refFigure2" text:name="Figure" text:formula="ooow:Figure+1" style:num-format="1">3</text:sequence>: A deuterium-tritium fusion reaction.</text:p></draw:text-box></draw:frame></text:p>
      <text:h text:style-name="P16" text:outline-level="2"><text:bookmark-start text:name="__RefHeading___Toc12507_3491985352"/><text:span text:style-name="T14">Radioactive Decay</text:span><text:bookmark-end text:name="__RefHeading___Toc12507_3491985352"/></text:h>
      <text:p text:style-name="P17">Unstable nuclei spontaneously emit particles to become more stable. The three main types of radioactive decay are:</text:p>
      <text:list text:style-name="L1">
        <text:list-item>
          <text:p text:style-name="P18"><text:span text:style-name="T9">Alpha Decay (</text:span><text:span text:style-name="T9"><draw:frame draw:style-name="fr4" draw:name="Object1" text:anchor-type="as-char" svg:y="-0.1492in" svg:width="0.1028in" svg:height="0.1854in" draw:z-index="16"><draw:object xlink:href="./Object 12" xlink:type="simple" xlink:show="embed" xlink:actuate="onLoad"/><draw:image xlink:href="./ObjectReplacements/Object 12" xlink:type="simple" xlink:show="embed" xlink:actuate="onLoad"/></draw:frame></text:span><text:span text:style-name="T9">)</text:span>: A helium nucleus (<draw:frame draw:style-name="fr4" draw:name="Object2" text:anchor-type="as-char" svg:y="-0.1728in" svg:width="0.2772in" svg:height="0.2339in" draw:z-index="17"><draw:object xlink:href="./Object 13" xlink:type="simple" xlink:show="embed" xlink:actuate="onLoad"/><draw:image xlink:href="./ObjectReplacements/Object 13" xlink:type="simple" xlink:show="embed" xlink:actuate="onLoad"/></draw:frame>) is emitted.</text:p>
        </text:list-item>
        <text:list-item>
          <text:p text:style-name="P19">Beta Decay (<draw:frame draw:style-name="fr4" draw:name="Object3" text:anchor-type="as-char" svg:y="-0.1492in" svg:width="0.1035in" svg:height="0.1854in" draw:z-index="18"><draw:object xlink:href="./Object 14" xlink:type="simple" xlink:show="embed" xlink:actuate="onLoad"/><draw:image xlink:href="./ObjectReplacements/Object 14" xlink:type="simple" xlink:show="embed" xlink:actuate="onLoad"/></draw:frame>)<text:span text:style-name="T10">: A neutron turns into a proton and an electron, and the electron is ejected.</text:span></text:p>
        </text:list-item>
        <text:list-item>
          <text:p text:style-name="P19">Gamma Decay (<draw:frame draw:style-name="fr4" draw:name="Object4" text:anchor-type="as-char" svg:y="-0.1492in" svg:width="0.0839in" svg:height="0.1854in" draw:z-index="19"><draw:object xlink:href="./Object 15" xlink:type="simple" xlink:show="embed" xlink:actuate="onLoad"/><draw:image xlink:href="./ObjectReplacements/Object 15" xlink:type="simple" xlink:show="embed" xlink:actuate="onLoad"/></draw:frame>)<text:span text:style-name="T10">: A high-energy photon is emitted, releasing only excess energy.</text:span></text:p>
        </text:list-item>
      </text:list>
      <text:h text:style-name="P20" text:outline-level="2"><text:bookmark-start text:name="__RefHeading___Toc361_2153913225"/>The Mass Defect<text:span text:style-name="T3">**</text:span><text:bookmark-end text:name="__RefHeading___Toc361_2153913225"/></text:h>
      <text:p text:style-name="P7"><text:span text:style-name="T4">(This </text:span><text:span text:style-name="T5">idea or </text:span><text:span text:style-name="T4">topic is </text:span><text:span text:style-name="T6">a major aspect of </text:span><text:span text:style-name="T4">the new </text:span><text:span text:style-name="T7">Physical Science: Physics course.</text:span><text:span text:style-name="T4">)</text:span></text:p>
      <text:p text:style-name="P21">Protons, neutrons, and electrons are the main particles in an atom. However, when their masses are added up, you may notice that their sum is greater from the mass of the actual atom. This is because the “missing mass” was actually converted into ener<text:span text:style-name="T15">gy</text:span>. The <text:span text:style-name="T9">mass defect</text:span><text:span text:style-name="T10"> is defined as the difference between the actual mass of an atom and the sum of its individual parts.</text:span></text:p>
      <text:p text:style-name="P21"><text:span text:style-name="T10">The </text:span><text:span text:style-name="T9">binding energy</text:span><text:span text:style-name="T10"> is equivalent to the mass defect; it is the energy that holds the nucleus of an atom together (a strong force). This energy is released during nuclear fission and fusion.</text:span></text:p>
      <text:p text:style-name="P22"><text:span text:style-name="T16">Consider</text:span> the following nuclear fusion reaction:</text:p>
      <text:p text:style-name="P23"><text:bookmark-start text:name="__DdeLink__324_2153913225"/><text:soft-page-break/><draw:frame draw:style-name="fr4" draw:name="Object15" text:anchor-type="as-char" svg:y="-0.1728in" svg:width="1.8055in" svg:height="0.2339in" draw:z-index="20"><draw:object xlink:href="./Object 10" xlink:type="simple" xlink:show="embed" xlink:actuate="onLoad"/><draw:image xlink:href="./ObjectReplacements/Object 10" xlink:type="simple" xlink:show="embed" xlink:actuate="onLoad"/><svg:desc>formula</svg:desc></draw:frame>,<text:bookmark-end text:name="__DdeLink__324_2153913225"/></text:p>
      <text:p text:style-name="P24"><text:bookmark-end text:name="__DdeLink__138_391587487"/><text:bookmark-end text:name="__DdeLink__502_3041763869"/>where <draw:frame draw:style-name="fr4" draw:name="Object24" text:anchor-type="as-char" svg:y="-0.1728in" svg:width="0.198in" svg:height="0.2339in" draw:z-index="0"><draw:object xlink:href="./Object 1" xlink:type="simple" xlink:show="embed" xlink:actuate="onLoad"/><draw:image xlink:href="./ObjectReplacements/Object 1" xlink:type="simple" xlink:show="embed" xlink:actuate="onLoad"/><svg:desc>formula</svg:desc></draw:frame><text:s/>has a mass of <draw:frame draw:style-name="fr4" draw:name="Object25" text:anchor-type="as-char" svg:y="-0.1492in" svg:width="0.739in" svg:height="0.1854in" draw:z-index="1"><draw:object xlink:href="./Object 2" xlink:type="simple" xlink:show="embed" xlink:actuate="onLoad"/><draw:image xlink:href="./ObjectReplacements/Object 2" xlink:type="simple" xlink:show="embed" xlink:actuate="onLoad"/><svg:desc>formula</svg:desc></draw:frame>, <draw:frame draw:style-name="fr4" draw:name="Object26" text:anchor-type="as-char" svg:y="-0.1728in" svg:width="0.1992in" svg:height="0.2339in" draw:z-index="2"><draw:object xlink:href="./Object 3" xlink:type="simple" xlink:show="embed" xlink:actuate="onLoad"/><draw:image xlink:href="./ObjectReplacements/Object 3" xlink:type="simple" xlink:show="embed" xlink:actuate="onLoad"/><svg:desc>formula</svg:desc></draw:frame><text:s/><text:span text:style-name="T16">has a mass of </text:span><text:span text:style-name="T16"><draw:frame draw:style-name="fr4" draw:name="Object27" text:anchor-type="as-char" svg:y="-0.1492in" svg:width="0.7409in" svg:height="0.1854in" draw:z-index="3"><draw:object xlink:href="./Object 4" xlink:type="simple" xlink:show="embed" xlink:actuate="onLoad"/><draw:image xlink:href="./ObjectReplacements/Object 4" xlink:type="simple" xlink:show="embed" xlink:actuate="onLoad"/><svg:desc>formula</svg:desc></draw:frame></text:span><text:span text:style-name="T16">, </text:span><text:span text:style-name="T16"><draw:frame draw:style-name="fr4" draw:name="Object28" text:anchor-type="as-char" svg:y="-0.1728in" svg:width="0.2772in" svg:height="0.2339in" draw:z-index="4"><draw:object xlink:href="./Object 5" xlink:type="simple" xlink:show="embed" xlink:actuate="onLoad"/><draw:image xlink:href="./ObjectReplacements/Object 5" xlink:type="simple" xlink:show="embed" xlink:actuate="onLoad"/><svg:desc>formula</svg:desc></draw:frame></text:span><text:span text:style-name="T16"><text:s/>has a mass of </text:span><text:span text:style-name="T16"><draw:frame draw:style-name="fr4" draw:name="Object29" text:anchor-type="as-char" svg:y="-0.1492in" svg:width="0.7429in" svg:height="0.1854in" draw:z-index="5"><draw:object xlink:href="./Object 6" xlink:type="simple" xlink:show="embed" xlink:actuate="onLoad"/><draw:image xlink:href="./ObjectReplacements/Object 6" xlink:type="simple" xlink:show="embed" xlink:actuate="onLoad"/><svg:desc>formula</svg:desc></draw:frame></text:span><text:span text:style-name="T16">, and </text:span><text:span text:style-name="T16"><draw:frame draw:style-name="fr4" draw:name="Object30" text:anchor-type="as-char" svg:y="-0.1728in" svg:width="0.1661in" svg:height="0.2339in" draw:z-index="6"><draw:object xlink:href="./Object 7" xlink:type="simple" xlink:show="embed" xlink:actuate="onLoad"/><draw:image xlink:href="./ObjectReplacements/Object 7" xlink:type="simple" xlink:show="embed" xlink:actuate="onLoad"/><svg:desc>formula</svg:desc></draw:frame></text:span><text:span text:style-name="T16"><text:s/>has a mass of </text:span><text:span text:style-name="T16"><draw:frame draw:style-name="fr4" draw:name="Object31" text:anchor-type="as-char" svg:y="-0.1492in" svg:width="0.7402in" svg:height="0.1854in" draw:z-index="7"><draw:object xlink:href="./Object 8" xlink:type="simple" xlink:show="embed" xlink:actuate="onLoad"/><draw:image xlink:href="./ObjectReplacements/Object 8" xlink:type="simple" xlink:show="embed" xlink:actuate="onLoad"/><svg:desc>formula</svg:desc></draw:frame></text:span><text:span text:style-name="T16">. The mass defect of this equation is </text:span><text:span text:style-name="T16"><draw:frame draw:style-name="fr4" draw:name="Object32" text:anchor-type="as-char" svg:y="-0.1492in" svg:width="0.7465in" svg:height="0.1854in" draw:z-index="8"><draw:object xlink:href="./Object 9" xlink:type="simple" xlink:show="embed" xlink:actuate="onLoad"/><draw:image xlink:href="./ObjectReplacements/Object 9" xlink:type="simple" xlink:show="embed" xlink:actuate="onLoad"/><svg:desc>formula</svg:desc></draw:frame></text:span><text:span text:style-name="T16"><text:s/>because it is the difference between the sum of the masses of the </text:span><text:span text:style-name="T17">reactants</text:span><text:span text:style-name="T16"> (left side) and the sum of the masses of the </text:span><text:span text:style-name="T17">resultants</text:span><text:span text:style-name="T16"> (right si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104c094" style:font-weight-asian="normal"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4:41:32.782593689</meta:creation-date>
    <dc:date>2026-06-19T23:28:15.111476767</dc:date>
    <meta:editing-duration>PT23H44M33S</meta:editing-duration>
    <meta:editing-cycles>202</meta:editing-cycles>
    <meta:generator>LibreOffice/25.8.5.2$Linux_X86_64 LibreOffice_project/580$Build-2</meta:generator>
    <meta:document-statistic meta:table-count="0" meta:image-count="3" meta:object-count="15" meta:page-count="5" meta:paragraph-count="36" meta:word-count="567" meta:character-count="3391" meta:non-whitespace-character-count="2856"/>
  </office:meta>
</office:document-meta>
</file>

<file path=Object 1/content.xml><?xml version="1.0" encoding="utf-8"?>
<math xmlns="http://www.w3.org/1998/Math/MathML" display="block">
  <semantics>
    <mrow>
      <msubsup>
        <mrow/>
        <mn>1</mn>
        <mn>2</mn>
      </msubsup>
      <mtext>H</mtext>
    </mrow>
    <annotation encoding="StarMath 5.0">{  }_1^2 "H"</annotation>
  </semantics>
</math>
</file>

<file path=Object 10/content.xml><?xml version="1.0" encoding="utf-8"?>
<math xmlns="http://www.w3.org/1998/Math/MathML" display="block">
  <semantics>
    <mrow>
      <msubsup>
        <mrow/>
        <mn>1</mn>
        <mn>2</mn>
      </msubsup>
      <mrow>
        <mtext>H</mtext>
        <mo stretchy="false">+</mo>
        <msubsup>
          <mrow/>
          <mn>1</mn>
          <mn>3</mn>
        </msubsup>
      </mrow>
      <mtext>H</mtext>
      <mo stretchy="false">→</mo>
      <msubsup>
        <mrow/>
        <mn>2</mn>
        <mn>4</mn>
      </msubsup>
      <mrow>
        <mtext>He</mtext>
        <mo stretchy="false">+</mo>
        <msubsup>
          <mrow/>
          <mn>0</mn>
          <mn>1</mn>
        </msubsup>
      </mrow>
      <mrow>
        <mtext>n</mtext>
        <mo stretchy="false">+</mo>
        <mtext>energy</mtext>
      </mrow>
    </mrow>
    <annotation encoding="StarMath 5.0">{  }_1^2 "H" + {  }_1^3 "H" -&gt; {  }_2^4 "He" + {  }_0^1 "n" + "energy"</annotation>
  </semantics>
</math>
</file>

<file path=Object 11/content.xml><?xml version="1.0" encoding="utf-8"?>
<math xmlns="http://www.w3.org/1998/Math/MathML" display="block">
  <semantics>
    <mrow>
      <msubsup>
        <mrow/>
        <mn>1</mn>
        <mn>2</mn>
      </msubsup>
      <mrow>
        <mtext>H</mtext>
        <mo stretchy="false">+</mo>
        <msubsup>
          <mrow/>
          <mn>1</mn>
          <mn>3</mn>
        </msubsup>
      </mrow>
      <mtext>H</mtext>
      <mo stretchy="false">→</mo>
      <msubsup>
        <mrow/>
        <mn>2</mn>
        <mn>4</mn>
      </msubsup>
      <mrow>
        <mtext>He</mtext>
        <mo stretchy="false">+</mo>
        <msubsup>
          <mrow/>
          <mn>0</mn>
          <mn>1</mn>
        </msubsup>
      </mrow>
      <mrow>
        <mtext>n</mtext>
        <mo stretchy="false">+</mo>
        <mtext>energy</mtext>
      </mrow>
    </mrow>
    <annotation encoding="StarMath 5.0">{  }_1^2 "H" + {  }_1^3 "H" -&gt; {  }_2^4 "He" + {  }_0^1 "n" + "energy"</annotation>
  </semantics>
</math>
</file>

<file path=Object 12/content.xml><?xml version="1.0" encoding="utf-8"?>
<math xmlns="http://www.w3.org/1998/Math/MathML" display="block">
  <semantics>
    <mi>α</mi>
    <annotation encoding="StarMath 5.0">%alpha</annotation>
  </semantics>
</math>
</file>

<file path=Object 13/content.xml><?xml version="1.0" encoding="utf-8"?>
<math xmlns="http://www.w3.org/1998/Math/MathML" display="block">
  <semantics>
    <mrow>
      <msubsup>
        <mrow/>
        <mn>2</mn>
        <mn>4</mn>
      </msubsup>
      <mtext>He</mtext>
    </mrow>
    <annotation encoding="StarMath 5.0">{  }^4_2 "He"</annotation>
  </semantics>
</math>
</file>

<file path=Object 14/content.xml><?xml version="1.0" encoding="utf-8"?>
<math xmlns="http://www.w3.org/1998/Math/MathML" display="block">
  <semantics>
    <mi>β</mi>
    <annotation encoding="StarMath 5.0">%beta</annotation>
  </semantics>
</math>
</file>

<file path=Object 15/content.xml><?xml version="1.0" encoding="utf-8"?>
<math xmlns="http://www.w3.org/1998/Math/MathML" display="block">
  <semantics>
    <mi>γ</mi>
    <annotation encoding="StarMath 5.0">%gamma</annotation>
  </semantics>
</math>
</file>

<file path=Object 2/content.xml><?xml version="1.0" encoding="utf-8"?>
<math xmlns="http://www.w3.org/1998/Math/MathML" display="block">
  <semantics>
    <mrow>
      <mn>2.014102</mn>
      <mtext>u</mtext>
    </mrow>
    <annotation encoding="StarMath 5.0">2.014102 "u"</annotation>
  </semantics>
</math>
</file>

<file path=Object 3/content.xml><?xml version="1.0" encoding="utf-8"?>
<math xmlns="http://www.w3.org/1998/Math/MathML" display="block">
  <semantics>
    <mrow>
      <msubsup>
        <mrow/>
        <mn>1</mn>
        <mn>3</mn>
      </msubsup>
      <mtext>H</mtext>
    </mrow>
    <annotation encoding="StarMath 5.0">{  }_1^3 "H"</annotation>
  </semantics>
</math>
</file>

<file path=Object 4/content.xml><?xml version="1.0" encoding="utf-8"?>
<math xmlns="http://www.w3.org/1998/Math/MathML" display="block">
  <semantics>
    <mrow>
      <mn>3.016049</mn>
      <mtext>u</mtext>
    </mrow>
    <annotation encoding="StarMath 5.0">3.016049 "u"</annotation>
  </semantics>
</math>
</file>

<file path=Object 5/content.xml><?xml version="1.0" encoding="utf-8"?>
<math xmlns="http://www.w3.org/1998/Math/MathML" display="block">
  <semantics>
    <mrow>
      <msubsup>
        <mrow/>
        <mn>2</mn>
        <mn>4</mn>
      </msubsup>
      <mtext>He</mtext>
    </mrow>
    <annotation encoding="StarMath 5.0">{  }_2^4 "He"</annotation>
  </semantics>
</math>
</file>

<file path=Object 6/content.xml><?xml version="1.0" encoding="utf-8"?>
<math xmlns="http://www.w3.org/1998/Math/MathML" display="block">
  <semantics>
    <mrow>
      <mn>4.002602</mn>
      <mtext>u</mtext>
    </mrow>
    <annotation encoding="StarMath 5.0">4.002602 "u"</annotation>
  </semantics>
</math>
</file>

<file path=Object 7/content.xml><?xml version="1.0" encoding="utf-8"?>
<math xmlns="http://www.w3.org/1998/Math/MathML" display="block">
  <semantics>
    <mrow>
      <msubsup>
        <mrow/>
        <mn>0</mn>
        <mn>1</mn>
      </msubsup>
      <mtext>n</mtext>
    </mrow>
    <annotation encoding="StarMath 5.0">{  }_0^1 "n"</annotation>
  </semantics>
</math>
</file>

<file path=Object 8/content.xml><?xml version="1.0" encoding="utf-8"?>
<math xmlns="http://www.w3.org/1998/Math/MathML" display="block">
  <semantics>
    <mrow>
      <mn>1.008665</mn>
      <mtext>u</mtext>
    </mrow>
    <annotation encoding="StarMath 5.0">1.008665 "u"</annotation>
  </semantics>
</math>
</file>

<file path=Object 9/content.xml><?xml version="1.0" encoding="utf-8"?>
<math xmlns="http://www.w3.org/1998/Math/MathML" display="block">
  <semantics>
    <mrow>
      <mn>0.018884</mn>
      <mtext>u</mtext>
    </mrow>
    <annotation encoding="StarMath 5.0">0.018884 "u"</annotation>
  </semantics>
</math>
</file>
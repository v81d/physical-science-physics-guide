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3E80000036D379EBA87.png" manifest:media-type="image/png"/>
  <manifest:file-entry manifest:full-path="Pictures/1000000100000E150000075E56E3C41F.png" manifest:media-type="image/png"/>
  <manifest:file-entry manifest:full-path="Pictures/100000010000026E0000012F101E715A.png" manifest:media-type="image/png"/>
  <manifest:file-entry manifest:full-path="Pictures/10000001000001000000014EC150DB7F.png" manifest:media-type="image/png"/>
  <manifest:file-entry manifest:full-path="Pictures/10000001000002180000015F4FE79281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rsid="006621b0" officeooo:paragraph-rsid="006621b0"/>
    </style:style>
    <style:style style:name="P2" style:family="paragraph" style:parent-style-name="Text_20_body">
      <style:paragraph-properties fo:text-align="center" style:justify-single-word="false"/>
      <style:text-properties officeooo:paragraph-rsid="000c2f56"/>
    </style:style>
    <style:style style:name="P3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style="normal" officeooo:rsid="0031c9d9" officeooo:paragraph-rsid="000c2f56" style:font-style-asian="normal" style:font-style-complex="normal"/>
    </style:style>
    <style:style style:name="P7" style:family="paragraph" style:parent-style-name="Heading_20_1">
      <style:paragraph-properties fo:break-before="page"/>
      <style:text-properties officeooo:rsid="006621b0" officeooo:paragraph-rsid="006621b0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679d99" officeooo:paragraph-rsid="00679d99" style:font-weight-asian="normal" style:font-weight-complex="normal"/>
    </style:style>
    <style:style style:name="P9" style:family="paragraph" style:parent-style-name="Text_20_body">
      <style:text-properties officeooo:rsid="006fc0fa" officeooo:paragraph-rsid="00716f8e"/>
    </style:style>
    <style:style style:name="P10" style:family="paragraph" style:parent-style-name="Heading_20_1">
      <style:text-properties officeooo:rsid="0078f7d5" officeooo:paragraph-rsid="0078f7d5"/>
    </style:style>
    <style:style style:name="P11" style:family="paragraph" style:parent-style-name="Text_20_body">
      <style:text-properties officeooo:rsid="0078f7d5" officeooo:paragraph-rsid="0078f7d5"/>
    </style:style>
    <style:style style:name="P12" style:family="paragraph" style:parent-style-name="Text_20_body">
      <style:text-properties fo:font-weight="bold" officeooo:rsid="0078f7d5" officeooo:paragraph-rsid="0078f7d5" style:font-weight-asian="bold" style:font-weight-complex="bold"/>
    </style:style>
    <style:style style:name="P13" style:family="paragraph" style:parent-style-name="Text_20_body">
      <style:text-properties officeooo:rsid="006b70c6" officeooo:paragraph-rsid="006b70c6"/>
    </style:style>
    <style:style style:name="P14" style:family="paragraph" style:parent-style-name="Quotations">
      <style:text-properties fo:font-weight="normal" officeooo:rsid="006b70c6" officeooo:paragraph-rsid="006b70c6" style:font-weight-asian="normal" style:font-weight-complex="normal"/>
    </style:style>
    <style:style style:name="P15" style:family="paragraph" style:parent-style-name="Quotations">
      <style:paragraph-properties fo:margin-left="0in" fo:text-indent="0in" style:auto-text-indent="false"/>
      <style:text-properties fo:font-weight="normal" officeooo:rsid="006b70c6" officeooo:paragraph-rsid="006b70c6" style:font-weight-asian="normal" style:font-weight-complex="normal"/>
    </style:style>
    <style:style style:name="P16" style:family="paragraph" style:parent-style-name="Text_20_body">
      <style:text-properties officeooo:rsid="006d210a" officeooo:paragraph-rsid="006d210a"/>
    </style:style>
    <style:style style:name="P17" style:family="paragraph" style:parent-style-name="Text_20_body">
      <style:text-properties officeooo:rsid="007507c3" officeooo:paragraph-rsid="007507c3"/>
    </style:style>
    <style:style style:name="P18" style:family="paragraph" style:parent-style-name="Heading_20_1">
      <style:text-properties officeooo:rsid="007b7874" officeooo:paragraph-rsid="007b7874"/>
    </style:style>
    <style:style style:name="P19" style:family="paragraph" style:parent-style-name="Text_20_body">
      <style:text-properties officeooo:rsid="007cf115" officeooo:paragraph-rsid="007cf115"/>
    </style:style>
    <style:style style:name="P20" style:family="paragraph" style:parent-style-name="Heading_20_2">
      <style:text-properties officeooo:rsid="007cf115" officeooo:paragraph-rsid="007cf115"/>
    </style:style>
    <style:style style:name="P21" style:family="paragraph" style:parent-style-name="Text_20_body">
      <style:text-properties fo:font-weight="bold" officeooo:rsid="007cf115" officeooo:paragraph-rsid="007cf115" style:font-weight-asian="bold" style:font-weight-complex="bold"/>
    </style:style>
    <style:style style:name="P22" style:family="paragraph" style:parent-style-name="Heading_20_3">
      <style:text-properties officeooo:rsid="008deb85" officeooo:paragraph-rsid="008deb85"/>
    </style:style>
    <style:style style:name="P23" style:family="paragraph" style:parent-style-name="Text_20_body">
      <style:text-properties officeooo:rsid="00884d34" officeooo:paragraph-rsid="00884d34"/>
    </style:style>
    <style:style style:name="P24" style:family="paragraph" style:parent-style-name="Text_20_body" style:list-style-name="L1">
      <style:text-properties officeooo:rsid="007cf115" officeooo:paragraph-rsid="007cf115"/>
    </style:style>
    <style:style style:name="P25" style:family="paragraph" style:parent-style-name="Text_20_body">
      <style:paragraph-properties fo:text-align="center" style:justify-single-word="false"/>
      <style:text-properties officeooo:rsid="007cf115" officeooo:paragraph-rsid="007cf115"/>
    </style:style>
    <style:style style:name="P26" style:family="paragraph" style:parent-style-name="Text_20_body" style:list-style-name="L2">
      <style:text-properties officeooo:rsid="007e8cef" officeooo:paragraph-rsid="007e8cef"/>
    </style:style>
    <style:style style:name="P27" style:family="paragraph" style:parent-style-name="Text_20_body">
      <style:text-properties officeooo:paragraph-rsid="00884d34"/>
    </style:style>
    <style:style style:name="P28" style:family="paragraph" style:parent-style-name="Text_20_body" style:list-style-name="L3">
      <style:text-properties officeooo:rsid="00840783" officeooo:paragraph-rsid="00840783"/>
    </style:style>
    <style:style style:name="P29" style:family="paragraph" style:parent-style-name="Text_20_body">
      <style:paragraph-properties fo:text-align="center" style:justify-single-word="false"/>
      <style:text-properties officeooo:rsid="00840783" officeooo:paragraph-rsid="00840783"/>
    </style:style>
    <style:style style:name="P30" style:family="paragraph" style:parent-style-name="Heading_20_2">
      <style:text-properties officeooo:paragraph-rsid="007cf115"/>
    </style:style>
    <style:style style:name="P31" style:family="paragraph" style:parent-style-name="Text_20_body">
      <style:text-properties officeooo:rsid="0092800f" officeooo:paragraph-rsid="0092800f"/>
    </style:style>
    <style:style style:name="P32" style:family="paragraph" style:parent-style-name="Text_20_body">
      <style:paragraph-properties fo:text-align="center" style:justify-single-word="false"/>
      <style:text-properties officeooo:rsid="0092800f" officeooo:paragraph-rsid="0092800f"/>
    </style:style>
    <style:style style:name="P33" style:family="paragraph" style:parent-style-name="Heading_20_2">
      <style:text-properties officeooo:rsid="00884d34" officeooo:paragraph-rsid="00884d34"/>
    </style:style>
    <style:style style:name="P34" style:family="paragraph" style:parent-style-name="Text_20_body">
      <style:text-properties fo:font-weight="bold" officeooo:rsid="0089e6d3" officeooo:paragraph-rsid="0089e6d3" style:font-weight-asian="bold" style:font-weight-complex="bold"/>
    </style:style>
    <style:style style:name="T1" style:family="text">
      <style:text-properties fo:font-style="normal" officeooo:rsid="006621b0" style:font-style-asian="normal" style:font-style-complex="normal"/>
    </style:style>
    <style:style style:name="T2" style:family="text">
      <style:text-properties fo:font-style="normal" officeooo:rsid="0031c9d9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a28d3" style:font-weight-asian="normal" style:font-weight-complex="normal"/>
    </style:style>
    <style:style style:name="T6" style:family="text">
      <style:text-properties officeooo:rsid="00679d99"/>
    </style:style>
    <style:style style:name="T7" style:family="text">
      <style:text-properties fo:font-weight="bold" officeooo:rsid="00679d99" style:font-weight-asian="bold" style:font-weight-complex="bold"/>
    </style:style>
    <style:style style:name="T8" style:family="text">
      <style:text-properties fo:font-weight="normal" officeooo:rsid="00679d99" style:font-weight-asian="normal" style:font-weight-complex="normal"/>
    </style:style>
    <style:style style:name="T9" style:family="text">
      <style:text-properties fo:font-weight="normal" officeooo:rsid="006d210a" style:font-weight-asian="normal" style:font-weight-complex="normal"/>
    </style:style>
    <style:style style:name="T10" style:family="text">
      <style:text-properties fo:font-weight="normal" officeooo:rsid="00696158" style:font-weight-asian="normal" style:font-weight-complex="normal"/>
    </style:style>
    <style:style style:name="T11" style:family="text">
      <style:text-properties officeooo:rsid="008d9b45"/>
    </style:style>
    <style:style style:name="T12" style:family="text">
      <style:text-properties officeooo:rsid="008ff408"/>
    </style:style>
    <style:style style:name="T13" style:family="text">
      <style:text-properties fo:font-weight="normal" officeooo:rsid="00916287" style:font-weight-asian="normal" style:font-weight-complex="normal"/>
    </style:style>
    <style:style style:name="T14" style:family="text">
      <style:text-properties fo:font-weight="bold" officeooo:rsid="008e660a" style:font-weight-asian="bold" style:font-weight-complex="bold"/>
    </style:style>
    <style:style style:name="T15" style:family="text">
      <style:text-properties officeooo:rsid="00840783"/>
    </style:style>
    <style:style style:name="T16" style:family="text">
      <style:text-properties officeooo:rsid="00884d34"/>
    </style:style>
    <style:style style:name="T17" style:family="text">
      <style:text-properties fo:font-weight="bold" officeooo:rsid="00884d34" style:font-weight-asian="bold" style:font-weight-complex="bold"/>
    </style:style>
    <style:style style:name="T18" style:family="text">
      <style:text-properties fo:font-weight="normal" officeooo:rsid="00884d34" style:font-weight-asian="normal" style:font-weight-complex="normal"/>
    </style:style>
    <style:style style:name="T19" style:family="text">
      <style:text-properties officeooo:rsid="007cf11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339_202974590"/>Magnetism<text:bookmark-end text:name="__RefHeading___Toc339_202974590"/><text:bookmark-start text:name="__DdeLink__431_3458609412"/><text:bookmark-start text:name="__DdeLink__478_3458609412"/><text:bookmark-start text:name="__DdeLink__490_3458609412"/></text:p>
      <text:p text:style-name="P2"><text:span text:style-name="T1">March 26</text:span><text:span text:style-name="T2">, 202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41_202974590" office:name="Introduction to Magnetism" text:style-name="Index_20_Link" text:visited-style-name="Index_20_Link">Introduction to Magnetism<text:tab/>2</text:a></text:p>
          <text:p text:style-name="P4"><text:a xlink:type="simple" xlink:href="#__RefHeading___Toc386_3987408587" office:name="Where Do You See Magnets?" text:style-name="Index_20_Link" text:visited-style-name="Index_20_Link">Where Do You See Magnets?<text:tab/>2</text:a></text:p>
          <text:p text:style-name="P3"><text:a xlink:type="simple" xlink:href="#__RefHeading___Toc153_3688650005" office:name="Magnetic Force and Field" text:style-name="Index_20_Link" text:visited-style-name="Index_20_Link">Magnetic Force and Field<text:tab/>2</text:a></text:p>
          <text:p text:style-name="P4"><text:a xlink:type="simple" xlink:href="#__RefHeading___Toc380_3987408587" office:name="The Magnetic Field of an Atom" text:style-name="Index_20_Link" text:visited-style-name="Index_20_Link">The Magnetic Field of an Atom<text:tab/>2</text:a></text:p>
          <text:p text:style-name="P4"><text:a xlink:type="simple" xlink:href="#__RefHeading___Toc382_3987408587" office:name="The ANTS Acronym" text:style-name="Index_20_Link" text:visited-style-name="Index_20_Link">The ANTS Acronym<text:tab/>2</text:a></text:p>
          <text:p text:style-name="P4"><text:a xlink:type="simple" xlink:href="#__RefHeading___Toc384_3987408587" office:name="Magnetic Domains" text:style-name="Index_20_Link" text:visited-style-name="Index_20_Link">Magnetic Domains<text:tab/>2</text:a></text:p>
          <text:p text:style-name="P4"><text:a xlink:type="simple" xlink:href="#__RefHeading___Toc155_3688650005" office:name="Splitting a Magnet" text:style-name="Index_20_Link" text:visited-style-name="Index_20_Link">Splitting a Magnet<text:tab/>3</text:a></text:p>
          <text:p text:style-name="P3"><text:a xlink:type="simple" xlink:href="#__RefHeading___Toc157_3688650005" office:name="Electromagnetism" text:style-name="Index_20_Link" text:visited-style-name="Index_20_Link">Electromagnetism<text:tab/>3</text:a></text:p>
          <text:p text:style-name="P4"><text:a xlink:type="simple" xlink:href="#__RefHeading___Toc166_3688650005" office:name="Types of Current" text:style-name="Index_20_Link" text:visited-style-name="Index_20_Link">Types of Current<text:tab/>3</text:a></text:p>
          <text:p text:style-name="P4"><text:a xlink:type="simple" xlink:href="#__RefHeading___Toc168_3688650005" office:name="Right-Hand Rules" text:style-name="Index_20_Link" text:visited-style-name="Index_20_Link">Right-Hand Rules<text:tab/>3</text:a></text:p>
          <text:p text:style-name="P5"><text:a xlink:type="simple" xlink:href="#__RefHeading___Toc170_3688650005" office:name="The First Right-Hand Rule" text:style-name="Index_20_Link" text:visited-style-name="Index_20_Link">The First Right-Hand Rule<text:tab/>3</text:a></text:p>
          <text:p text:style-name="P5"><text:a xlink:type="simple" xlink:href="#__RefHeading___Toc172_3688650005" office:name="The Second Right-Hand Rule" text:style-name="Index_20_Link" text:visited-style-name="Index_20_Link">The Second Right-Hand Rule<text:tab/>4</text:a></text:p>
          <text:p text:style-name="P5"><text:a xlink:type="simple" xlink:href="#__RefHeading___Toc174_3688650005" office:name="The Third Right-Hand Rule" text:style-name="Index_20_Link" text:visited-style-name="Index_20_Link">The Third Right-Hand Rule<text:tab/>4</text:a></text:p>
          <text:p text:style-name="P4"><text:a xlink:type="simple" xlink:href="#__RefHeading___Toc176_3688650005" office:name="Drawing Magnetic Fields in Two Dimensions" text:style-name="Index_20_Link" text:visited-style-name="Index_20_Link">Drawing Magnetic Fields in Two Dimensions<text:tab/>5</text:a></text:p>
          <text:p text:style-name="P4"><text:a xlink:type="simple" xlink:href="#__RefHeading___Toc456_2599986441" office:name="Electromagnetic Induction" text:style-name="Index_20_Link" text:visited-style-name="Index_20_Link">Electromagnetic Induction<text:tab/>5</text:a></text:p>
        </text:index-body>
      </text:table-of-content>
      <text:p text:style-name="P6"/>
      <text:h text:style-name="P7" text:outline-level="1"><text:bookmark-start text:name="__RefHeading___Toc341_202974590"/>Introduction to Magnetism<text:bookmark-end text:name="__RefHeading___Toc341_202974590"/></text:h>
      <text:p text:style-name="P8"><text:bookmark-end text:name="__DdeLink__478_3458609412"/><text:bookmark-end text:name="__DdeLink__490_3458609412"/><text:bookmark-end text:name="__DdeLink__431_3458609412"/>Magnetic and electric field lines look very similar. The north and south poles act like positive and negative sides of a battery. Both magnetic and electric fields are created by moving electrons.</text:p>
      <text:h text:style-name="Heading_20_2" text:outline-level="2"><text:bookmark-start text:name="__RefHeading___Toc386_3987408587"/>Where Do You See Magnets?<text:bookmark-end text:name="__RefHeading___Toc386_3987408587"/></text:h>
      <text:p text:style-name="P9">Magnets are involved in many objects, including compasses, trains, the earth, the sun, and refrigerators. These are only several of the countless objects that function with magnetic fields.</text:p>
      <text:h text:style-name="P10" text:outline-level="1"><text:bookmark-start text:name="__RefHeading___Toc153_3688650005"/>Magnetic Force and Field<text:bookmark-end text:name="__RefHeading___Toc153_3688650005"/></text:h>
      <text:p text:style-name="P11">A <text:span text:style-name="T3">magnetic field</text:span> is the space around a magnet represented by continuous lines of force or magnetic flux that emerge from north-seeking magnetic poles and enter south-seeking magnetic poles.</text:p>
      <text:p text:style-name="P11">The unit for measuring magnetic fields is called the tesla (<draw:frame draw:style-name="fr1" draw:name="Object1" text:anchor-type="as-char" svg:y="-0.1492in" svg:width="0.1138in" svg:height="0.1854in" draw:z-index="0"><draw:object xlink:href="./Object 1" xlink:type="simple" xlink:show="embed" xlink:actuate="onLoad"/><draw:image xlink:href="./ObjectReplacements/Object 1" xlink:type="simple" xlink:show="embed" xlink:actuate="onLoad"/></draw:frame>). The unit for measuring magnetic flux is the weber (<draw:frame draw:style-name="fr1" draw:name="Object2" text:anchor-type="as-char" svg:y="-0.1492in" svg:width="0.252in" svg:height="0.1854in" draw:z-index="1"><draw:object xlink:href="./Object 2" xlink:type="simple" xlink:show="embed" xlink:actuate="onLoad"/><draw:image xlink:href="./ObjectReplacements/Object 2" xlink:type="simple" xlink:show="embed" xlink:actuate="onLoad"/></draw:frame>).</text:p>
      <text:p text:style-name="P12">Magnetic force<text:span text:style-name="T4"> represents the attraction or repulsion that arises within a magnetic field. </text:span><text:span text:style-name="T5">Fields are vector quantities, so they must be drawn with arrows. The strongest point in a field is located within the most dense region of field lines. Field lines never touch or cross.</text:span></text:p>
      <text:h text:style-name="Heading_20_2" text:outline-level="2"><text:bookmark-start text:name="__RefHeading___Toc380_3987408587"/>The Magnetic Field of an Atom<text:bookmark-end text:name="__RefHeading___Toc380_3987408587"/></text:h>
      <text:p text:style-name="Text_20_body"><text:span text:style-name="T6">Each electron in an atom behaves like a tiny magnet. Electrons in atoms tend to go in</text:span><text:span text:style-name="T7"> pairs</text:span><text:span text:style-name="T8">, spinning in opposite directions and canceling each other </text:span><text:span text:style-name="T9">out</text:span><text:span text:style-name="T8">. </text:span><text:span text:style-name="T7">Ferromagnetic materials</text:span><text:span text:style-name="T8">, like iron, nickle, cobalt, and neodymium, have the ability to become strong </text:span><text:span text:style-name="T10">permanent </text:span><text:span text:style-name="T8">magnets.</text:span></text:p>
      <text:h text:style-name="Heading_20_2" text:outline-level="2"><text:bookmark-start text:name="__RefHeading___Toc382_3987408587"/>The ANTS Acronym<text:bookmark-end text:name="__RefHeading___Toc382_3987408587"/></text:h>
      <text:p text:style-name="P13">Use the acronym <text:span text:style-name="T3">ANTS</text:span><text:span text:style-name="T4"> when drawing magnetic field lines:</text:span></text:p>
      <text:p text:style-name="P14"><text:span text:style-name="T3">A</text:span>way, <text:span text:style-name="T3">N</text:span>orth, <text:span text:style-name="T3">T</text:span>oward, <text:span text:style-name="T3">S</text:span>outh.</text:p>
      <text:p text:style-name="P15">This acronym <text:span text:style-name="T11">describes</text:span> the behavior of magnetic field lines: the lines travel <text:span text:style-name="T3">away</text:span> from the north pole and <text:span text:style-name="T3">toward</text:span> the south pole.</text:p>
      <text:h text:style-name="Heading_20_2" text:outline-level="2"><text:bookmark-start text:name="__RefHeading___Toc384_3987408587"/>Magnetic Domains<text:bookmark-end text:name="__RefHeading___Toc384_3987408587"/></text:h>
      <text:p text:style-name="P16"><text:span text:style-name="T3">Magnetic domains</text:span><text:span text:style-name="T4"> are regions within a magnetic material in which the magnetization is in a uniform direction. In </text:span><text:span text:style-name="T3">non-magnetic materials</text:span><text:span text:style-name="T4">, however, domains are more arbitrary and do not point toward a common direction.</text:span></text:p>
      <text:h text:style-name="Heading_20_2" text:outline-level="2"><text:bookmark-start text:name="__RefHeading___Toc155_3688650005"/><text:soft-page-break/>Splitting a Magnet<text:bookmark-end text:name="__RefHeading___Toc155_3688650005"/></text:h>
      <text:p text:style-name="P17">When a magnet is split into smaller pieces, each piece becomes a new magnet with its own north and south pole.</text:p>
      <text:h text:style-name="P18" text:outline-level="1"><text:bookmark-start text:name="__RefHeading___Toc157_3688650005"/>Electromagnetism<text:bookmark-end text:name="__RefHeading___Toc157_3688650005"/></text:h>
      <text:p text:style-name="P19">There are close relationships between magnetism and electricity. One such example of how they are related is in the case of a current-carrying wire; electricity flowing through a wire can create a magnetic field. This was discovered by <text:span text:style-name="T3">Hans Christian Oersted</text:span><text:span text:style-name="T4"> in 1820.</text:span></text:p>
      <text:h text:style-name="P20" text:outline-level="2"><text:bookmark-start text:name="__RefHeading___Toc166_3688650005"/>Types of Current<text:bookmark-end text:name="__RefHeading___Toc166_3688650005"/></text:h>
      <text:p text:style-name="P21">Conventional current<text:span text:style-name="T4"> is the flow of positive charges from a positive terminal to a negative terminal. When considering magnetism, you must use the </text:span>right-hand rules<text:span text:style-name="T4">.</text:span></text:p>
      <text:p text:style-name="P21">Electron <text:span text:style-name="T12">flow</text:span><text:span text:style-name="T4"> is the flow of electrons from a negative terminal to a positive terminal. </text:span><text:span text:style-name="T13">You can use the same rules, but using your left hand instead.</text:span></text:p>
      <text:h text:style-name="P20" text:outline-level="2"><text:bookmark-start text:name="__RefHeading___Toc168_3688650005"/>Right-Hand Rules<text:bookmark-end text:name="__RefHeading___Toc168_3688650005"/></text:h>
      <text:h text:style-name="P22" text:outline-level="3"><text:bookmark-start text:name="__RefHeading___Toc170_3688650005"/>The First Right-Hand Rule<text:bookmark-end text:name="__RefHeading___Toc170_3688650005"/></text:h>
      <text:p text:style-name="P23">The <text:span text:style-name="T3">first </text:span><text:span text:style-name="T14">right-hand </text:span><text:span text:style-name="T3">rule</text:span><text:span text:style-name="T4"> is used to solve for the direction of the magnetic field around a current-carrying wire. To use it:</text:span></text:p>
      <text:list text:style-name="L1">
        <text:list-item>
          <text:p text:style-name="P24">Point your thumb in the direction of the current (conventional current).</text:p>
        </text:list-item>
        <text:list-item>
          <text:p text:style-name="P24">Curl your fingers around the wire in the direction of the magnetic field.</text:p>
        </text:list-item>
      </text:list>
      <text:p text:style-name="P25"><draw:frame draw:style-name="fr2" draw:name="Frame1" text:anchor-type="char" svg:width="4.0909in" draw:z-index="3"><draw:text-box fo:min-height="2.6791in"><text:p text:style-name="Figure"><draw:frame draw:style-name="fr3" draw:name="Image2" text:anchor-type="as-char" svg:width="4.0909in" style:rel-width="100%" svg:height="2.6791in" style:rel-height="scale" draw:z-index="4"><draw:image xlink:href="Pictures/10000001000002180000015F4FE79281.png" xlink:type="simple" xlink:show="embed" xlink:actuate="onLoad" draw:mime-type="image/png"/></draw:frame>Figure <text:sequence text:ref-name="refFigure0" text:name="Figure" text:formula="ooow:Figure+1" style:num-format="1">1</text:sequence>: A visual demonstration of the first right-hand rule.</text:p></draw:text-box></draw:frame></text:p>
      <text:h text:style-name="P22" text:outline-level="3"><text:bookmark-start text:name="__RefHeading___Toc172_3688650005"/><text:soft-page-break/>The Second Right-Hand Rule<text:bookmark-end text:name="__RefHeading___Toc172_3688650005"/></text:h>
      <text:p text:style-name="P23">The <text:span text:style-name="T3">second </text:span><text:span text:style-name="T14">right-hand</text:span><text:span text:style-name="T3"> rule</text:span><text:span text:style-name="T4"> is used to solve for the direction of the magnetic field of a solenoid or a loop of wire. To use the rule:</text:span></text:p>
      <text:list text:style-name="L2">
        <text:list-item>
          <text:p text:style-name="P26">Curl your fingers around the solenoid or loop of wire <text:span text:style-name="T15">in</text:span> the direction of the current (conventional current).</text:p>
        </text:list-item>
        <text:list-item>
          <text:p text:style-name="P26">Point your thumb toward the north pole.</text:p>
        </text:list-item>
      </text:list>
      <text:h text:style-name="P22" text:outline-level="3"><text:bookmark-start text:name="__RefHeading___Toc174_3688650005"/><draw:frame draw:style-name="fr2" draw:name="Frame2" text:anchor-type="char" svg:width="2.6665in" draw:z-index="5"><draw:text-box fo:min-height="3.4791in"><text:p text:style-name="Figure"><draw:frame draw:style-name="fr3" draw:name="Image3" text:anchor-type="as-char" svg:width="2.6665in" style:rel-width="100%" svg:height="3.4791in" style:rel-height="scale" draw:z-index="6"><draw:image xlink:href="Pictures/10000001000001000000014EC150DB7F.png" xlink:type="simple" xlink:show="embed" xlink:actuate="onLoad" draw:mime-type="image/png"/></draw:frame>Figure <text:sequence text:ref-name="refFigure1" text:name="Figure" text:formula="ooow:Figure+1" style:num-format="1">2</text:sequence>: A visual demonstration of the second right-hand rule (solenoid rule).</text:p></draw:text-box></draw:frame>The Third Right-Hand Rule<text:bookmark-end text:name="__RefHeading___Toc174_3688650005"/></text:h>
      <text:p text:style-name="P27"><text:span text:style-name="T16">The</text:span><text:span text:style-name="T17"> third </text:span><text:span text:style-name="T14">right-hand </text:span><text:span text:style-name="T17">rule</text:span><text:span text:style-name="T18"> is used to solve for the direction of the </text:span><text:span text:style-name="T16">m</text:span>agnetic <text:span text:style-name="T16">f</text:span>orce <text:span text:style-name="T16">a</text:span>cting on a <text:span text:style-name="T16">c</text:span>urrent-<text:span text:style-name="T16">c</text:span>arrying <text:span text:style-name="T16">w</text:span>ire (or <text:span text:style-name="T16">c</text:span>harged <text:span text:style-name="T16">p</text:span>article) <text:span text:style-name="T16">p</text:span>laced in a <text:span text:style-name="T16">m</text:span>agnetic <text:span text:style-name="T16">f</text:span>ield. <text:span text:style-name="T16">To use this rule:</text:span></text:p>
      <text:list text:style-name="L3">
        <text:list-item>
          <text:p text:style-name="P28">Point your fingers in the direction of the magnetic field (from north to south).</text:p>
        </text:list-item>
        <text:list-item>
          <text:p text:style-name="P28">Point your thumb in the direction of the current (or velocity of a positively charged particle).</text:p>
        </text:list-item>
        <text:list-item>
          <text:p text:style-name="P28">Face your open palm in the direction of the magnetic force on the wire or charged particle.</text:p>
        </text:list-item>
      </text:list>
      <text:p text:style-name="P29"><draw:frame draw:style-name="fr4" draw:name="Frame3" text:anchor-type="as-char" svg:width="2.9075in" draw:z-index="7"><draw:text-box fo:min-height="1.4165in"><text:p text:style-name="Figure"><draw:frame draw:style-name="fr3" draw:name="Image4" text:anchor-type="as-char" svg:width="2.9075in" style:rel-width="100%" svg:height="1.4165in" style:rel-height="scale" draw:z-index="8"><draw:image xlink:href="Pictures/100000010000026E0000012F101E715A.png" xlink:type="simple" xlink:show="embed" xlink:actuate="onLoad" draw:mime-type="image/png"/></draw:frame>Figure <text:sequence text:ref-name="refFigure2" text:name="Figure" text:formula="ooow:Figure+1" style:num-format="1">3</text:sequence>: A visual demonstration of the third right-hand rule.</text:p></draw:text-box></draw:frame></text:p>
      <text:h text:style-name="P30" text:outline-level="2"><text:bookmark-start text:name="__RefHeading___Toc176_3688650005"/><text:soft-page-break/><text:span text:style-name="T19">Drawing Magnetic Fields in Two Dimensions</text:span><text:bookmark-end text:name="__RefHeading___Toc176_3688650005"/></text:h>
      <text:p text:style-name="P31">There are two symbols used to represent the direction of magnetic fields:</text:p>
      <text:p text:style-name="P32"><draw:frame draw:style-name="fr5" draw:name="Image1" text:anchor-type="as-char" svg:width="3.9819in" svg:height="3.4917in" draw:z-index="9"><draw:image xlink:href="Pictures/10000001000003E80000036D379EBA87.png" xlink:type="simple" xlink:show="embed" xlink:actuate="onLoad" draw:mime-type="image/png"/></draw:frame><draw:frame draw:style-name="fr6" draw:name="Image5" text:anchor-type="as-char" svg:width="6.9252in" svg:height="3.622in" draw:z-index="10"><draw:image xlink:href="Pictures/1000000100000E150000075E56E3C41F.png" xlink:type="simple" xlink:show="embed" xlink:actuate="onLoad" draw:mime-type="image/png"/></draw:frame></text:p>
      <text:h text:style-name="P33" text:outline-level="2"><text:bookmark-start text:name="__RefHeading___Toc456_2599986441"/>Electromagnetic Induction<text:bookmark-end text:name="__RefHeading___Toc456_2599986441"/></text:h>
      <text:p text:style-name="P34">Electromagnetic induction<text:span text:style-name="T4"> refers to the induction of an electric potential difference (voltage) when a wire is moved through a magnetic field. You must cut the magnetic field lines (flux lines) at a </text:span><draw:frame draw:style-name="fr1" draw:name="Object3" text:anchor-type="as-char" svg:y="-0.1492in" svg:width="0.1728in" svg:height="0.1854in" draw:z-index="2"><draw:object xlink:href="./Object 3" xlink:type="simple" xlink:show="embed" xlink:actuate="onLoad"/><draw:image xlink:href="./ObjectReplacements/Object 3" xlink:type="simple" xlink:show="embed" xlink:actuate="onLoad"/></draw:frame>-degree angle<text:span text:style-name="T4"> to produce a </text:span>maximum voltage<text:span text:style-name="T4">. Moving the wire </text:span>parallel to the field<text:span text:style-name="T4"> produces </text:span>zero voltage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4:22:15.225200250</meta:creation-date>
    <dc:date>2026-06-09T20:47:37.846851144</dc:date>
    <meta:editing-duration>PT7H27S</meta:editing-duration>
    <meta:editing-cycles>113</meta:editing-cycles>
    <meta:generator>LibreOffice/25.8.5.2$Linux_X86_64 LibreOffice_project/580$Build-2</meta:generator>
    <meta:document-statistic meta:table-count="0" meta:image-count="5" meta:object-count="3" meta:page-count="5" meta:paragraph-count="64" meta:word-count="799" meta:character-count="4783" meta:non-whitespace-character-count="4055"/>
  </office:meta>
</office:document-meta>
</file>

<file path=Object 1/content.xml><?xml version="1.0" encoding="utf-8"?>
<math xmlns="http://www.w3.org/1998/Math/MathML" display="block">
  <semantics>
    <mtext>T</mtext>
    <annotation encoding="StarMath 5.0">"T"</annotation>
  </semantics>
</math>
</file>

<file path=Object 2/content.xml><?xml version="1.0" encoding="utf-8"?>
<math xmlns="http://www.w3.org/1998/Math/MathML" display="block">
  <semantics>
    <mtext>Wb</mtext>
    <annotation encoding="StarMath 5.0">"Wb"</annotation>
  </semantics>
</math>
</file>

<file path=Object 3/content.xml><?xml version="1.0" encoding="utf-8"?>
<math xmlns="http://www.w3.org/1998/Math/MathML" display="block">
  <semantics>
    <mn>90</mn>
    <annotation encoding="StarMath 5.0">90</annotation>
  </semantics>
</math>
</file>
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styles.xml" manifest:media-type="text/xml"/>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Pictures/10000001000008000000055156CD729C.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meta.xml" manifest:media-type="text/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559598" officeooo:paragraph-rsid="00559598"/>
    </style:style>
    <style:style style:name="P2" style:family="paragraph" style:parent-style-name="Text_20_body">
      <style:paragraph-properties fo:text-align="center" style:justify-single-word="false"/>
      <style:text-properties fo:font-style="normal" officeooo:rsid="0123fc99" officeooo:paragraph-rsid="001dc2ea"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Heading_20_1" style:list-style-name="">
      <style:text-properties officeooo:rsid="004c7a21" officeooo:paragraph-rsid="001dc2ea"/>
    </style:style>
    <style:style style:name="P5" style:family="paragraph" style:parent-style-name="Heading_20_1">
      <style:paragraph-properties fo:break-before="page"/>
      <style:text-properties officeooo:rsid="00559598" officeooo:paragraph-rsid="00559598"/>
    </style:style>
    <style:style style:name="P6" style:family="paragraph" style:parent-style-name="Text_20_body">
      <style:text-properties officeooo:rsid="00559598" officeooo:paragraph-rsid="00559598"/>
    </style:style>
    <style:style style:name="P7" style:family="paragraph" style:parent-style-name="Heading_20_1">
      <style:text-properties officeooo:rsid="00559598" officeooo:paragraph-rsid="00559598"/>
    </style:style>
    <style:style style:name="P8" style:family="paragraph" style:parent-style-name="Text_20_body">
      <style:text-properties fo:font-weight="normal" officeooo:rsid="00559598" officeooo:paragraph-rsid="00559598" style:font-weight-asian="normal" style:font-weight-complex="normal"/>
    </style:style>
    <style:style style:name="P9" style:family="paragraph" style:parent-style-name="Heading_20_1">
      <style:text-properties officeooo:rsid="00573d29" officeooo:paragraph-rsid="00573d29"/>
    </style:style>
    <style:style style:name="P10" style:family="paragraph" style:parent-style-name="Text_20_body" style:list-style-name="L1">
      <style:text-properties officeooo:paragraph-rsid="00573d29"/>
    </style:style>
    <style:style style:name="P11" style:family="paragraph" style:parent-style-name="Text_20_body" style:list-style-name="L1">
      <style:text-properties officeooo:rsid="00573d29" officeooo:paragraph-rsid="00573d29"/>
    </style:style>
    <style:style style:name="P12" style:family="paragraph" style:parent-style-name="Text_20_body" style:list-style-name="L1">
      <style:paragraph-properties fo:text-align="center" style:justify-single-word="false"/>
      <style:text-properties officeooo:rsid="00573d29" officeooo:paragraph-rsid="00573d29"/>
    </style:style>
    <style:style style:name="P13" style:family="paragraph" style:parent-style-name="Text_20_body" style:list-style-name="L1">
      <style:paragraph-properties fo:text-align="start" style:justify-single-word="false"/>
      <style:text-properties officeooo:rsid="00573d29" officeooo:paragraph-rsid="00573d29"/>
    </style:style>
    <style:style style:name="P14" style:family="paragraph" style:parent-style-name="Text_20_body" style:list-style-name="L1">
      <style:paragraph-properties fo:text-align="center" style:justify-single-word="false"/>
      <style:text-properties officeooo:rsid="0057be7a" officeooo:paragraph-rsid="0057be7a"/>
    </style:style>
    <style:style style:name="P15" style:family="paragraph" style:parent-style-name="Text_20_body" style:list-style-name="L1">
      <style:paragraph-properties fo:text-align="start" style:justify-single-word="false"/>
      <style:text-properties officeooo:rsid="0057be7a" officeooo:paragraph-rsid="0057be7a"/>
    </style:style>
    <style:style style:name="T1" style:family="text">
      <style:text-properties officeooo:rsid="0035f633"/>
    </style:style>
    <style:style style:name="T2" style:family="text">
      <style:text-properties officeooo:rsid="0047f7c9"/>
    </style:style>
    <style:style style:name="T3" style:family="text">
      <style:text-properties officeooo:rsid="00559598"/>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573d29"/>
    </style:style>
    <style:style style:name="fr1" style:family="graphic" style:parent-style-name="Formula">
      <style:graphic-properties style:vertical-pos="from-top" draw:ole-draw-aspect="1"/>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ces on Inclined Planes<text:bookmark-start text:name="__DdeLink__138_391587487"/><text:bookmark-start text:name="__DdeLink__502_3041763869"/></text:p>
      <text:p text:style-name="P2"><text:span text:style-name="T1">November </text:span><text:span text:style-name="T2">1</text:span><text:span text:style-name="T3">7</text:span>,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2229_3911434191" office:name="Introduction to Forces on Inclined Planes" text:style-name="Index_20_Link" text:visited-style-name="Index_20_Link">Introduction to Forces on Inclined Planes<text:tab/>2</text:a></text:p>
          <text:p text:style-name="P3"><text:a xlink:type="simple" xlink:href="#__RefHeading___Toc2409_1628348750" office:name="Which Forces Are Present?" text:style-name="Index_20_Link" text:visited-style-name="Index_20_Link">Which Forces Are Present?<text:tab/>2</text:a></text:p>
          <text:p text:style-name="P3"><text:a xlink:type="simple" xlink:href="#__RefHeading___Toc2411_1628348750" office:name="Examples and Applications" text:style-name="Index_20_Link" text:visited-style-name="Index_20_Link">Examples and Applications<text:tab/>3</text:a></text:p>
        </text:index-body>
      </text:table-of-content>
      <text:h text:style-name="P4" text:outline-level="1"><text:bookmark-start text:name="__RefHeading___Toc627_4069653955"/>­<text:bookmark-end text:name="__RefHeading___Toc627_4069653955"/></text:h>
      <text:h text:style-name="P5" text:outline-level="1" text:is-list-header="true"><text:bookmark-end text:name="__DdeLink__502_3041763869"/><text:bookmark-end text:name="__DdeLink__138_391587487"/><text:bookmark-start text:name="__RefHeading___Toc2229_3911434191"/>Introduction to Forces on Inclined Planes<text:bookmark-end text:name="__RefHeading___Toc2229_3911434191"/></text:h>
      <text:p text:style-name="P6">Objects slide down hills because there is a<text:span text:style-name="T4"> </text:span><text:span text:style-name="T5">parallel force</text:span><text:span text:style-name="T4"> that acts on the object directing it downward. However, the object must overcome a force of friction in order to start moving. The force of friction depends on the </text:span><text:span text:style-name="T5">angle of elevation</text:span><text:span text:style-name="T4"> of the plane as well as the weight of the object.</text:span></text:p>
      <text:h text:style-name="P7" text:outline-level="1"><text:bookmark-start text:name="__RefHeading___Toc2409_1628348750"/>Which Forces Are Present?<text:bookmark-end text:name="__RefHeading___Toc2409_1628348750"/></text:h>
      <text:p text:style-name="P6">On an <text:span text:style-name="T5">inclined surface</text:span><text:span text:style-name="T4">, the normal force of an object does not point directly upward from the center of Earth, but rather </text:span><text:span text:style-name="T5">perpendicular to the surface</text:span><text:span text:style-name="T4">. However, the weight, or the force of gravity (</text:span><text:span text:style-name="T4"><draw:frame draw:style-name="fr1" draw:name="Object1" text:anchor-type="as-char" svg:y="-0.1492in" svg:width="0.1799in" svg:height="0.2102in" draw:z-index="0"><draw:object xlink:href="./Object 1" xlink:type="simple" xlink:show="embed" xlink:actuate="onLoad"/><draw:image xlink:href="./ObjectReplacements/Object 1" xlink:type="simple" xlink:show="embed" xlink:actuate="onLoad"/></draw:frame></text:span><text:span text:style-name="T4">), still points toward the center of Earth. Similar to forces in an elevator, </text:span><text:span text:style-name="T4"><draw:frame draw:style-name="fr1" draw:name="Object2" text:anchor-type="as-char" svg:y="-0.1492in" svg:width="0.5264in" svg:height="0.2102in" draw:z-index="1"><draw:object xlink:href="./Object 2" xlink:type="simple" xlink:show="embed" xlink:actuate="onLoad"/><draw:image xlink:href="./ObjectReplacements/Object 2" xlink:type="simple" xlink:show="embed" xlink:actuate="onLoad"/></draw:frame></text:span><text:span text:style-name="T4"><text:s/>on an inclined plane.</text:span></text:p>
      <text:p text:style-name="P6"><text:span text:style-name="T4">The weight of an object on an inclined plane consists of two components: a </text:span><text:span text:style-name="T5">perpendicular force</text:span><text:span text:style-name="T4"> and a parallel force. The magnitude of the perpendicular force equals that of the normal force. The magnitude of the parallel force is essentially the magnitude of the force of friction acting on the object on the slope.</text:span></text:p>
      <text:p text:style-name="P8">To calculate the forces acting on an object on an inclined plane, you would need <text:span text:style-name="T5">at least </text:span>the angle of elevation of the slope along with the weight or one of the components. <text:span text:style-name="T6">You would then use trigonometric functions to compute the magnitudes of the other forces.</text:span></text:p>
      <text:h text:style-name="P9" text:outline-level="1"><draw:frame draw:style-name="fr2" draw:name="Frame1" text:anchor-type="paragraph" svg:width="4.3626in" style:rel-width="63%" svg:height="5.1429in" style:rel-height="scale-min" draw:z-index="2"><draw:text-box><text:p text:style-name="Figure"><draw:frame draw:style-name="fr3" draw:name="Image1" text:anchor-type="paragraph" svg:width="4.3189in" style:rel-width="99%" svg:height="2.8681in" style:rel-height="scale" draw:z-index="3"><draw:image xlink:href="Pictures/10000001000008000000055156CD729C.png" xlink:type="simple" xlink:show="embed" xlink:actuate="onLoad" draw:mime-type="image/png"/></draw:frame>Figure <text:sequence text:ref-name="refFigure0" text:name="Figure" text:formula="ooow:Figure+1" style:num-format="1">1</text:sequence>: The box on the slope is at rest. The red vector represents the weight of the object, and its magnitude is the length of the hypotenuse of the triangle formed by the components. The parallel force is the black vector labeled <text:s/>and is directed down the slope. Additionally, the perpendicular force is the black vector labeled <text:s/>and is directed downward perpendicular to the surface of the plane. The normal force, represented by the blue vector, is equal in magnitude but opposite in direction to the perpendicular force. Finally, the force of friction, depicted by the green vector, is equal in magnitude but opposite in direction to the parallel force.</text:p></draw:text-box></draw:frame><text:bookmark-start text:name="__RefHeading___Toc2411_1628348750"/><text:soft-page-break/>Examples and Applications<text:bookmark-end text:name="__RefHeading___Toc2411_1628348750"/></text:h>
      <text:list text:style-name="L1">
        <text:list-item>
          <text:p text:style-name="P10"><text:span text:style-name="T6">A </text:span><text:span text:style-name="T6"><draw:frame draw:style-name="fr1" draw:name="Object3" text:anchor-type="as-char" svg:y="-0.1492in" svg:width="0.211in" svg:height="0.1854in" draw:z-index="4"><draw:object xlink:href="./Object 3" xlink:type="simple" xlink:show="embed" xlink:actuate="onLoad"/><draw:image xlink:href="./ObjectReplacements/Object 3" xlink:type="simple" xlink:show="embed" xlink:actuate="onLoad"/></draw:frame></text:span><text:span text:style-name="T6">-kilogram object is at rest on an inclined plane with an angle of elevation of </text:span><text:span text:style-name="T6"><draw:frame draw:style-name="fr1" draw:name="Object4" text:anchor-type="as-char" svg:y="-0.1492in" svg:width="0.2098in" svg:height="0.1854in" draw:z-index="5"><draw:object xlink:href="./Object 4" xlink:type="simple" xlink:show="embed" xlink:actuate="onLoad"/><draw:image xlink:href="./ObjectReplacements/Object 4" xlink:type="simple" xlink:show="embed" xlink:actuate="onLoad"/></draw:frame></text:span><text:span text:style-name="T6"><text:s/>degrees.</text:span></text:p>
          <text:list>
            <text:list-item>
              <text:p text:style-name="P11">Calculate the weight of the <draw:frame draw:style-name="fr1" draw:name="Object5" text:anchor-type="as-char" svg:y="-0.1492in" svg:width="0.211in" svg:height="0.1854in" draw:z-index="6"><draw:object xlink:href="./Object 5" xlink:type="simple" xlink:show="embed" xlink:actuate="onLoad"/><draw:image xlink:href="./ObjectReplacements/Object 5" xlink:type="simple" xlink:show="embed" xlink:actuate="onLoad"/></draw:frame>-kilogram object.</text:p>
              <text:p text:style-name="P12"><draw:frame draw:style-name="fr1" draw:name="Object6" text:anchor-type="as-char" svg:y="-0.3516in" svg:width="1.5508in" svg:height="0.6701in" draw:z-index="7"><draw:object xlink:href="./Object 6" xlink:type="simple" xlink:show="embed" xlink:actuate="onLoad"/><draw:image xlink:href="./ObjectReplacements/Object 6" xlink:type="simple" xlink:show="embed" xlink:actuate="onLoad"/></draw:frame></text:p>
            </text:list-item>
            <text:list-item>
              <text:p text:style-name="P13">Determine the magnitude and direction of the force of friction acting on the object at rest.</text:p>
              <text:p text:style-name="P12"><draw:frame draw:style-name="fr1" draw:name="Object7" text:anchor-type="as-char" svg:y="-0.3516in" svg:width="2.1965in" svg:height="0.6701in" draw:z-index="8"><draw:object xlink:href="./Object 7" xlink:type="simple" xlink:show="embed" xlink:actuate="onLoad"/><draw:image xlink:href="./ObjectReplacements/Object 7" xlink:type="simple" xlink:show="embed" xlink:actuate="onLoad"/></draw:frame></text:p>
              <text:p text:style-name="P14">The force of friction is <draw:frame draw:style-name="fr1" draw:name="Object8" text:anchor-type="as-char" svg:y="-0.1492in" svg:width="0.3181in" svg:height="0.1854in" draw:z-index="9"><draw:object xlink:href="./Object 8" xlink:type="simple" xlink:show="embed" xlink:actuate="onLoad"/><draw:image xlink:href="./ObjectReplacements/Object 8" xlink:type="simple" xlink:show="embed" xlink:actuate="onLoad"/></draw:frame>, and it is directed upward along the inclined plane.</text:p>
            </text:list-item>
            <text:list-item>
              <text:p text:style-name="P15">Calculate the magnitude of the perpendicular component of the weight vector of the object.</text:p>
              <text:p text:style-name="P14"><draw:frame draw:style-name="fr1" draw:name="Object9" text:anchor-type="as-char" svg:y="-0.3516in" svg:width="2.0654in" svg:height="0.6701in" draw:z-index="10"><draw:object xlink:href="./Object 9" xlink:type="simple" xlink:show="embed" xlink:actuate="onLoad"/><draw:image xlink:href="./ObjectReplacements/Object 9" xlink:type="simple" xlink:show="embed" xlink:actuate="onLoad"/></draw:frame></text:p>
            </text:list-item>
            <text:list-item>
              <text:p text:style-name="P15"><text:soft-page-break/>Assuming the ramp is frictionless, calculate the magnitude of the acceleration of the object when a force of <draw:frame draw:style-name="fr1" draw:name="Object10" text:anchor-type="as-char" svg:y="-0.1492in" svg:width="0.3563in" svg:height="0.1854in" draw:z-index="11"><draw:object xlink:href="./Object 10" xlink:type="simple" xlink:show="embed" xlink:actuate="onLoad"/><draw:image xlink:href="./ObjectReplacements/Object 10" xlink:type="simple" xlink:show="embed" xlink:actuate="onLoad"/></draw:frame><text:s/>directed down the slope is applied to the object.</text:p>
              <text:p text:style-name="P14"><draw:frame draw:style-name="fr1" draw:name="Object11" text:anchor-type="as-char" svg:y="-0.3398in" svg:width="1.2091in" svg:height="0.6465in" draw:z-index="12"><draw:object xlink:href="./Object 11" xlink:type="simple" xlink:show="embed" xlink:actuate="onLoad"/><draw:image xlink:href="./ObjectReplacements/Object 11" xlink:type="simple" xlink:show="embed" xlink:actuate="onLoad"/></draw:frame><text:s/></text:p>
              <text:p text:style-name="P14"><draw:frame draw:style-name="fr1" draw:name="Object12" text:anchor-type="as-char" svg:y="-0.3472in" svg:width="1.1299in" svg:height="0.6362in" draw:z-index="13"><draw:object xlink:href="./Object 12" xlink:type="simple" xlink:show="embed" xlink:actuate="onLoad"/><draw:image xlink:href="./ObjectReplacements/Object 12" xlink:type="simple" xlink:show="embed" xlink:actuate="onLoad"/></draw:frame></text:p>
              <text:p text:style-name="P14">The magnitude of the acceleration of the object when a force of <draw:frame draw:style-name="fr1" draw:name="Object13" text:anchor-type="as-char" svg:y="-0.1492in" svg:width="0.3563in" svg:height="0.1854in" draw:z-index="14"><draw:object xlink:href="./Object 13" xlink:type="simple" xlink:show="embed" xlink:actuate="onLoad"/><draw:image xlink:href="./ObjectReplacements/Object 13" xlink:type="simple" xlink:show="embed" xlink:actuate="onLoad"/></draw:frame><text:s/>directed down the slope is applied to the object is <draw:frame draw:style-name="fr1" draw:name="Object14" text:anchor-type="as-char" svg:y="-0.1728in" svg:width="0.648in" svg:height="0.2091in" draw:z-index="15"><draw:object xlink:href="./Object 14" xlink:type="simple" xlink:show="embed" xlink:actuate="onLoad"/><draw:image xlink:href="./ObjectReplacements/Object 14" xlink:type="simple" xlink:show="embed" xlink:actuate="onLoad"/></draw:fram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1T14:13:00.953938585</meta:creation-date>
    <dc:date>2026-06-08T20:52:57.706749332</dc:date>
    <meta:editing-duration>PT2H10M1S</meta:editing-duration>
    <meta:editing-cycles>26</meta:editing-cycles>
    <meta:generator>LibreOffice/25.8.5.2$Linux_X86_64 LibreOffice_project/580$Build-2</meta:generator>
    <meta:document-statistic meta:table-count="0" meta:image-count="1" meta:object-count="14" meta:page-count="4" meta:paragraph-count="28" meta:word-count="483" meta:character-count="2764" meta:non-whitespace-character-count="2302"/>
  </office:meta>
</office:document-meta>
</file>

<file path=Object 1/content.xml><?xml version="1.0" encoding="utf-8"?>
<math xmlns="http://www.w3.org/1998/Math/MathML" display="block">
  <semantics>
    <msub>
      <mi>F</mi>
      <mi>g</mi>
    </msub>
    <annotation encoding="StarMath 5.0">F_g</annotation>
  </semantics>
</math>
</file>

<file path=Object 10/content.xml><?xml version="1.0" encoding="utf-8"?>
<math xmlns="http://www.w3.org/1998/Math/MathML" display="block">
  <semantics>
    <mrow>
      <mn>20.</mn>
      <mtext>N</mtext>
    </mrow>
    <annotation encoding="StarMath 5.0">20. "N"</annotation>
  </semantics>
</math>
</file>

<file path=Object 11/content.xml><?xml version="1.0" encoding="utf-8"?>
<math xmlns="http://www.w3.org/1998/Math/MathML" display="block">
  <semantics>
    <mtable>
      <mtr>
        <mtd>
          <mrow>
            <msub>
              <mi>F</mi>
              <mtext>net</mtext>
            </msub>
            <mo stretchy="false">=</mo>
            <mrow>
              <msub>
                <mi>F</mi>
                <mtext>applied</mtext>
              </msub>
              <mo stretchy="false">−</mo>
              <msub>
                <mi>F</mi>
                <mi>f</mi>
              </msub>
            </mrow>
          </mrow>
        </mtd>
      </mtr>
      <mtr>
        <mtd>
          <mrow>
            <mrow>
              <msub>
                <mi>F</mi>
                <mtext>net</mtext>
              </msub>
              <mo stretchy="false">=</mo>
              <mn>20.</mn>
            </mrow>
            <mrow>
              <mtext>N</mtext>
              <mo stretchy="false">−</mo>
              <mn>17</mn>
            </mrow>
            <mtext>N</mtext>
          </mrow>
        </mtd>
      </mtr>
      <mtr>
        <mtd>
          <mrow>
            <mrow>
              <msub>
                <mi>F</mi>
                <mtext>net</mtext>
              </msub>
              <mo stretchy="false">=</mo>
              <mn>3.0</mn>
            </mrow>
            <mtext>N</mtext>
          </mrow>
        </mtd>
      </mtr>
    </mtable>
    <annotation encoding="StarMath 5.0">F_"net" = F_"applied" - F_f newline
F_"net" = 20. "N" - 17 "N" newline
F_"net" = 3.0 "N"</annotation>
  </semantics>
</math>
</file>

<file path=Object 12/content.xml><?xml version="1.0" encoding="utf-8"?>
<math xmlns="http://www.w3.org/1998/Math/MathML" display="block">
  <semantics>
    <mtable>
      <mtr>
        <mtd>
          <mrow>
            <msub>
              <mi>F</mi>
              <mtext>net</mtext>
            </msub>
            <mo stretchy="false">=</mo>
            <mi mathvariant="italic">ma</mi>
          </mrow>
        </mtd>
      </mtr>
      <mtr>
        <mtd>
          <mrow>
            <mn>3.0</mn>
            <mrow>
              <mtext>N</mtext>
              <mo stretchy="false">=</mo>
              <mrow>
                <mo fence="true" form="prefix" stretchy="false">(</mo>
                <mrow>
                  <mrow>
                    <mn>5.0</mn>
                    <mtext>kg</mtext>
                  </mrow>
                </mrow>
                <mo fence="true" form="postfix" stretchy="false">)</mo>
              </mrow>
            </mrow>
            <mi>a</mi>
          </mrow>
        </mtd>
      </mtr>
      <mtr>
        <mtd>
          <mrow>
            <mrow>
              <mi>a</mi>
              <mo stretchy="false">=</mo>
              <mn>0.60</mn>
            </mrow>
            <mrow>
              <mtext>m</mtext>
              <mo stretchy="false">/</mo>
              <msup>
                <mtext>s</mtext>
                <mn>2</mn>
              </msup>
            </mrow>
          </mrow>
        </mtd>
      </mtr>
    </mtable>
    <annotation encoding="StarMath 5.0">F_"net" = ma newline
3.0 "N" = ( 5.0 "kg" ) a newline
a = 0.60 "m" / "s"^2</annotation>
  </semantics>
</math>
</file>

<file path=Object 13/content.xml><?xml version="1.0" encoding="utf-8"?>
<math xmlns="http://www.w3.org/1998/Math/MathML" display="block">
  <semantics>
    <mrow>
      <mn>20.</mn>
      <mtext>N</mtext>
    </mrow>
    <annotation encoding="StarMath 5.0">20. "N"</annotation>
  </semantics>
</math>
</file>

<file path=Object 14/content.xml><?xml version="1.0" encoding="utf-8"?>
<math xmlns="http://www.w3.org/1998/Math/MathML" display="block">
  <semantics>
    <mrow>
      <mn>0.60</mn>
      <mrow>
        <mtext>m</mtext>
        <mo stretchy="false">/</mo>
        <msup>
          <mtext>s</mtext>
          <mn>2</mn>
        </msup>
      </mrow>
    </mrow>
    <annotation encoding="StarMath 5.0">0.60 "m" / "s"^2</annotation>
  </semantics>
</math>
</file>

<file path=Object 2/content.xml><?xml version="1.0" encoding="utf-8"?>
<math xmlns="http://www.w3.org/1998/Math/MathML" display="block">
  <semantics>
    <mrow>
      <msub>
        <mi>F</mi>
        <mi>N</mi>
      </msub>
      <mo stretchy="false">≠</mo>
      <msub>
        <mi>F</mi>
        <mi>g</mi>
      </msub>
    </mrow>
    <annotation encoding="StarMath 5.0">F_N &lt;&gt; F_g</annotation>
  </semantics>
</math>
</file>

<file path=Object 3/content.xml><?xml version="1.0" encoding="utf-8"?>
<math xmlns="http://www.w3.org/1998/Math/MathML" display="block">
  <semantics>
    <mn>5.0</mn>
    <annotation encoding="StarMath 5.0">5.0</annotation>
  </semantics>
</math>
</file>

<file path=Object 4/content.xml><?xml version="1.0" encoding="utf-8"?>
<math xmlns="http://www.w3.org/1998/Math/MathML" display="block">
  <semantics>
    <mn>20.</mn>
    <annotation encoding="StarMath 5.0">20.</annotation>
  </semantics>
</math>
</file>

<file path=Object 5/content.xml><?xml version="1.0" encoding="utf-8"?>
<math xmlns="http://www.w3.org/1998/Math/MathML" display="block">
  <semantics>
    <mn>5.0</mn>
    <annotation encoding="StarMath 5.0">5.0</annotation>
  </semantics>
</math>
</file>

<file path=Object 6/content.xml><?xml version="1.0" encoding="utf-8"?>
<math xmlns="http://www.w3.org/1998/Math/MathML" display="block">
  <semantics>
    <mtable>
      <mtr>
        <mtd>
          <mrow>
            <msub>
              <mi>F</mi>
              <mi>g</mi>
            </msub>
            <mo stretchy="false">=</mo>
            <mi mathvariant="italic">mg</mi>
          </mrow>
        </mtd>
      </mtr>
      <mtr>
        <mtd>
          <mrow>
            <mrow>
              <msub>
                <mi>F</mi>
                <mi>g</mi>
              </msub>
              <mo stretchy="false">=</mo>
              <mrow>
                <mo fence="true" form="prefix" stretchy="false">(</mo>
                <mrow>
                  <mrow>
                    <mn>5.0</mn>
                    <mtext>kg</mtext>
                  </mrow>
                </mrow>
                <mo fence="true" form="postfix" stretchy="false">)</mo>
              </mrow>
            </mrow>
            <mrow>
              <mo fence="true" form="prefix" stretchy="false">(</mo>
              <mrow>
                <mrow>
                  <mn>9.8</mn>
                  <mrow>
                    <mtext>m</mtext>
                    <mo stretchy="false">/</mo>
                    <msup>
                      <mtext>s</mtext>
                      <mn>2</mn>
                    </msup>
                  </mrow>
                </mrow>
              </mrow>
              <mo fence="true" form="postfix" stretchy="false">)</mo>
            </mrow>
          </mrow>
        </mtd>
      </mtr>
      <mtr>
        <mtd>
          <mrow>
            <mrow>
              <msub>
                <mi>F</mi>
                <mi>g</mi>
              </msub>
              <mo stretchy="false">=</mo>
              <mn>49</mn>
            </mrow>
            <mtext>N</mtext>
          </mrow>
        </mtd>
      </mtr>
    </mtable>
    <annotation encoding="StarMath 5.0">F_g = mg newline
F_g = ( 5.0 "kg" ) ( 9.8 "m" / "s"^2 ) newline
F_g = 49 "N"</annotation>
  </semantics>
</math>
</file>

<file path=Object 7/content.xml><?xml version="1.0" encoding="utf-8"?>
<math xmlns="http://www.w3.org/1998/Math/MathML" display="block">
  <semantics>
    <mtable>
      <mtr>
        <mtd>
          <mrow>
            <mrow>
              <msub>
                <mi>F</mi>
                <mi>f</mi>
              </msub>
              <mo stretchy="false">=</mo>
              <mi mathvariant="italic">mg</mi>
            </mrow>
            <mi>sin</mi>
            <mi>θ</mi>
          </mrow>
        </mtd>
      </mtr>
      <mtr>
        <mtd>
          <mrow>
            <mrow>
              <msub>
                <mi>F</mi>
                <mi>f</mi>
              </msub>
              <mo stretchy="false">=</mo>
              <mrow>
                <mo fence="true" form="prefix" stretchy="false">(</mo>
                <mrow>
                  <mrow>
                    <mn>5.0</mn>
                    <mtext>kg</mtext>
                  </mrow>
                </mrow>
                <mo fence="true" form="postfix" stretchy="false">)</mo>
              </mrow>
            </mrow>
            <mrow>
              <mo fence="true" form="prefix" stretchy="false">(</mo>
              <mrow>
                <mrow>
                  <mn>9.8</mn>
                  <mrow>
                    <mtext>m</mtext>
                    <mo stretchy="false">/</mo>
                    <msup>
                      <mtext>s</mtext>
                      <mn>2</mn>
                    </msup>
                  </mrow>
                </mrow>
              </mrow>
              <mo fence="true" form="postfix" stretchy="false">)</mo>
            </mrow>
            <mrow>
              <mo fence="true" form="prefix" stretchy="false">(</mo>
              <mrow>
                <mrow>
                  <mi>sin</mi>
                  <mn>20.</mn>
                  <mi>°</mi>
                </mrow>
              </mrow>
              <mo fence="true" form="postfix" stretchy="false">)</mo>
            </mrow>
          </mrow>
        </mtd>
      </mtr>
      <mtr>
        <mtd>
          <mrow>
            <mrow>
              <msub>
                <mi>F</mi>
                <mi>f</mi>
              </msub>
              <mo stretchy="false">≈</mo>
              <mn>17</mn>
            </mrow>
            <mtext>N</mtext>
          </mrow>
        </mtd>
      </mtr>
    </mtable>
    <annotation encoding="StarMath 5.0">F_f = mg sin %theta newline
F_f = ( 5.0 "kg" ) ( 9.8 "m" / "s"^2 ) ( sin 20.° ) newline
F_f approx 17 "N"</annotation>
  </semantics>
</math>
</file>

<file path=Object 8/content.xml><?xml version="1.0" encoding="utf-8"?>
<math xmlns="http://www.w3.org/1998/Math/MathML" display="block">
  <semantics>
    <mrow>
      <mn>17</mn>
      <mtext>N</mtext>
    </mrow>
    <annotation encoding="StarMath 5.0">17 "N"</annotation>
  </semantics>
</math>
</file>

<file path=Object 9/content.xml><?xml version="1.0" encoding="utf-8"?>
<math xmlns="http://www.w3.org/1998/Math/MathML" display="block">
  <semantics>
    <mtable>
      <mtr>
        <mtd>
          <mrow>
            <mrow>
              <msub>
                <mi>F</mi>
                <mrow>
                  <mrow/>
                  <mo stretchy="false">⊥</mo>
                  <mrow/>
                </mrow>
              </msub>
              <mo stretchy="false">=</mo>
              <mi mathvariant="italic">mg</mi>
            </mrow>
            <mi>cos</mi>
            <mi>θ</mi>
          </mrow>
        </mtd>
      </mtr>
      <mtr>
        <mtd>
          <mrow>
            <mrow>
              <msub>
                <mi>F</mi>
                <mrow>
                  <mrow/>
                  <mo stretchy="false">⊥</mo>
                  <mrow/>
                </mrow>
              </msub>
              <mo stretchy="false">=</mo>
              <mrow>
                <mo fence="true" form="prefix" stretchy="false">(</mo>
                <mrow>
                  <mn>5.0</mn>
                </mrow>
                <mo fence="true" form="postfix" stretchy="false">)</mo>
              </mrow>
            </mrow>
            <mrow>
              <mo fence="true" form="prefix" stretchy="false">(</mo>
              <mrow>
                <mrow>
                  <mn>9.8</mn>
                  <mrow>
                    <mtext>m</mtext>
                    <mo stretchy="false">/</mo>
                    <msup>
                      <mtext>s</mtext>
                      <mn>2</mn>
                    </msup>
                  </mrow>
                </mrow>
              </mrow>
              <mo fence="true" form="postfix" stretchy="false">)</mo>
            </mrow>
            <mrow>
              <mo fence="true" form="prefix" stretchy="false">(</mo>
              <mrow>
                <mrow>
                  <mi>cos</mi>
                  <mn>20.</mn>
                  <mi>°</mi>
                </mrow>
              </mrow>
              <mo fence="true" form="postfix" stretchy="false">)</mo>
            </mrow>
          </mrow>
        </mtd>
      </mtr>
      <mtr>
        <mtd>
          <mrow>
            <mrow>
              <msub>
                <mi>F</mi>
                <mrow>
                  <mrow/>
                  <mo stretchy="false">⊥</mo>
                  <mrow/>
                </mrow>
              </msub>
              <mo stretchy="false">≈</mo>
              <mn>46</mn>
            </mrow>
            <mtext>N</mtext>
          </mrow>
        </mtd>
      </mtr>
    </mtable>
    <annotation encoding="StarMath 5.0">F_{ { } ortho { } } = mg cos %theta newline
F_{ { } ortho { } } = ( 5.0 ) ( 9.8 "m" / "s"^2 ) ( cos 20.° ) newline
F_{ { } ortho { } } approx 46 "N"</annotation>
  </semantics>
</math>
</file>
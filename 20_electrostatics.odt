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11/content.xml" manifest:media-type="text/xml"/>
  <manifest:file-entry manifest:full-path="Object 11/settings.xml" manifest:media-type="text/xml"/>
  <manifest:file-entry manifest:full-path="Object 11/Configurations2/" manifest:media-type="application/vnd.sun.xml.ui.configuration"/>
  <manifest:file-entry manifest:full-path="Object 11/"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Thumbnails/thumbnail.png" manifest:media-type="image/png"/>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content.xml" manifest:media-type="text/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4" manifest:media-type="application/vnd.oasis.opendocument.formula"/>
  <manifest:file-entry manifest:full-path="styles.xml" manifest:media-type="text/xml"/>
  <manifest:file-entry manifest:full-path="manifest.rdf" manifest:media-type="application/rdf+xml"/>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20/settings.xml" manifest:media-type="text/xml"/>
  <manifest:file-entry manifest:full-path="Object 20/content.xml" manifest:media-type="text/xml"/>
  <manifest:file-entry manifest:full-path="Object 20/"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
  <manifest:file-entry manifest:full-path="ObjectReplacements/Object 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meta.xml" manifest:media-type="text/xml"/>
  <manifest:file-entry manifest:full-path="Configurations2/" manifest:media-type="application/vnd.sun.xml.ui.configuration"/>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D1" style:family="table-cell">
      <style:table-cell-properties fo:background-color="#eeeeee"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P1" style:family="paragraph" style:parent-style-name="Text_20_body">
      <style:paragraph-properties fo:text-align="center" style:justify-single-word="false"/>
      <style:text-properties officeooo:paragraph-rsid="0031c9d9"/>
    </style:style>
    <style:style style:name="P2" style:family="paragraph" style:parent-style-name="Contents_20_1">
      <style:paragraph-properties>
        <style:tab-stops>
          <style:tab-stop style:position="6.9244in" style:type="right" style:leader-style="dotted" style:leader-text="."/>
        </style:tab-stops>
      </style:paragraph-properties>
    </style:style>
    <style:style style:name="P3" style:family="paragraph" style:parent-style-name="Contents_20_2">
      <style:paragraph-properties>
        <style:tab-stops>
          <style:tab-stop style:position="6.728in" style:type="right" style:leader-style="dotted" style:leader-text="."/>
        </style:tab-stops>
      </style:paragraph-properties>
    </style:style>
    <style:style style:name="P4" style:family="paragraph" style:parent-style-name="Contents_20_3">
      <style:paragraph-properties>
        <style:tab-stops>
          <style:tab-stop style:position="6.5307in" style:type="right" style:leader-style="dotted" style:leader-text="."/>
        </style:tab-stops>
      </style:paragraph-properties>
    </style:style>
    <style:style style:name="P5" style:family="paragraph" style:parent-style-name="Text_20_body">
      <style:text-properties fo:font-style="normal" officeooo:rsid="0031c9d9" officeooo:paragraph-rsid="0031c9d9" style:font-style-asian="normal" style:font-style-complex="normal"/>
    </style:style>
    <style:style style:name="P6" style:family="paragraph" style:parent-style-name="Heading_20_1">
      <style:paragraph-properties fo:break-before="page"/>
    </style:style>
    <style:style style:name="P7" style:family="paragraph" style:parent-style-name="Text_20_body">
      <style:paragraph-properties fo:text-align="start" style:justify-single-word="false"/>
      <style:text-properties fo:font-weight="bold" officeooo:rsid="00191708" officeooo:paragraph-rsid="00191708" style:font-weight-asian="bold" style:font-weight-complex="bold"/>
    </style:style>
    <style:style style:name="P8" style:family="paragraph" style:parent-style-name="Text_20_body">
      <style:paragraph-properties fo:text-align="start" style:justify-single-word="false"/>
      <style:text-properties fo:font-style="italic" officeooo:paragraph-rsid="006ebff3" style:font-style-asian="italic" style:font-style-complex="italic"/>
    </style:style>
    <style:style style:name="P9" style:family="paragraph" style:parent-style-name="Text_20_body">
      <style:text-properties officeooo:rsid="001ad562" officeooo:paragraph-rsid="001ad562"/>
    </style:style>
    <style:style style:name="P10" style:family="paragraph" style:parent-style-name="Text_20_body">
      <style:text-properties officeooo:paragraph-rsid="001ba670"/>
    </style:style>
    <style:style style:name="P11" style:family="paragraph" style:parent-style-name="Text_20_body">
      <style:text-properties officeooo:rsid="001d7d1e" officeooo:paragraph-rsid="001d7d1e"/>
    </style:style>
    <style:style style:name="P12" style:family="paragraph" style:parent-style-name="Table_20_Contents">
      <style:text-properties fo:font-weight="bold" officeooo:rsid="001fa161" officeooo:paragraph-rsid="001fa161" style:font-weight-asian="bold" style:font-weight-complex="bold"/>
    </style:style>
    <style:style style:name="P13" style:family="paragraph" style:parent-style-name="Table_20_Contents">
      <style:text-properties officeooo:rsid="001fa161" officeooo:paragraph-rsid="001fa161"/>
    </style:style>
    <style:style style:name="P14" style:family="paragraph" style:parent-style-name="Text_20_body">
      <style:text-properties officeooo:rsid="001fc565" officeooo:paragraph-rsid="001fc565"/>
    </style:style>
    <style:style style:name="P15" style:family="paragraph" style:parent-style-name="Text_20_body">
      <style:text-properties officeooo:rsid="0024c4e9" officeooo:paragraph-rsid="0024c4e9"/>
    </style:style>
    <style:style style:name="P16" style:family="paragraph" style:parent-style-name="Text_20_body">
      <style:text-properties fo:font-weight="normal" officeooo:rsid="0026fdbc" officeooo:paragraph-rsid="0026fdbc" style:font-weight-asian="normal" style:font-weight-complex="normal"/>
    </style:style>
    <style:style style:name="P17" style:family="paragraph" style:parent-style-name="Text_20_body">
      <style:text-properties fo:font-weight="bold" officeooo:rsid="002c035f" officeooo:paragraph-rsid="002c035f" style:font-weight-asian="bold" style:font-weight-complex="bold"/>
    </style:style>
    <style:style style:name="P18" style:family="paragraph" style:parent-style-name="Text_20_body" style:list-style-name="L1">
      <style:text-properties fo:font-weight="bold" officeooo:rsid="002c035f" officeooo:paragraph-rsid="006ebff3" style:font-weight-asian="bold" style:font-weight-complex="bold"/>
    </style:style>
    <style:style style:name="P19" style:family="paragraph" style:parent-style-name="Text_20_body" style:list-style-name="L1">
      <style:text-properties fo:font-weight="bold" officeooo:rsid="002c035f" officeooo:paragraph-rsid="002c035f" style:font-weight-asian="bold" style:font-weight-complex="bold"/>
    </style:style>
    <style:style style:name="P20" style:family="paragraph" style:parent-style-name="Heading_20_2">
      <style:text-properties officeooo:rsid="00377305" officeooo:paragraph-rsid="00377305"/>
    </style:style>
    <style:style style:name="P21" style:family="paragraph" style:parent-style-name="Text_20_body">
      <style:text-properties officeooo:rsid="00377305" officeooo:paragraph-rsid="00377305"/>
    </style:style>
    <style:style style:name="P22" style:family="paragraph" style:parent-style-name="Text_20_body">
      <style:text-properties fo:font-weight="normal" officeooo:rsid="00377305" officeooo:paragraph-rsid="00377305" style:font-weight-asian="normal" style:font-weight-complex="normal"/>
    </style:style>
    <style:style style:name="P23" style:family="paragraph" style:parent-style-name="Heading_20_2">
      <style:text-properties officeooo:rsid="003dc379" officeooo:paragraph-rsid="003dc379"/>
    </style:style>
    <style:style style:name="P24" style:family="paragraph" style:parent-style-name="Text_20_body">
      <style:text-properties officeooo:rsid="003fc76e" officeooo:paragraph-rsid="003fc76e"/>
    </style:style>
    <style:style style:name="P25" style:family="paragraph" style:parent-style-name="Text_20_body">
      <style:paragraph-properties fo:text-align="center" style:justify-single-word="false"/>
      <style:text-properties fo:font-weight="normal" officeooo:rsid="003fc76e" officeooo:paragraph-rsid="003fc76e" style:font-weight-asian="normal" style:font-weight-complex="normal"/>
    </style:style>
    <style:style style:name="P26" style:family="paragraph" style:parent-style-name="Text_20_body">
      <style:paragraph-properties fo:text-align="start" style:justify-single-word="false"/>
      <style:text-properties fo:font-weight="normal" officeooo:rsid="003fc76e" officeooo:paragraph-rsid="003fc76e" style:font-weight-asian="normal" style:font-weight-complex="normal"/>
    </style:style>
    <style:style style:name="P27" style:family="paragraph" style:parent-style-name="Heading_20_2">
      <style:text-properties officeooo:rsid="004eb479" officeooo:paragraph-rsid="004eb479"/>
    </style:style>
    <style:style style:name="P28" style:family="paragraph" style:parent-style-name="Text_20_body">
      <style:text-properties officeooo:rsid="004eb479" officeooo:paragraph-rsid="005b3066"/>
    </style:style>
    <style:style style:name="P29" style:family="paragraph" style:parent-style-name="Text_20_body">
      <style:text-properties officeooo:rsid="005b3066" officeooo:paragraph-rsid="005b3066"/>
    </style:style>
    <style:style style:name="P30" style:family="paragraph" style:parent-style-name="Heading_20_3">
      <style:text-properties officeooo:rsid="005dd6c5" officeooo:paragraph-rsid="005dd6c5"/>
    </style:style>
    <style:style style:name="P31" style:family="paragraph" style:parent-style-name="Text_20_body">
      <style:text-properties officeooo:paragraph-rsid="005dd6c5"/>
    </style:style>
    <style:style style:name="P32" style:family="paragraph" style:parent-style-name="Text_20_body" style:list-style-name="L2">
      <style:text-properties officeooo:rsid="001fc565" officeooo:paragraph-rsid="001fc565"/>
    </style:style>
    <style:style style:name="P33" style:family="paragraph" style:parent-style-name="Text_20_body" style:list-style-name="L2">
      <style:paragraph-properties fo:text-align="center" style:justify-single-word="false"/>
      <style:text-properties officeooo:rsid="001fc565" officeooo:paragraph-rsid="001fc565"/>
    </style:style>
    <style:style style:name="P34" style:family="paragraph" style:parent-style-name="Text_20_body" style:list-style-name="L2">
      <style:paragraph-properties fo:text-align="start" style:justify-single-word="false"/>
      <style:text-properties officeooo:rsid="001fc565" officeooo:paragraph-rsid="001fc565"/>
    </style:style>
    <style:style style:name="P35" style:family="paragraph" style:parent-style-name="Text_20_body" style:list-style-name="L2">
      <style:paragraph-properties fo:text-align="start" style:justify-single-word="false"/>
      <style:text-properties officeooo:rsid="00480ac5" officeooo:paragraph-rsid="00480ac5"/>
    </style:style>
    <style:style style:name="P36" style:family="paragraph" style:parent-style-name="Text_20_body" style:list-style-name="L2">
      <style:paragraph-properties fo:text-align="start" style:justify-single-word="false"/>
      <style:text-properties fo:font-style="italic" officeooo:rsid="00480ac5" officeooo:paragraph-rsid="00480ac5" style:font-style-asian="italic" style:font-style-complex="italic"/>
    </style:style>
    <style:style style:name="P37" style:family="paragraph" style:parent-style-name="Text_20_body" style:list-style-name="L2">
      <style:paragraph-properties fo:text-align="start" style:justify-single-word="false"/>
      <style:text-properties fo:font-style="normal" officeooo:rsid="004cd14a" officeooo:paragraph-rsid="004cd14a" style:font-style-asian="normal" style:font-style-complex="normal"/>
    </style:style>
    <style:style style:name="P38" style:family="paragraph" style:parent-style-name="Text_20_body" style:list-style-name="L2">
      <style:paragraph-properties fo:text-align="center" style:justify-single-word="false"/>
      <style:text-properties fo:font-style="normal" officeooo:rsid="004cd14a" officeooo:paragraph-rsid="004cd14a" style:font-style-asian="normal" style:font-style-complex="normal"/>
    </style:style>
    <style:style style:name="P39" style:family="paragraph" style:parent-style-name="Heading_20_2">
      <style:text-properties officeooo:rsid="0065dbe8" officeooo:paragraph-rsid="0065dbe8"/>
    </style:style>
    <style:style style:name="P40" style:family="paragraph" style:parent-style-name="Text_20_body">
      <style:text-properties officeooo:rsid="0065dbe8" officeooo:paragraph-rsid="0065dbe8"/>
    </style:style>
    <style:style style:name="T1" style:family="text">
      <style:text-properties officeooo:rsid="002f2564"/>
    </style:style>
    <style:style style:name="T2" style:family="text">
      <style:text-properties officeooo:rsid="00191708"/>
    </style:style>
    <style:style style:name="T3" style:family="text">
      <style:text-properties fo:font-style="normal" officeooo:rsid="0031c9d9" style:font-style-asian="normal" style:font-style-complex="normal"/>
    </style:style>
    <style:style style:name="T4" style:family="text">
      <style:text-properties fo:font-style="normal" officeooo:rsid="00191708" style:font-style-asian="normal" style:font-style-complex="normal"/>
    </style:style>
    <style:style style:name="T5" style:family="text">
      <style:text-properties fo:font-weight="normal" style:font-weight-asian="normal" style:font-weight-complex="normal"/>
    </style:style>
    <style:style style:name="T6" style:family="text">
      <style:text-properties officeooo:rsid="006ebff3"/>
    </style:style>
    <style:style style:name="T7" style:family="text">
      <style:text-properties officeooo:rsid="002feec6"/>
    </style:style>
    <style:style style:name="T8" style:family="text">
      <style:text-properties officeooo:rsid="002900b4"/>
    </style:style>
    <style:style style:name="T9" style:family="text">
      <style:text-properties fo:font-weight="bold" style:font-weight-asian="bold" style:font-weight-complex="bold"/>
    </style:style>
    <style:style style:name="T10" style:family="text">
      <style:text-properties officeooo:rsid="006b6f95"/>
    </style:style>
    <style:style style:name="T11" style:family="text">
      <style:text-properties officeooo:rsid="001ba670"/>
    </style:style>
    <style:style style:name="T12" style:family="text">
      <style:text-properties fo:font-weight="bold" officeooo:rsid="001ba670" style:font-weight-asian="bold" style:font-weight-complex="bold"/>
    </style:style>
    <style:style style:name="T13" style:family="text">
      <style:text-properties fo:font-weight="normal" officeooo:rsid="001e5a9e" style:font-weight-asian="normal" style:font-weight-complex="normal"/>
    </style:style>
    <style:style style:name="T14" style:family="text">
      <style:text-properties officeooo:rsid="002bff7b"/>
    </style:style>
    <style:style style:name="T15" style:family="text">
      <style:text-properties officeooo:rsid="00214984"/>
    </style:style>
    <style:style style:name="T16" style:family="text">
      <style:text-properties officeooo:rsid="006ccaf1"/>
    </style:style>
    <style:style style:name="T17" style:family="text">
      <style:text-properties officeooo:rsid="0028f5ea"/>
    </style:style>
    <style:style style:name="T18" style:family="text">
      <style:text-properties fo:font-weight="normal" officeooo:rsid="006ebff3" style:font-weight-asian="normal" style:font-weight-complex="normal"/>
    </style:style>
    <style:style style:name="T19" style:family="text">
      <style:text-properties fo:font-style="italic" fo:font-weight="normal" officeooo:rsid="006ebff3" style:font-style-asian="italic" style:font-weight-asian="normal" style:font-style-complex="italic" style:font-weight-complex="normal"/>
    </style:style>
    <style:style style:name="T20" style:family="text">
      <style:text-properties fo:font-style="italic" fo:font-weight="normal" officeooo:rsid="002feec6" style:font-style-asian="italic" style:font-weight-asian="normal" style:font-style-complex="italic" style:font-weight-complex="normal"/>
    </style:style>
    <style:style style:name="T21" style:family="text">
      <style:text-properties fo:font-style="italic" fo:font-weight="normal" officeooo:rsid="002900b4" style:font-style-asian="italic" style:font-weight-asian="normal" style:font-style-complex="italic" style:font-weight-complex="normal"/>
    </style:style>
    <style:style style:name="T22" style:family="text">
      <style:text-properties fo:font-weight="normal" officeooo:rsid="0030dd90" style:font-weight-asian="normal" style:font-weight-complex="normal"/>
    </style:style>
    <style:style style:name="T23" style:family="text">
      <style:text-properties officeooo:rsid="003bced7"/>
    </style:style>
    <style:style style:name="T24" style:family="text">
      <style:text-properties officeooo:rsid="00418f74"/>
    </style:style>
    <style:style style:name="T25" style:family="text">
      <style:text-properties officeooo:rsid="004fec79"/>
    </style:style>
    <style:style style:name="T26" style:family="text">
      <style:text-properties officeooo:rsid="0058284f"/>
    </style:style>
    <style:style style:name="T27" style:family="text">
      <style:text-properties officeooo:rsid="006099e2"/>
    </style:style>
    <style:style style:name="T28" style:family="text">
      <style:text-properties officeooo:rsid="005dd6c5"/>
    </style:style>
    <style:style style:name="T29" style:family="text">
      <style:text-properties officeooo:rsid="0061a75f"/>
    </style:style>
    <style:style style:name="T30" style:family="text">
      <style:text-properties officeooo:rsid="0051439c"/>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DdeLink__507_895154721"/><text:bookmark-start text:name="__RefHeading___Toc339_202974590"/><text:span text:style-name="T1">­</text:span><text:span text:style-name="T2">Electrostatics</text:span><text:bookmark-end text:name="__RefHeading___Toc339_202974590"/></text:p>
      <text:p text:style-name="P1"><text:span text:style-name="T3">January </text:span><text:span text:style-name="T4">30</text:span><text:span text:style-name="T3">, 2026</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341_202974590" office:name="What Is Electricity?" text:style-name="Index_20_Link" text:visited-style-name="Index_20_Link">What Is Electricity?<text:tab/>2</text:a></text:p>
          <text:p text:style-name="P2"><text:a xlink:type="simple" xlink:href="#__RefHeading___Toc343_202974590" office:name="Electrical Generators*" text:style-name="Index_20_Link" text:visited-style-name="Index_20_Link">Electrical Generators*<text:tab/>2</text:a></text:p>
          <text:p text:style-name="P3"><text:a xlink:type="simple" xlink:href="#__RefHeading___Toc345_202974590" office:name="Applications and Uses" text:style-name="Index_20_Link" text:visited-style-name="Index_20_Link">Applications and Uses<text:tab/>2</text:a></text:p>
          <text:p text:style-name="P2"><text:a xlink:type="simple" xlink:href="#__RefHeading___Toc347_202974590" office:name="The Atom*" text:style-name="Index_20_Link" text:visited-style-name="Index_20_Link">The Atom*<text:tab/>2</text:a></text:p>
          <text:p text:style-name="P2"><text:a xlink:type="simple" xlink:href="#__RefHeading___Toc349_202974590" office:name="Charge" text:style-name="Index_20_Link" text:visited-style-name="Index_20_Link">Charge<text:tab/>2</text:a></text:p>
          <text:p text:style-name="P3"><text:a xlink:type="simple" xlink:href="#__RefHeading___Toc351_202974590" office:name="The Coulomb" text:style-name="Index_20_Link" text:visited-style-name="Index_20_Link">The Coulomb<text:tab/>2</text:a></text:p>
          <text:p text:style-name="P2"><text:a xlink:type="simple" xlink:href="#__RefHeading___Toc353_202974590" office:name="Conductors and Insulators" text:style-name="Index_20_Link" text:visited-style-name="Index_20_Link">Conductors and Insulators<text:tab/>3</text:a></text:p>
          <text:p text:style-name="P2"><text:a xlink:type="simple" xlink:href="#__RefHeading___Toc355_202974590" office:name="Charging Objects" text:style-name="Index_20_Link" text:visited-style-name="Index_20_Link">Charging Objects<text:tab/>3</text:a></text:p>
          <text:p text:style-name="P3"><text:a xlink:type="simple" xlink:href="#__RefHeading___Toc375_3142749471" office:name="Static Electricity" text:style-name="Index_20_Link" text:visited-style-name="Index_20_Link">Static Electricity<text:tab/>3</text:a></text:p>
          <text:p text:style-name="P3"><text:a xlink:type="simple" xlink:href="#__RefHeading___Toc377_3142749471" office:name="Charging by Conduction" text:style-name="Index_20_Link" text:visited-style-name="Index_20_Link">Charging by Conduction<text:tab/>3</text:a></text:p>
          <text:p text:style-name="P3"><text:a xlink:type="simple" xlink:href="#__RefHeading___Toc411_3142749471" office:name="Charging by Induction" text:style-name="Index_20_Link" text:visited-style-name="Index_20_Link">Charging by Induction<text:tab/>4</text:a></text:p>
          <text:p text:style-name="P4"><text:a xlink:type="simple" xlink:href="#__RefHeading___Toc413_3142749471" office:name="Concept Note" text:style-name="Index_20_Link" text:visited-style-name="Index_20_Link">Concept Note<text:tab/>4</text:a></text:p>
          <text:p text:style-name="P2"><text:a xlink:type="simple" xlink:href="#__RefHeading___Toc357_202974590" office:name="Examples and Applications" text:style-name="Index_20_Link" text:visited-style-name="Index_20_Link">Examples and Applications<text:tab/>4</text:a></text:p>
          <text:p text:style-name="P3"><text:a xlink:type="simple" xlink:href="#__RefHeading___Toc479_895154721" office:name="Lightning Strikes*" text:style-name="Index_20_Link" text:visited-style-name="Index_20_Link">Lightning Strikes*<text:tab/>4</text:a></text:p>
        </text:index-body>
      </text:table-of-content>
      <text:p text:style-name="P5"/>
      <text:h text:style-name="P6" text:outline-level="1"><text:bookmark-start text:name="__RefHeading___Toc341_202974590"/>What Is Electricity?<text:bookmark-end text:name="__RefHeading___Toc341_202974590"/></text:h>
      <text:p text:style-name="P7">Electricity<text:span text:style-name="T5"> is defined as the movement or flow of </text:span>charge<text:span text:style-name="T5">. Objects become charged when the number of protons is not in balance with the number of electrons. However, recall that only electrons can move in an atom. Thus, electricity is, more literally, the movement of electrons.</text:span></text:p>
      <text:h text:style-name="Heading_20_1" text:outline-level="1"><text:bookmark-start text:name="__RefHeading___Toc343_202974590"/>Electrical Generators<text:span text:style-name="T6">*</text:span><text:bookmark-end text:name="__RefHeading___Toc343_202974590"/></text:h>
      <text:p text:style-name="P8">(This <text:span text:style-name="T7">idea or </text:span>topic is excluded in the new <text:span text:style-name="T8">Physical Science: Physics course.</text:span>)</text:p>
      <text:p text:style-name="P9">An <text:span text:style-name="T9">electrical generator</text:span><text:span text:style-name="T5"> is a device that converts mechanical energy to electrical energy, generally using </text:span><text:span text:style-name="T9">electromagnetic induction</text:span><text:span text:style-name="T5">. A generater forces electrical charges to move through an </text:span><text:span text:style-name="T9">external electrical circuit</text:span><text:span text:style-name="T5">.</text:span></text:p>
      <text:h text:style-name="Heading_20_2" text:outline-level="2"><text:bookmark-start text:name="__RefHeading___Toc345_202974590"/>Applications <text:span text:style-name="T10">and</text:span> Uses<text:bookmark-end text:name="__RefHeading___Toc345_202974590"/></text:h>
      <text:p text:style-name="P10"><text:span text:style-name="T11">Applications of electrical generators include hydroelectric, wind, geothermal, and steam power plants. </text:span><text:span text:style-name="T12">Turbines</text:span><text:span text:style-name="T11"> are used to rotate a generator to product electricity, but solar panels do not operate on this principle.</text:span></text:p>
      <text:h text:style-name="Heading_20_1" text:outline-level="1"><text:bookmark-start text:name="__RefHeading___Toc347_202974590"/>The Atom<text:span text:style-name="T6">*</text:span><text:bookmark-end text:name="__RefHeading___Toc347_202974590"/></text:h>
      <text:p text:style-name="P8">(This <text:span text:style-name="T7">idea or </text:span>topic is excluded in the new <text:span text:style-name="T8">Physical Science: Physics course.</text:span>)</text:p>
      <text:p text:style-name="P11">The <text:span text:style-name="T9">atom</text:span><text:span text:style-name="T5"> primarily consists of </text:span><text:span text:style-name="T9">protons</text:span><text:span text:style-name="T5">, </text:span><text:span text:style-name="T9">neutrons</text:span><text:span text:style-name="T5">, and </text:span><text:span text:style-name="T9">electrons</text:span><text:span text:style-name="T5">. Protons are positively charged particles located in the nuclei of atoms. Neutrons are particles in the nucleus with no charge. Finally, electrons are negatively charged particles that move </text:span><text:span text:style-name="T9">around</text:span><text:span text:style-name="T5"> the nucleus in </text:span><text:span text:style-name="T9">shells</text:span><text:span text:style-name="T5">.</text:span></text:p>
      <text:h text:style-name="Heading_20_1" text:outline-level="1"><text:bookmark-start text:name="__RefHeading___Toc349_202974590"/>Charge<text:bookmark-end text:name="__RefHeading___Toc349_202974590"/></text:h>
      <text:p text:style-name="P11">An atom is <text:span text:style-name="T9">charged</text:span><text:span text:style-name="T5"> when there is an unequal number of protons and electrons. Charge is measured in </text:span><text:span text:style-name="T9">coulombs</text:span><text:span text:style-name="T5"> </text:span><text:span text:style-name="T13">(</text:span><text:span text:style-name="T13"><draw:frame draw:style-name="fr1" draw:name="Object5" text:anchor-type="as-char" svg:y="-0.1492in" svg:width="0.1134in" svg:height="0.1854in" draw:z-index="4"><draw:object xlink:href="./Object 5" xlink:type="simple" xlink:show="embed" xlink:actuate="onLoad"/><draw:image xlink:href="./ObjectReplacements/Object 5" xlink:type="simple" xlink:show="embed" xlink:actuate="onLoad"/></draw:frame></text:span><text:span text:style-name="T13">)</text:span><text:span text:style-name="T5">. Protons have </text:span><text:span text:style-name="T5"><draw:frame draw:style-name="fr1" draw:name="Object1" text:anchor-type="as-char" svg:y="-0.1492in" svg:width="0.1902in" svg:height="0.1854in" draw:z-index="0"><draw:object xlink:href="./Object 1" xlink:type="simple" xlink:show="embed" xlink:actuate="onLoad"/><draw:image xlink:href="./ObjectReplacements/Object 1" xlink:type="simple" xlink:show="embed" xlink:actuate="onLoad"/></draw:frame></text:span><text:span text:style-name="T5"><text:s/>elementary charge (</text:span><text:span text:style-name="T5"><draw:frame draw:style-name="fr1" draw:name="Object2" text:anchor-type="as-char" svg:y="-0.1492in" svg:width="0.2902in" svg:height="0.1854in" draw:z-index="1"><draw:object xlink:href="./Object 2" xlink:type="simple" xlink:show="embed" xlink:actuate="onLoad"/><draw:image xlink:href="./ObjectReplacements/Object 2" xlink:type="simple" xlink:show="embed" xlink:actuate="onLoad"/></draw:frame></text:span><text:span text:style-name="T5">), while electrons have </text:span><text:span text:style-name="T5"><draw:frame draw:style-name="fr1" draw:name="Object3" text:anchor-type="as-char" svg:y="-0.1492in" svg:width="0.2201in" svg:height="0.1854in" draw:z-index="2"><draw:object xlink:href="./Object 3" xlink:type="simple" xlink:show="embed" xlink:actuate="onLoad"/><draw:image xlink:href="./ObjectReplacements/Object 3" xlink:type="simple" xlink:show="embed" xlink:actuate="onLoad"/></draw:frame></text:span><text:span text:style-name="T5"><text:s/>elementary charge (</text:span><text:span text:style-name="T5"><draw:frame draw:style-name="fr1" draw:name="Object4" text:anchor-type="as-char" svg:y="-0.1492in" svg:width="0.3201in" svg:height="0.1854in" draw:z-index="3"><draw:object xlink:href="./Object 4" xlink:type="simple" xlink:show="embed" xlink:actuate="onLoad"/><draw:image xlink:href="./ObjectReplacements/Object 4" xlink:type="simple" xlink:show="embed" xlink:actuate="onLoad"/></draw:frame></text:span><text:span text:style-name="T5">). All charges must be a multiple of the elementary charge, since you cannot have a fraction of a proton or electron.</text:span></text:p>
      <table:table table:name="Table1" table:style-name="Table1">
        <table:table-column table:style-name="Table1.A" table:number-columns-repeated="3"/>
        <table:table-column table:style-name="Table1.D"/>
        <table:table-row>
          <table:table-cell table:style-name="Table1.A1" office:value-type="string">
            <text:p text:style-name="Table_20_Contents"/>
          </table:table-cell>
          <table:table-cell table:style-name="Table1.A1" office:value-type="string">
            <text:p text:style-name="P12">Proton</text:p>
          </table:table-cell>
          <table:table-cell table:style-name="Table1.A1" office:value-type="string">
            <text:p text:style-name="P12">Neutron</text:p>
          </table:table-cell>
          <table:table-cell table:style-name="Table1.D1" office:value-type="string">
            <text:p text:style-name="P12">Electron</text:p>
          </table:table-cell>
        </table:table-row>
        <table:table-row>
          <table:table-cell table:style-name="Table1.A2" office:value-type="string">
            <text:p text:style-name="P12">Charge</text:p>
          </table:table-cell>
          <table:table-cell table:style-name="Table1.A2" office:value-type="string">
            <text:p text:style-name="P13">Positive (<draw:frame draw:style-name="fr1" draw:name="Object6" text:anchor-type="as-char" svg:y="-0.1492in" svg:width="0.2902in" svg:height="0.1854in" draw:z-index="5"><draw:object xlink:href="./Object 6" xlink:type="simple" xlink:show="embed" xlink:actuate="onLoad"/><draw:image xlink:href="./ObjectReplacements/Object 6" xlink:type="simple" xlink:show="embed" xlink:actuate="onLoad"/></draw:frame>)</text:p>
          </table:table-cell>
          <table:table-cell table:style-name="Table1.A2" office:value-type="string">
            <text:p text:style-name="P13">Neutral (zero)</text:p>
          </table:table-cell>
          <table:table-cell table:style-name="Table1.D2" office:value-type="string">
            <text:p text:style-name="P13">Negative (<draw:frame draw:style-name="fr1" draw:name="Object7" text:anchor-type="as-char" svg:y="-0.1492in" svg:width="0.3201in" svg:height="0.1854in" draw:z-index="6"><draw:object xlink:href="./Object 7" xlink:type="simple" xlink:show="embed" xlink:actuate="onLoad"/><draw:image xlink:href="./ObjectReplacements/Object 7" xlink:type="simple" xlink:show="embed" xlink:actuate="onLoad"/></draw:frame>)</text:p>
          </table:table-cell>
        </table:table-row>
        <table:table-row>
          <table:table-cell table:style-name="Table1.A2" office:value-type="string">
            <text:p text:style-name="P12">Location</text:p>
          </table:table-cell>
          <table:table-cell table:style-name="Table1.A2" office:value-type="string">
            <text:p text:style-name="P13">Nucleus</text:p>
          </table:table-cell>
          <table:table-cell table:style-name="Table1.A2" office:value-type="string">
            <text:p text:style-name="P13">Nucleus</text:p>
          </table:table-cell>
          <table:table-cell table:style-name="Table1.D2" office:value-type="string">
            <text:p text:style-name="P13">Orbitals</text:p>
          </table:table-cell>
        </table:table-row>
      </table:table>
      <text:h text:style-name="Heading_20_2" text:outline-level="2" text:is-list-header="true"><text:bookmark-start text:name="__RefHeading___Toc351_202974590"/>The <text:span text:style-name="T14">Coulomb</text:span><text:bookmark-end text:name="__RefHeading___Toc351_202974590"/></text:h>
      <text:p text:style-name="P14">Just as we have an SI unit for mass (the kilogram), we have one for charge as well. It is called the <text:span text:style-name="T14">coloumb</text:span>, and its symbol is <draw:frame draw:style-name="fr1" draw:name="Object12" text:anchor-type="as-char" svg:y="-0.1492in" svg:width="0.1134in" svg:height="0.1854in" draw:z-index="8"><draw:object xlink:href="./Object 12" xlink:type="simple" xlink:show="embed" xlink:actuate="onLoad"/><draw:image xlink:href="./ObjectReplacements/Object 12" xlink:type="simple" xlink:show="embed" xlink:actuate="onLoad"/></draw:frame>. <text:span text:style-name="T15">An object with </text:span><text:span text:style-name="T15"><draw:frame draw:style-name="fr1" draw:name="Object13" text:anchor-type="as-char" svg:y="-0.1492in" svg:width="0.0835in" svg:height="0.1854in" draw:z-index="11"><draw:object xlink:href="./Object 13" xlink:type="simple" xlink:show="embed" xlink:actuate="onLoad"/><draw:image xlink:href="./ObjectReplacements/Object 13" xlink:type="simple" xlink:show="embed" xlink:actuate="onLoad"/></draw:frame></text:span><text:span text:style-name="T15"><text:s/>elementary charge (</text:span><text:span text:style-name="T15"><draw:frame draw:style-name="fr1" draw:name="Object14" text:anchor-type="as-char" svg:y="-0.1492in" svg:width="0.1835in" svg:height="0.1854in" draw:z-index="12"><draw:object xlink:href="./Object 14" xlink:type="simple" xlink:show="embed" xlink:actuate="onLoad"/><draw:image xlink:href="./ObjectReplacements/Object 14" xlink:type="simple" xlink:show="embed" xlink:actuate="onLoad"/></draw:frame></text:span><text:span text:style-name="T15">) has a net electric charge of </text:span><text:span text:style-name="T15"><draw:frame draw:style-name="fr1" draw:name="Object15" text:anchor-type="as-char" svg:y="-0.1728in" svg:width="0.9134in" svg:height="0.2091in" draw:z-index="13"><draw:object xlink:href="./Object 15" xlink:type="simple" xlink:show="embed" xlink:actuate="onLoad"/><draw:image xlink:href="./ObjectReplacements/Object 15" xlink:type="simple" xlink:show="embed" xlink:actuate="onLoad"/></draw:frame></text:span><text:span text:style-name="T15">.</text:span></text:p>
      <text:h text:style-name="Heading_20_1" text:outline-level="1"><text:bookmark-start text:name="__RefHeading___Toc353_202974590"/><text:soft-page-break/>Conductors <text:span text:style-name="T16">and</text:span> <text:span text:style-name="T14">Insulators</text:span><text:bookmark-end text:name="__RefHeading___Toc353_202974590"/></text:h>
      <text:p text:style-name="P15">A <text:span text:style-name="T9">conductor</text:span><text:span text:style-name="T5"> is a material that allows charge to </text:span><text:span text:style-name="T9">flow freely</text:span><text:span text:style-name="T5">. Most </text:span><text:span text:style-name="T9">metals</text:span><text:span text:style-name="T5"> (e.g., copper, silver, and gold) are conductors. An </text:span><text:span text:style-name="T9">insulator</text:span><text:span text:style-name="T5">, on the other hand, is a material that </text:span><text:span text:style-name="T9">restricts</text:span><text:span text:style-name="T5"> charge from flowing freely. These are typically </text:span><text:span text:style-name="T9">nonmetals</text:span><text:span text:style-name="T5"> (e.g., rubber and styrofoam).</text:span></text:p>
      <text:p text:style-name="P16">In a real-world context, consider the plastic that covers <text:span text:style-name="T17">many</text:span> wires. The plastic is an insulator because it keeps electrons moving through the wire and restricts them from escaping the system.</text:p>
      <text:h text:style-name="Heading_20_1" text:outline-level="1"><text:bookmark-start text:name="__RefHeading___Toc355_202974590"/>Charging Objects<text:bookmark-end text:name="__RefHeading___Toc355_202974590"/></text:h>
      <text:p text:style-name="P17">Charging an object<text:span text:style-name="T5"> does not mean creating new charges. Charging implies either adding electrons to an object, removing electrons from an object, or separating positive and negative charges within an object. This can be accomplished through the following means:</text:span></text:p>
      <text:list text:style-name="L1">
        <text:list-item>
          <text:p text:style-name="P18">Friction<text:span text:style-name="T5">:</text:span><text:span text:style-name="T18">* </text:span><text:span text:style-name="T19">(This </text:span><text:span text:style-name="T20">idea or </text:span><text:span text:style-name="T19">topic is excluded in the new </text:span><text:span text:style-name="T21">Physical Science: Physics course.</text:span><text:span text:style-name="T19">)</text:span><text:span text:style-name="T5"> Rubbing two materials together can rub electrons off of one and onto the other.</text:span></text:p>
        </text:list-item>
        <text:list-item>
          <text:p text:style-name="P19">Conduction<text:span text:style-name="T5">: An object placed in contact with a charged object could lead to a flow of charge betweem them.</text:span></text:p>
        </text:list-item>
        <text:list-item>
          <text:p text:style-name="P19">Induction<text:span text:style-name="T5">: If a charged object is brought near, but not touching, a second object, the charged object could attract or repel </text:span><text:span text:style-name="T22">on </text:span><text:span text:style-name="T5">electrons (depending on its charge) </text:span><text:span text:style-name="T22">ffom</text:span><text:span text:style-name="T5"> the second object.</text:span></text:p>
        </text:list-item>
      </text:list>
      <text:h text:style-name="P20" text:outline-level="2"><text:bookmark-start text:name="__RefHeading___Toc375_3142749471"/>Static Electricity<text:bookmark-end text:name="__RefHeading___Toc375_3142749471"/></text:h>
      <text:p text:style-name="P21">If you walk around on carpeting in your stocking feet, especially in the winter when the air is dry, and then touch something metal, you may feel a shock. As you walk you can become negatively charged by <text:span text:style-name="T9">friction</text:span><text:span text:style-name="T5">. When you make contact with a metal door knob, you discharge rapidly into the metal and feel a shock at the point of contact. A similar effect occurs in the winter when you exit a car: if you slide out of your seat and then touch the car door, you might feel a shock.</text:span></text:p>
      <text:p text:style-name="P22">The reason the effect most often occurs in the winter is because the air is typically drier then. Humidity in the air can quickly rob excess charges from a charged body, thereby neutralizing it before a rapid, localized discharge (and resulting shock) can take place. <text:span text:style-name="T23">However, when the humidity is low, less charges become neutralized, allowing for shocks to occur more frequently.</text:span></text:p>
      <text:h text:style-name="P23" text:outline-level="2"><text:bookmark-start text:name="__RefHeading___Toc377_3142749471"/>Charging by Conduction<text:bookmark-end text:name="__RefHeading___Toc377_3142749471"/></text:h>
      <text:p text:style-name="P24">When a charged object touches a conductor, they will <text:span text:style-name="T9">divide</text:span><text:span text:style-name="T5"> the total charge evenly. To calculate the charge on each object, you can use the model:</text:span></text:p>
      <text:p text:style-name="P25"><draw:frame draw:style-name="fr1" draw:name="Object16" text:anchor-type="as-char" svg:y="-0.2445in" svg:width="2.5535in" svg:height="0.3953in" draw:z-index="14"><draw:object xlink:href="./Object 16" xlink:type="simple" xlink:show="embed" xlink:actuate="onLoad"/><draw:image xlink:href="./ObjectReplacements/Object 16" xlink:type="simple" xlink:show="embed" xlink:actuate="onLoad"/></draw:frame>.</text:p>
      <text:p text:style-name="P26">For example, if an object with <draw:frame draw:style-name="fr1" draw:name="Object17" text:anchor-type="as-char" svg:y="-0.1492in" svg:width="0.0957in" svg:height="0.1854in" draw:z-index="15"><draw:object xlink:href="./Object 17" xlink:type="simple" xlink:show="embed" xlink:actuate="onLoad"/><draw:image xlink:href="./ObjectReplacements/Object 17" xlink:type="simple" xlink:show="embed" xlink:actuate="onLoad"/></draw:frame><text:s/>elementary charges (<draw:frame draw:style-name="fr1" draw:name="Object18" text:anchor-type="as-char" svg:y="-0.1492in" svg:width="0.3028in" svg:height="0.1854in" draw:z-index="16"><draw:object xlink:href="./Object 18" xlink:type="simple" xlink:show="embed" xlink:actuate="onLoad"/><draw:image xlink:href="./ObjectReplacements/Object 18" xlink:type="simple" xlink:show="embed" xlink:actuate="onLoad"/></draw:frame>) touches a neutral object and becomes separated, <text:span text:style-name="T24">its new charge will be </text:span><text:span text:style-name="T24"><draw:frame draw:style-name="fr1" draw:name="Object19" text:anchor-type="as-char" svg:y="-0.2445in" svg:width="0.7673in" svg:height="0.3953in" draw:z-index="17"><draw:object xlink:href="./Object 19" xlink:type="simple" xlink:show="embed" xlink:actuate="onLoad"/><draw:image xlink:href="./ObjectReplacements/Object 19" xlink:type="simple" xlink:show="embed" xlink:actuate="onLoad"/></draw:frame></text:span><text:span text:style-name="T24">.</text:span></text:p>
      <text:h text:style-name="P27" text:outline-level="2"><text:bookmark-start text:name="__RefHeading___Toc411_3142749471"/><text:soft-page-break/>Charging by Induction<text:bookmark-end text:name="__RefHeading___Toc411_3142749471"/></text:h>
      <text:p text:style-name="P28"><text:bookmark-start text:name="__DdeLink__386_3142749471"/><text:span text:style-name="T5">Induction</text:span> occurs when <text:span text:style-name="T25">a neutral object is charged without being in direct contact of another charged </text:span><text:bookmark-start text:name="__DdeLink__383_3142749471"/><text:span text:style-name="T25">object. </text:span><text:span text:style-name="T26">This leads to an induced force of attraction that leads to a separation of charges.</text:span></text:p>
      <text:p text:style-name="P29">Consider a system that involves a small stream of neutral water and a negatively charged pipe. As the pipe draws closer to the flowing water, the water will appear to become attracted to the pipe.<text:bookmark-end text:name="__DdeLink__386_3142749471"/><text:bookmark-end text:name="__DdeLink__383_3142749471"/> This occurs because water molecules are polar, and a charged object can rearrange those molecules even without touching them. When a negatively charged pipe comes near the neutral <text:span text:style-name="T27">water</text:span>, it pushes electrons in the water away while pulling the positive parts of the water molecules toward the pipe.</text:p>
      <text:h text:style-name="P30" text:outline-level="3"><text:bookmark-start text:name="__RefHeading___Toc413_3142749471"/>Concept Note<text:bookmark-end text:name="__RefHeading___Toc413_3142749471"/></text:h>
      <text:p text:style-name="P31"><text:span text:style-name="T28">Like charges repel, and opposite charges attract. However, neutral objects also attract charged objects. </text:span><text:span text:style-name="T29">Hence</text:span><text:span text:style-name="T28">, if two objects attract, their charges could either be opposites or one object could be neutral.</text:span></text:p>
      <text:h text:style-name="Heading_20_1" text:outline-level="1"><text:bookmark-start text:name="__RefHeading___Toc357_202974590"/>Examples <text:span text:style-name="T10">and</text:span> Applications<text:bookmark-end text:name="__RefHeading___Toc357_202974590"/></text:h>
      <text:list text:style-name="L2">
        <text:list-item>
          <text:p text:style-name="P32">What is the net electric charge of an object with an excess of <draw:frame draw:style-name="fr1" draw:name="Object8" text:anchor-type="as-char" svg:y="-0.1492in" svg:width="0.0862in" svg:height="0.1854in" draw:z-index="18"><draw:object xlink:href="./Object 8" xlink:type="simple" xlink:show="embed" xlink:actuate="onLoad"/><draw:image xlink:href="./ObjectReplacements/Object 8" xlink:type="simple" xlink:show="embed" xlink:actuate="onLoad"/></draw:frame><text:s/>electrons?</text:p>
          <text:p text:style-name="P33"><draw:frame draw:style-name="fr1" draw:name="Object9" text:anchor-type="as-char" svg:y="-0.2681in" svg:width="2.3835in" svg:height="0.4189in" draw:z-index="7"><draw:object xlink:href="./Object 9" xlink:type="simple" xlink:show="embed" xlink:actuate="onLoad"/><draw:image xlink:href="./ObjectReplacements/Object 9" xlink:type="simple" xlink:show="embed" xlink:actuate="onLoad"/></draw:frame></text:p>
        </text:list-item>
        <text:list-item>
          <text:p text:style-name="P34">How many <text:span text:style-name="T15">elementary</text:span> charges are <draw:frame draw:style-name="fr1" draw:name="Object10" text:anchor-type="as-char" svg:y="-0.1728in" svg:width="0.8327in" svg:height="0.2091in" draw:z-index="9"><draw:object xlink:href="./Object 10" xlink:type="simple" xlink:show="embed" xlink:actuate="onLoad"/><draw:image xlink:href="./ObjectReplacements/Object 10" xlink:type="simple" xlink:show="embed" xlink:actuate="onLoad"/></draw:frame>?</text:p>
          <text:p text:style-name="P33"><draw:frame draw:style-name="fr1" draw:name="Object11" text:anchor-type="as-char" svg:y="-0.2445in" svg:width="2.4075in" svg:height="0.4189in" draw:z-index="10"><draw:object xlink:href="./Object 11" xlink:type="simple" xlink:show="embed" xlink:actuate="onLoad"/><draw:image xlink:href="./ObjectReplacements/Object 11" xlink:type="simple" xlink:show="embed" xlink:actuate="onLoad"/></draw:frame></text:p>
        </text:list-item>
        <text:list-item>
          <text:p text:style-name="P35">A negatively charged rod touches a <text:span text:style-name="T30">neutral</text:span> pith ball. Why does the pith ball then repel against the rod?</text:p>
          <text:p text:style-name="P36">Electrons are transferred from the rod to the pith ball by conduction, making the pith ball negatively charged. Since they then both become negatively charged, they repel against each other.</text:p>
        </text:list-item>
        <text:list-item>
          <text:p text:style-name="P37">There are three spheres, sphere A (charged <draw:frame draw:style-name="fr1" draw:name="Object20" text:anchor-type="as-char" svg:y="-0.1492in" svg:width="0.2335in" svg:height="0.1854in" draw:z-index="20"><draw:object xlink:href="./Object 20" xlink:type="simple" xlink:show="embed" xlink:actuate="onLoad"/><draw:image xlink:href="./ObjectReplacements/Object 20" xlink:type="simple" xlink:show="embed" xlink:actuate="onLoad"/></draw:frame>), sphere B (neutral), and sphere C (neutral). Sphere A touches sphere B, and is then separated. Sphere A then touches sphere C. What is the new charge of sphere A?</text:p>
          <text:list>
            <text:list-header>
              <text:p text:style-name="P38"><draw:frame draw:style-name="fr1" draw:name="Object21" text:anchor-type="as-char" svg:y="-0.5327in" svg:width="1.4665in" svg:height="1.0075in" draw:z-index="19"><draw:object xlink:href="./Object 21" xlink:type="simple" xlink:show="embed" xlink:actuate="onLoad"/><draw:image xlink:href="./ObjectReplacements/Object 21" xlink:type="simple" xlink:show="embed" xlink:actuate="onLoad"/></draw:frame></text:p>
            </text:list-header>
          </text:list>
        </text:list-item>
      </text:list>
      <text:h text:style-name="P39" text:outline-level="2"><text:bookmark-start text:name="__RefHeading___Toc479_895154721"/>Lightning Strikes<text:span text:style-name="T6">*</text:span><text:bookmark-end text:name="__RefHeading___Toc479_895154721"/></text:h>
      <text:p text:style-name="P8">(This <text:span text:style-name="T7">idea or </text:span>topic is excluded in the new <text:span text:style-name="T8">Physical Science: Physics course.</text:span>)</text:p>
      <text:p text:style-name="P40"><text:soft-page-break/>The negative bottom part of a cloud induces a charge separation in the ground below. Air is normally a very good insulator, but if the charge separation is big enough, the air between the cloud and the ground can <text:span text:style-name="T9">become ionized</text:span> and hence turn into a <text:span text:style-name="T9">plasma</text:span>. This would allow some of the electrons in the cloud to begin to migrate into the ionized air below. This is called a<text:span text:style-name="T9"> leader</text:span><text:span text:style-name="T5">.</text:span><text:span text:style-name="T9"> </text:span>Positive ions from the ground migrate up to meet the leader. This is called a <text:span text:style-name="T9">streamer</text:span><text:span text:style-name="T5">. As soon as the leader and streamer meet, a fully conductive path exists between the cloud and ground, thus causing a lightning strike. Billions of trillions of electrons flow into the ground in less than a millisecond. The strike can be hotter than the surface of the sun. The heat expands the surrounding air, which then claps as </text:span><text:span text:style-name="T9">thunder</text:span><text:span text:style-name="T5">.</text:span><text:bookmark-end text:name="__DdeLink__507_89515472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30T14:07:24.933579607</meta:creation-date>
    <dc:date>2026-06-19T23:12:11.360483013</dc:date>
    <meta:editing-duration>PT2H47M29S</meta:editing-duration>
    <meta:editing-cycles>70</meta:editing-cycles>
    <meta:generator>LibreOffice/25.8.5.2$Linux_X86_64 LibreOffice_project/580$Build-2</meta:generator>
    <meta:document-statistic meta:table-count="1" meta:image-count="0" meta:object-count="21" meta:page-count="5" meta:paragraph-count="74" meta:word-count="1183" meta:character-count="7028" meta:non-whitespace-character-count="5919"/>
  </office:meta>
</office:document-meta>
</file>

<file path=Object 1/content.xml><?xml version="1.0" encoding="utf-8"?>
<math xmlns="http://www.w3.org/1998/Math/MathML" display="block">
  <semantics>
    <mrow>
      <mo stretchy="false">+</mo>
      <mn>1</mn>
    </mrow>
    <annotation encoding="StarMath 5.0">+1</annotation>
  </semantics>
</math>
</file>

<file path=Object 10/content.xml><?xml version="1.0" encoding="utf-8"?>
<math xmlns="http://www.w3.org/1998/Math/MathML" display="block">
  <semantics>
    <mrow>
      <mrow>
        <mn>8.0</mn>
        <mo stretchy="false">×</mo>
        <msup>
          <mn>10</mn>
          <mrow>
            <mo stretchy="false">−</mo>
            <mn>17</mn>
          </mrow>
        </msup>
      </mrow>
      <mtext>C</mtext>
    </mrow>
    <annotation encoding="StarMath 5.0">8.0 times 10^-17 "C"</annotation>
  </semantics>
</math>
</file>

<file path=Object 11/content.xml><?xml version="1.0" encoding="utf-8"?>
<math xmlns="http://www.w3.org/1998/Math/MathML" display="block">
  <semantics>
    <mrow>
      <mrow>
        <mrow>
          <mrow>
            <mo fence="true" form="prefix" stretchy="false">(</mo>
            <mrow>
              <mrow>
                <mn>8.0</mn>
                <mo stretchy="false">×</mo>
                <msup>
                  <mn>10</mn>
                  <mrow>
                    <mo stretchy="false">−</mo>
                    <mn>17</mn>
                  </mrow>
                </msup>
              </mrow>
            </mrow>
            <mo fence="true" form="postfix" stretchy="false">)</mo>
          </mrow>
          <mo stretchy="false">×</mo>
          <mfrac>
            <mrow>
              <mn>1</mn>
              <mi>e</mi>
            </mrow>
            <mrow>
              <mrow>
                <mn>1.60</mn>
                <mo stretchy="false">×</mo>
                <msup>
                  <mn>10</mn>
                  <mrow>
                    <mo stretchy="false">−</mo>
                    <mn>19</mn>
                  </mrow>
                </msup>
              </mrow>
              <mtext>C</mtext>
            </mrow>
          </mfrac>
        </mrow>
        <mo stretchy="false">=</mo>
        <mn>500</mn>
      </mrow>
      <mi>e</mi>
    </mrow>
    <annotation encoding="StarMath 5.0">(8.0 times 10^-17) times frac { 1e } { 1.60 times 10^-19 "C" } = 500 e</annotation>
  </semantics>
</math>
</file>

<file path=Object 12/content.xml><?xml version="1.0" encoding="utf-8"?>
<math xmlns="http://www.w3.org/1998/Math/MathML" display="block">
  <semantics>
    <mtext>C</mtext>
    <annotation encoding="StarMath 5.0">"C"</annotation>
  </semantics>
</math>
</file>

<file path=Object 13/content.xml><?xml version="1.0" encoding="utf-8"?>
<math xmlns="http://www.w3.org/1998/Math/MathML" display="block">
  <semantics>
    <mn>1</mn>
    <annotation encoding="StarMath 5.0">1</annotation>
  </semantics>
</math>
</file>

<file path=Object 14/content.xml><?xml version="1.0" encoding="utf-8"?>
<math xmlns="http://www.w3.org/1998/Math/MathML" display="block">
  <semantics>
    <mrow>
      <mn>1</mn>
      <mi>e</mi>
    </mrow>
    <annotation encoding="StarMath 5.0">1 e</annotation>
  </semantics>
</math>
</file>

<file path=Object 15/content.xml><?xml version="1.0" encoding="utf-8"?>
<math xmlns="http://www.w3.org/1998/Math/MathML" display="block">
  <semantics>
    <mrow>
      <mrow>
        <mn>1.60</mn>
        <mo stretchy="false">×</mo>
        <msup>
          <mn>10</mn>
          <mrow>
            <mo stretchy="false">−</mo>
            <mn>19</mn>
          </mrow>
        </msup>
      </mrow>
      <mtext>C</mtext>
    </mrow>
    <annotation encoding="StarMath 5.0">1.60 times 10^-19 "C"</annotation>
  </semantics>
</math>
</file>

<file path=Object 16/content.xml><?xml version="1.0" encoding="utf-8"?>
<math xmlns="http://www.w3.org/1998/Math/MathML" display="block">
  <semantics>
    <mrow>
      <mtext>individual charge</mtext>
      <mo stretchy="false">=</mo>
      <mfrac>
        <mtext>net charge</mtext>
        <mtext>number of objects</mtext>
      </mfrac>
    </mrow>
    <annotation encoding="StarMath 5.0">"individual charge" = frac { alignc "net charge" } { alignc "number of objects" }</annotation>
  </semantics>
</math>
</file>

<file path=Object 17/content.xml><?xml version="1.0" encoding="utf-8"?>
<math xmlns="http://www.w3.org/1998/Math/MathML" display="block">
  <semantics>
    <mn>4</mn>
    <annotation encoding="StarMath 5.0">4</annotation>
  </semantics>
</math>
</file>

<file path=Object 18/content.xml><?xml version="1.0" encoding="utf-8"?>
<math xmlns="http://www.w3.org/1998/Math/MathML" display="block">
  <semantics>
    <mrow>
      <mrow>
        <mo stretchy="false">+</mo>
        <mn>4</mn>
      </mrow>
      <mi>e</mi>
    </mrow>
    <annotation encoding="StarMath 5.0">+4 e</annotation>
  </semantics>
</math>
</file>

<file path=Object 19/content.xml><?xml version="1.0" encoding="utf-8"?>
<math xmlns="http://www.w3.org/1998/Math/MathML" display="block">
  <semantics>
    <mrow>
      <mrow>
        <mfrac>
          <mrow>
            <mrow>
              <mo stretchy="false">+</mo>
              <mn>4</mn>
            </mrow>
            <mi>e</mi>
          </mrow>
          <mn>2</mn>
        </mfrac>
        <mo stretchy="false">=</mo>
        <mrow>
          <mo stretchy="false">+</mo>
          <mn>2</mn>
        </mrow>
      </mrow>
      <mi>e</mi>
    </mrow>
    <annotation encoding="StarMath 5.0">frac { +4 e } { 2 } = +2 e</annotation>
  </semantics>
</math>
</file>

<file path=Object 2/content.xml><?xml version="1.0" encoding="utf-8"?>
<math xmlns="http://www.w3.org/1998/Math/MathML" display="block">
  <semantics>
    <mrow>
      <mrow>
        <mo stretchy="false">+</mo>
        <mn>1</mn>
      </mrow>
      <mi>e</mi>
    </mrow>
    <annotation encoding="StarMath 5.0">+1 e</annotation>
  </semantics>
</math>
</file>

<file path=Object 20/content.xml><?xml version="1.0" encoding="utf-8"?>
<math xmlns="http://www.w3.org/1998/Math/MathML" display="block">
  <semantics>
    <mrow>
      <mo stretchy="false">+</mo>
      <mi>Q</mi>
    </mrow>
    <annotation encoding="StarMath 5.0">+Q</annotation>
  </semantics>
</math>
</file>

<file path=Object 21/content.xml><?xml version="1.0" encoding="utf-8"?>
<math xmlns="http://www.w3.org/1998/Math/MathML" display="block">
  <semantics>
    <mtable>
      <mtr>
        <mtd>
          <mrow>
            <msub>
              <mtext>charge</mtext>
              <mi>A</mi>
            </msub>
            <mo stretchy="false">=</mo>
            <mfrac>
              <mrow>
                <mrow>
                  <mfrac>
                    <mrow>
                      <mrow>
                        <mi>Q</mi>
                        <mo stretchy="false">+</mo>
                        <mn>0</mn>
                      </mrow>
                      <mi>e</mi>
                    </mrow>
                    <mn>2</mn>
                  </mfrac>
                  <mo stretchy="false">+</mo>
                  <mn>0</mn>
                </mrow>
                <mi>e</mi>
              </mrow>
              <mn>2</mn>
            </mfrac>
          </mrow>
        </mtd>
      </mtr>
      <mtr>
        <mtd>
          <mrow>
            <mrow>
              <msub>
                <mtext>charge</mtext>
                <mi>A</mi>
              </msub>
              <mo stretchy="false">=</mo>
              <mfrac>
                <mn>1</mn>
                <mn>4</mn>
              </mfrac>
            </mrow>
            <mi>Q</mi>
          </mrow>
        </mtd>
      </mtr>
    </mtable>
    <annotation encoding="StarMath 5.0">"charge"_A = frac { { frac { Q + 0 e } { 2 } } + 0 e } { 2 } newline
"charge"_A = frac { 1 } { 4 } Q</annotation>
  </semantics>
</math>
</file>

<file path=Object 3/content.xml><?xml version="1.0" encoding="utf-8"?>
<math xmlns="http://www.w3.org/1998/Math/MathML" display="block">
  <semantics>
    <mrow>
      <mo stretchy="false">−</mo>
      <mn>1</mn>
    </mrow>
    <annotation encoding="StarMath 5.0">-1</annotation>
  </semantics>
</math>
</file>

<file path=Object 4/content.xml><?xml version="1.0" encoding="utf-8"?>
<math xmlns="http://www.w3.org/1998/Math/MathML" display="block">
  <semantics>
    <mrow>
      <mrow>
        <mo stretchy="false">−</mo>
        <mn>1</mn>
      </mrow>
      <mi>e</mi>
    </mrow>
    <annotation encoding="StarMath 5.0">-1 e</annotation>
  </semantics>
</math>
</file>

<file path=Object 5/content.xml><?xml version="1.0" encoding="utf-8"?>
<math xmlns="http://www.w3.org/1998/Math/MathML" display="block">
  <semantics>
    <mtext>C</mtext>
    <annotation encoding="StarMath 5.0">"C"</annotation>
  </semantics>
</math>
</file>

<file path=Object 6/content.xml><?xml version="1.0" encoding="utf-8"?>
<math xmlns="http://www.w3.org/1998/Math/MathML" display="block">
  <semantics>
    <mrow>
      <mrow>
        <mo stretchy="false">+</mo>
        <mn>1</mn>
      </mrow>
      <mi>e</mi>
    </mrow>
    <annotation encoding="StarMath 5.0">+1e</annotation>
  </semantics>
</math>
</file>

<file path=Object 7/content.xml><?xml version="1.0" encoding="utf-8"?>
<math xmlns="http://www.w3.org/1998/Math/MathML" display="block">
  <semantics>
    <mrow>
      <mrow>
        <mo stretchy="false">−</mo>
        <mn>1</mn>
      </mrow>
      <mi>e</mi>
    </mrow>
    <annotation encoding="StarMath 5.0">-1e</annotation>
  </semantics>
</math>
</file>

<file path=Object 8/content.xml><?xml version="1.0" encoding="utf-8"?>
<math xmlns="http://www.w3.org/1998/Math/MathML" display="block">
  <semantics>
    <mn>5</mn>
    <annotation encoding="StarMath 5.0">5</annotation>
  </semantics>
</math>
</file>

<file path=Object 9/content.xml><?xml version="1.0" encoding="utf-8"?>
<math xmlns="http://www.w3.org/1998/Math/MathML" display="block">
  <semantics>
    <mrow>
      <mrow>
        <mo stretchy="false">−</mo>
        <mn>5</mn>
      </mrow>
      <mrow>
        <mrow>
          <mi>e</mi>
          <mo stretchy="false">×</mo>
          <mfrac>
            <mrow>
              <mrow>
                <mn>1.60</mn>
                <mo stretchy="false">×</mo>
                <msup>
                  <mn>10</mn>
                  <mrow>
                    <mo stretchy="false">−</mo>
                    <mn>19</mn>
                  </mrow>
                </msup>
              </mrow>
              <mtext>C</mtext>
            </mrow>
            <mrow>
              <mn>1</mn>
              <mi>e</mi>
            </mrow>
          </mfrac>
        </mrow>
        <mo stretchy="false">=</mo>
        <mrow>
          <mn>8.0</mn>
          <mo stretchy="false">×</mo>
          <msup>
            <mn>10</mn>
            <mrow>
              <mo stretchy="false">−</mo>
              <mn>19</mn>
            </mrow>
          </msup>
        </mrow>
      </mrow>
      <mtext>C</mtext>
    </mrow>
    <annotation encoding="StarMath 5.0">-5 e times frac { 1.60 times 10^-19 "C" } { 1 e } = 8.0 times 10^-19 "C"</annotation>
  </semantics>
</math>
</file>
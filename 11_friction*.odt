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hiron Hei HK ExtraLight" svg:font-family="'Chiron Hei HK Extra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3eff75" officeooo:paragraph-rsid="003eff75"/>
    </style:style>
    <style:style style:name="P2" style:family="paragraph" style:parent-style-name="Text_20_body">
      <style:paragraph-properties fo:text-align="center" style:justify-single-word="false"/>
      <style:text-properties fo:font-style="italic" officeooo:paragraph-rsid="0047f229" style:font-style-asian="italic" style:font-style-complex="italic"/>
    </style:style>
    <style:style style:name="P3" style:family="paragraph" style:parent-style-name="Text_20_body">
      <style:paragraph-properties fo:text-align="center" style:justify-single-word="false"/>
      <style:text-properties fo:font-style="normal" officeooo:rsid="0123fc99" officeooo:paragraph-rsid="001dc2ea" style:font-style-asian="normal" style:font-style-complex="normal"/>
    </style:style>
    <style:style style:name="P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" style:family="paragraph" style:parent-style-name="Heading_20_1" style:list-style-name="">
      <style:text-properties officeooo:rsid="004c7a21" officeooo:paragraph-rsid="001dc2ea"/>
    </style:style>
    <style:style style:name="P6" style:family="paragraph" style:parent-style-name="Heading_20_1">
      <style:paragraph-properties fo:break-before="page"/>
      <style:text-properties officeooo:rsid="003eff75" officeooo:paragraph-rsid="003eff75"/>
    </style:style>
    <style:style style:name="P7" style:family="paragraph" style:parent-style-name="Text_20_body">
      <style:text-properties fo:font-weight="bold" officeooo:rsid="003eff75" officeooo:paragraph-rsid="003eff75" style:font-weight-asian="bold" style:font-weight-complex="bold"/>
    </style:style>
    <style:style style:name="P8" style:family="paragraph" style:parent-style-name="Text_20_body">
      <style:text-properties officeooo:rsid="003eff75" officeooo:paragraph-rsid="003eff75"/>
    </style:style>
    <style:style style:name="P9" style:family="paragraph" style:parent-style-name="Text_20_body">
      <style:text-properties fo:font-weight="normal" officeooo:rsid="003eff75" officeooo:paragraph-rsid="003eff75" style:font-weight-asian="normal" style:font-weight-complex="normal"/>
    </style:style>
    <style:style style:name="P10" style:family="paragraph" style:parent-style-name="Heading_20_1">
      <style:text-properties officeooo:rsid="0040c0af" officeooo:paragraph-rsid="0040c0af"/>
    </style:style>
    <style:style style:name="P11" style:family="paragraph" style:parent-style-name="Text_20_body">
      <style:text-properties officeooo:rsid="0040c0af" officeooo:paragraph-rsid="0040c0af"/>
    </style:style>
    <style:style style:name="P12" style:family="paragraph" style:parent-style-name="Text_20_body">
      <style:paragraph-properties fo:text-align="center" style:justify-single-word="false"/>
      <style:text-properties officeooo:rsid="0040c0af" officeooo:paragraph-rsid="0040c0af"/>
    </style:style>
    <style:style style:name="P13" style:family="paragraph" style:parent-style-name="Text_20_body">
      <style:paragraph-properties fo:text-align="start" style:justify-single-word="false"/>
      <style:text-properties officeooo:rsid="0040c0af" officeooo:paragraph-rsid="0040c0af"/>
    </style:style>
    <style:style style:name="P14" style:family="paragraph" style:parent-style-name="Text_20_body" style:list-style-name="L1">
      <style:text-properties officeooo:paragraph-rsid="0040c0af"/>
    </style:style>
    <style:style style:name="P15" style:family="paragraph" style:parent-style-name="Text_20_body" style:list-style-name="L1">
      <style:text-properties officeooo:rsid="0040c0af" officeooo:paragraph-rsid="0040c0af"/>
    </style:style>
    <style:style style:name="P16" style:family="paragraph" style:parent-style-name="Text_20_body" style:list-style-name="L1">
      <style:paragraph-properties fo:text-align="center" style:justify-single-word="false"/>
      <style:text-properties officeooo:rsid="0040c0af" officeooo:paragraph-rsid="0040c0af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40c0af" officeooo:paragraph-rsid="0040c0af"/>
    </style:style>
    <style:style style:name="P18" style:family="paragraph" style:parent-style-name="Text_20_body" style:list-style-name="L1">
      <style:paragraph-properties fo:text-align="center" style:justify-single-word="false"/>
      <style:text-properties officeooo:rsid="0042ab04" officeooo:paragraph-rsid="0042ab04"/>
    </style:style>
    <style:style style:name="T1" style:family="text">
      <style:text-properties officeooo:rsid="0047f229"/>
    </style:style>
    <style:style style:name="T2" style:family="text">
      <style:text-properties officeooo:rsid="002feec6"/>
    </style:style>
    <style:style style:name="T3" style:family="text">
      <style:text-properties officeooo:rsid="002900b4"/>
    </style:style>
    <style:style style:name="T4" style:family="text">
      <style:text-properties officeooo:rsid="0035f633"/>
    </style:style>
    <style:style style:name="T5" style:family="text">
      <style:text-properties officeooo:rsid="003eff7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40c0a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42ab0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iction<text:span text:style-name="T1">*</text:span></text:p>
      <text:p text:style-name="P2">(This <text:span text:style-name="T2">idea or </text:span>topic is excluded in the new <text:span text:style-name="T3">Physical Science: Physics course.</text:span>)<text:bookmark-start text:name="__DdeLink__138_391587487"/><text:bookmark-start text:name="__DdeLink__502_3041763869"/></text:p>
      <text:p text:style-name="P3"><text:span text:style-name="T4">November </text:span><text:span text:style-name="T5">6</text:span>, 202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627_4069653955" office:name="­" text:style-name="Index_20_Link" text:visited-style-name="Index_20_Link">­<text:tab/>1</text:a></text:p>
          <text:p text:style-name="P4"><text:a xlink:type="simple" xlink:href="#__RefHeading___Toc2229_3911434191" office:name="Introduction to Friction" text:style-name="Index_20_Link" text:visited-style-name="Index_20_Link">Introduction to Friction<text:tab/>2</text:a></text:p>
          <text:p text:style-name="P4"><text:a xlink:type="simple" xlink:href="#__RefHeading___Toc2231_3911434191" office:name="The Two Types of Friction" text:style-name="Index_20_Link" text:visited-style-name="Index_20_Link">The Two Types of Friction<text:tab/>2</text:a></text:p>
          <text:p text:style-name="P4"><text:a xlink:type="simple" xlink:href="#__RefHeading___Toc2233_3911434191" office:name="The Coefficient of Friction" text:style-name="Index_20_Link" text:visited-style-name="Index_20_Link">The Coefficient of Friction<text:tab/>2</text:a></text:p>
          <text:p text:style-name="P4"><text:a xlink:type="simple" xlink:href="#__RefHeading___Toc2235_3911434191" office:name="Calculating Friction" text:style-name="Index_20_Link" text:visited-style-name="Index_20_Link">Calculating Friction<text:tab/>2</text:a></text:p>
          <text:p text:style-name="P4"><text:a xlink:type="simple" xlink:href="#__RefHeading___Toc2237_3911434191" office:name="Examples and Applications" text:style-name="Index_20_Link" text:visited-style-name="Index_20_Link">Examples and Applications<text:tab/>3</text:a></text:p>
        </text:index-body>
      </text:table-of-content>
      <text:h text:style-name="P5" text:outline-level="1"><text:bookmark-start text:name="__RefHeading___Toc627_4069653955"/>­<text:bookmark-end text:name="__RefHeading___Toc627_4069653955"/></text:h>
      <text:h text:style-name="P6" text:outline-level="1" text:is-list-header="true"><text:bookmark-end text:name="__DdeLink__502_3041763869"/><text:bookmark-end text:name="__DdeLink__138_391587487"/><text:bookmark-start text:name="__RefHeading___Toc2229_3911434191"/>Introduction to Friction<text:bookmark-end text:name="__RefHeading___Toc2229_3911434191"/></text:h>
      <text:p text:style-name="P7">Friction<text:span text:style-name="T6"> is the force that </text:span>opposes motion<text:span text:style-name="T6">. It is essentially the force that restricts the movement of one solid object over another.</text:span></text:p>
      <text:h text:style-name="Heading_20_1" text:outline-level="1"><text:bookmark-start text:name="__RefHeading___Toc2231_3911434191"/>The <text:span text:style-name="T7">Two </text:span>Types of Friction<text:bookmark-end text:name="__RefHeading___Toc2231_3911434191"/></text:h>
      <text:p text:style-name="P8"><text:span text:style-name="T6">There are two types of friction: </text:span><text:span text:style-name="T8">static friction</text:span><text:span text:style-name="T6"> and </text:span><text:span text:style-name="T8">kinetic friction</text:span><text:span text:style-name="T6">. Both types have friction pointing in the direction opposite to motion. For instance, a car driving east would experience a force of friction pointing west.</text:span></text:p>
      <text:p text:style-name="P9">Static friction is the friction that exists before an object begins moving. It causes the object to have a certain threshold at which it can actually start moving.</text:p>
      <text:p text:style-name="P9">Kinetic friction, on the other hand, is the friction that exists only when two objects have already began sliding or rubbing against each other. Once an object’<text:span text:style-name="T7">s movement</text:span> falls below <text:span text:style-name="T7">the force of</text:span> kinetic friction, <text:span text:style-name="T7">it decelerates until it stops. Once stopped, static friction takes over and the object remains at rest until acted upon again.</text:span></text:p>
      <text:h text:style-name="Heading_20_1" text:outline-level="1"><text:bookmark-start text:name="__RefHeading___Toc2233_3911434191"/>The Coefficient of Friction<text:bookmark-end text:name="__RefHeading___Toc2233_3911434191"/></text:h>
      <text:p text:style-name="P8">The <text:span text:style-name="T8">coefficient of friction</text:span><text:span text:style-name="T6"> of a surface is dependent on the texture of the material. It is represented using the symbol </text:span><text:span text:style-name="T6"><draw:frame draw:style-name="fr1" draw:name="Object1" text:anchor-type="as-char" svg:y="-0.1492in" svg:width="0.0965in" svg:height="0.185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<text:s/>(“mu”) and is a unitless number between </text:span><text:span text:style-name="T6"><draw:frame draw:style-name="fr1" draw:name="Object2" text:anchor-type="as-char" svg:y="-0.1492in" svg:width="0.0882in" svg:height="0.1854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<text:s/>(meaning perfectly frictionless) and </text:span><text:span text:style-name="T6"><draw:frame draw:style-name="fr1" draw:name="Object3" text:anchor-type="as-char" svg:y="-0.1492in" svg:width="0.0835in" svg:height="0.1854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">.</text:span></text:p>
      <text:p text:style-name="P9">Materials can have both a coefficient of static fraction and a coefficient of kinetic friction. The coefficient of static friction is <text:span text:style-name="T8">always greater</text:span> than the coefficient of kinetic friction; it is harder to make an object start moving than to keep it moving.</text:p>
      <text:p text:style-name="P9">A possible scenario demonstrating the coefficients of friction is rubber making contact with dry concrete, creating a coefficient of kinetic friction of <draw:frame draw:style-name="fr1" draw:name="Object4" text:anchor-type="as-char" svg:y="-0.1492in" svg:width="0.2965in" svg:height="0.1854in" draw:z-index="3"><draw:object xlink:href="./Object 4" xlink:type="simple" xlink:show="embed" xlink:actuate="onLoad"/><draw:image xlink:href="./ObjectReplacements/Object 4" xlink:type="simple" xlink:show="embed" xlink:actuate="onLoad"/></draw:frame><text:s/>and a coefficient of static friction of <draw:frame draw:style-name="fr1" draw:name="Object5" text:anchor-type="as-char" svg:y="-0.1492in" svg:width="0.2965in" svg:height="0.1854in" draw:z-index="4"><draw:object xlink:href="./Object 5" xlink:type="simple" xlink:show="embed" xlink:actuate="onLoad"/><draw:image xlink:href="./ObjectReplacements/Object 5" xlink:type="simple" xlink:show="embed" xlink:actuate="onLoad"/></draw:frame>.</text:p>
      <text:h text:style-name="P10" text:outline-level="1"><text:bookmark-start text:name="__RefHeading___Toc2235_3911434191"/>Calculating Friction<text:bookmark-end text:name="__RefHeading___Toc2235_3911434191"/></text:h>
      <text:p text:style-name="P11">The formula to calculate friction given a coefficient of friction and a normal force is defined as follows:</text:p>
      <text:p text:style-name="P12"><draw:frame draw:style-name="fr1" draw:name="Object6" text:anchor-type="as-char" svg:y="-0.1492in" svg:width="0.6311in" svg:height="0.2102in" draw:z-index="5"><draw:object xlink:href="./Object 6" xlink:type="simple" xlink:show="embed" xlink:actuate="onLoad"/><draw:image xlink:href="./ObjectReplacements/Object 6" xlink:type="simple" xlink:show="embed" xlink:actuate="onLoad"/></draw:frame>,</text:p>
      <text:p text:style-name="P13">where <draw:frame draw:style-name="fr1" draw:name="Object7" text:anchor-type="as-char" svg:y="-0.1492in" svg:width="0.1717in" svg:height="0.2102in" draw:z-index="6"><draw:object xlink:href="./Object 7" xlink:type="simple" xlink:show="embed" xlink:actuate="onLoad"/><draw:image xlink:href="./ObjectReplacements/Object 7" xlink:type="simple" xlink:show="embed" xlink:actuate="onLoad"/></draw:frame><text:s/>is the force of friction acting on an object, <draw:frame draw:style-name="fr1" draw:name="Object8" text:anchor-type="as-char" svg:y="-0.1492in" svg:width="0.0965in" svg:height="0.1854in" draw:z-index="7"><draw:object xlink:href="./Object 8" xlink:type="simple" xlink:show="embed" xlink:actuate="onLoad"/><draw:image xlink:href="./ObjectReplacements/Object 8" xlink:type="simple" xlink:show="embed" xlink:actuate="onLoad"/></draw:frame><text:s/>is the coefficient of friction between the object and the surface, and <draw:frame draw:style-name="fr1" draw:name="Object9" text:anchor-type="as-char" svg:y="-0.1492in" svg:width="0.2055in" svg:height="0.2102in" draw:z-index="8"><draw:object xlink:href="./Object 9" xlink:type="simple" xlink:show="embed" xlink:actuate="onLoad"/><draw:image xlink:href="./ObjectReplacements/Object 9" xlink:type="simple" xlink:show="embed" xlink:actuate="onLoad"/></draw:frame><text:s/>is the normal force acting on the object.</text:p>
      <text:p text:style-name="P13">This formula can also be used to calculate both static and kinetic friction when given the required values.</text:p>
      <text:h text:style-name="P10" text:outline-level="1"><text:bookmark-start text:name="__RefHeading___Toc2237_3911434191"/><text:soft-page-break/>Examples and Applications<text:bookmark-end text:name="__RefHeading___Toc2237_3911434191"/></text:h>
      <text:list text:style-name="L1">
        <text:list-item>
          <text:p text:style-name="P14"><text:span text:style-name="T7">A wooden cart with a mass of </text:span><text:span text:style-name="T7"><draw:frame draw:style-name="fr1" draw:name="Object10" text:anchor-type="as-char" svg:y="-0.1492in" svg:width="0.4866in" svg:height="0.1854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7"><text:s/>is sitting on a wooden floor near the surface of Earth. A man pulls the cart due east with a force of </text:span><text:span text:style-name="T7"><draw:frame draw:style-name="fr1" draw:name="Object11" text:anchor-type="as-char" svg:y="-0.1492in" svg:width="0.4409in" svg:height="0.1854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7">.</text:span></text:p>
          <text:list>
            <text:list-item>
              <text:p text:style-name="P15">The coefficient of static friction of a wooden body on a wooden surface is <draw:frame draw:style-name="fr1" draw:name="Object12" text:anchor-type="as-char" svg:y="-0.1492in" svg:width="0.3799in" svg:height="0.1854in" draw:z-index="11"><draw:object xlink:href="./Object 12" xlink:type="simple" xlink:show="embed" xlink:actuate="onLoad"/><draw:image xlink:href="./ObjectReplacements/Object 12" xlink:type="simple" xlink:show="embed" xlink:actuate="onLoad"/></draw:frame>. Determine the magnitude of the force of <text:span text:style-name="T9">static </text:span>friction acting on the object.</text:p>
              <text:p text:style-name="P16"><draw:frame draw:style-name="fr1" draw:name="Object13" text:anchor-type="as-char" svg:y="-0.3516in" svg:width="2.0193in" svg:height="0.6701in" draw:z-index="12"><draw:object xlink:href="./Object 13" xlink:type="simple" xlink:show="embed" xlink:actuate="onLoad"/><draw:image xlink:href="./ObjectReplacements/Object 13" xlink:type="simple" xlink:show="embed" xlink:actuate="onLoad"/></draw:frame></text:p>
            </text:list-item>
            <text:list-item>
              <text:p text:style-name="P17">Calculate the net horizontal force acting on the object. <text:span text:style-name="T9">Is the cart able to move with the man’s applied force?</text:span></text:p>
              <text:p text:style-name="P16"><draw:frame draw:style-name="fr1" draw:name="Object14" text:anchor-type="as-char" svg:y="-0.3398in" svg:width="1.378in" svg:height="0.6465in" draw:z-index="13"><draw:object xlink:href="./Object 14" xlink:type="simple" xlink:show="embed" xlink:actuate="onLoad"/><draw:image xlink:href="./ObjectReplacements/Object 14" xlink:type="simple" xlink:show="embed" xlink:actuate="onLoad"/></draw:frame></text:p>
              <text:p text:style-name="P18">The cart is not able to move because the force of static friction is larger than the man’s applied force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hiron Hei HK ExtraLight" svg:font-family="'Chiron Hei HK Extra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hiron Hei HK ExtraLight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Chiron Hei HK ExtraLight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1T14:13:00.953938585</meta:creation-date>
    <dc:date>2026-06-19T22:57:53.124137919</dc:date>
    <meta:editing-duration>PT1H29M38S</meta:editing-duration>
    <meta:editing-cycles>21</meta:editing-cycles>
    <meta:generator>LibreOffice/25.8.5.2$Linux_X86_64 LibreOffice_project/580$Build-2</meta:generator>
    <meta:document-statistic meta:table-count="0" meta:image-count="0" meta:object-count="14" meta:page-count="3" meta:paragraph-count="33" meta:word-count="478" meta:character-count="2782" meta:non-whitespace-character-count="2331"/>
  </office:meta>
</office:document-meta>
</file>

<file path=Object 1/content.xml><?xml version="1.0" encoding="utf-8"?>
<math xmlns="http://www.w3.org/1998/Math/MathML" display="block">
  <semantics>
    <mi>μ</mi>
    <annotation encoding="StarMath 5.0">%mu</annotation>
  </semantics>
</math>
</file>

<file path=Object 10/content.xml><?xml version="1.0" encoding="utf-8"?>
<math xmlns="http://www.w3.org/1998/Math/MathML" display="block">
  <semantics>
    <mrow>
      <mn>100.</mn>
      <mtext>kg</mtext>
    </mrow>
    <annotation encoding="StarMath 5.0">100. "kg"</annotation>
  </semantics>
</math>
</file>

<file path=Object 11/content.xml><?xml version="1.0" encoding="utf-8"?>
<math xmlns="http://www.w3.org/1998/Math/MathML" display="block">
  <semantics>
    <mrow>
      <mn>50.0</mn>
      <mtext>N</mtext>
    </mrow>
    <annotation encoding="StarMath 5.0">50.0 "N"</annotation>
  </semantics>
</math>
</file>

<file path=Object 12/content.xml><?xml version="1.0" encoding="utf-8"?>
<math xmlns="http://www.w3.org/1998/Math/MathML" display="block">
  <semantics>
    <mn>0.420</mn>
    <annotation encoding="StarMath 5.0">0.420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sub>
                <mi>F</mi>
                <mi>f</mi>
              </msub>
              <mo stretchy="false">=</mo>
              <mi>μ</mi>
            </mrow>
            <mrow>
              <msub>
                <mi>F</mi>
                <mi>N</mi>
              </msub>
              <mo stretchy="false">=</mo>
              <mi>μ</mi>
            </mrow>
            <mi mathvariant="italic">mg</mi>
          </mrow>
        </mtd>
      </mtr>
      <mtr>
        <mtd>
          <mrow>
            <mrow>
              <msub>
                <mi>F</mi>
                <mi>f</mi>
              </msub>
              <mo stretchy="false">=</mo>
              <mn>0.420</mn>
            </mrow>
            <mrow>
              <mo fence="true" form="prefix" stretchy="false">(</mo>
              <mrow>
                <mrow>
                  <mn>100.</mn>
                  <mtext>kg</mtext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9.8</mn>
                  <mrow>
                    <mtext>m</mtext>
                    <mo stretchy="false">/</mo>
                    <msup>
                      <mtext>s</mtext>
                      <mn>2</mn>
                    </msup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F</mi>
                <mi>f</mi>
              </msub>
              <mo stretchy="false">≈</mo>
              <mn>412</mn>
            </mrow>
            <mtext>N</mtext>
          </mrow>
        </mtd>
      </mtr>
    </mtable>
    <annotation encoding="StarMath 5.0">F_f = %mu F_N = %mu mg newline
F_f = 0.420 ( 100. "kg" ) ( 9.8 "m" / "s"^2 ) newline
F_f approx 412 "N"</annotation>
  </semantics>
</math>
</file>

<file path=Object 14/content.xml><?xml version="1.0" encoding="utf-8"?>
<math xmlns="http://www.w3.org/1998/Math/MathML" display="block">
  <semantics>
    <mtable>
      <mtr>
        <mtd>
          <mrow>
            <msub>
              <mi>F</mi>
              <mtext>net</mtext>
            </msub>
            <mo stretchy="false">=</mo>
            <mrow>
              <msub>
                <mi>F</mi>
                <mtext>east</mtext>
              </msub>
              <mo stretchy="false">−</mo>
              <msub>
                <mi>F</mi>
                <mtext>west</mtext>
              </msub>
            </mrow>
          </mrow>
        </mtd>
      </mtr>
      <mtr>
        <mtd>
          <mrow>
            <mrow>
              <msub>
                <mi>F</mi>
                <mtext>net</mtext>
              </msub>
              <mo stretchy="false">=</mo>
              <mn>50.0</mn>
            </mrow>
            <mrow>
              <mtext>N</mtext>
              <mo stretchy="false">−</mo>
              <mn>412</mn>
            </mrow>
            <mtext>N</mtext>
          </mrow>
        </mtd>
      </mtr>
      <mtr>
        <mtd>
          <mrow>
            <mrow>
              <msub>
                <mi>F</mi>
                <mtext>net</mtext>
              </msub>
              <mo stretchy="false">=</mo>
              <mrow>
                <mo stretchy="false">−</mo>
                <mn>362</mn>
              </mrow>
            </mrow>
            <mtext>N</mtext>
          </mrow>
        </mtd>
      </mtr>
    </mtable>
    <annotation encoding="StarMath 5.0">F_"net" = F_"east" - F_"west" newline
F_"net" = 50.0 "N" - 412 "N" newline
F_"net" = -362 "N"</annotation>
  </semantics>
</math>
</file>

<file path=Object 2/content.xml><?xml version="1.0" encoding="utf-8"?>
<math xmlns="http://www.w3.org/1998/Math/MathML" display="block">
  <semantics>
    <mn>0</mn>
    <annotation encoding="StarMath 5.0">0</annotation>
  </semantics>
</math>
</file>

<file path=Object 3/content.xml><?xml version="1.0" encoding="utf-8"?>
<math xmlns="http://www.w3.org/1998/Math/MathML" display="block">
  <semantics>
    <mn>1</mn>
    <annotation encoding="StarMath 5.0">1</annotation>
  </semantics>
</math>
</file>

<file path=Object 4/content.xml><?xml version="1.0" encoding="utf-8"?>
<math xmlns="http://www.w3.org/1998/Math/MathML" display="block">
  <semantics>
    <mn>0.68</mn>
    <annotation encoding="StarMath 5.0">0.68</annotation>
  </semantics>
</math>
</file>

<file path=Object 5/content.xml><?xml version="1.0" encoding="utf-8"?>
<math xmlns="http://www.w3.org/1998/Math/MathML" display="block">
  <semantics>
    <mn>0.90</mn>
    <annotation encoding="StarMath 5.0">0.90</annotation>
  </semantics>
</math>
</file>

<file path=Object 6/content.xml><?xml version="1.0" encoding="utf-8"?>
<math xmlns="http://www.w3.org/1998/Math/MathML" display="block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_f = %mu F_N</annotation>
  </semantics>
</math>
</file>

<file path=Object 7/content.xml><?xml version="1.0" encoding="utf-8"?>
<math xmlns="http://www.w3.org/1998/Math/MathML" display="block">
  <semantics>
    <msub>
      <mi>F</mi>
      <mi>f</mi>
    </msub>
    <annotation encoding="StarMath 5.0">F_f</annotation>
  </semantics>
</math>
</file>

<file path=Object 8/content.xml><?xml version="1.0" encoding="utf-8"?>
<math xmlns="http://www.w3.org/1998/Math/MathML" display="block">
  <semantics>
    <mi>μ</mi>
    <annotation encoding="StarMath 5.0">%mu</annotation>
  </semantics>
</math>
</file>

<file path=Object 9/content.xml><?xml version="1.0" encoding="utf-8"?>
<math xmlns="http://www.w3.org/1998/Math/MathML" display="block">
  <semantics>
    <msub>
      <mi>F</mi>
      <mi>N</mi>
    </msub>
    <annotation encoding="StarMath 5.0">F_N</annotation>
  </semantics>
</math>
</file>